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752in"/>
    </style:style>
    <style:style style:name="co3" style:family="table-column">
      <style:table-column-properties fo:break-before="auto" style:column-width="2.6516in"/>
    </style:style>
    <style:style style:name="co4" style:family="table-column">
      <style:table-column-properties fo:break-before="auto" style:column-width="1.6571in"/>
    </style:style>
    <style:style style:name="co5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4709in" fo:break-before="auto" style:use-optimal-row-height="true"/>
    </style:style>
    <style:style style:name="ro5" style:family="table-row">
      <style:table-row-properties style:row-height="0.6217in" fo:break-before="auto" style:use-optimal-row-height="true"/>
    </style:style>
    <style:style style:name="ro6" style:family="table-row">
      <style:table-row-properties style:row-height="0.772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2244in" fo:break-before="auto" style:use-optimal-row-height="true"/>
    </style:style>
    <style:style style:name="ro9" style:family="table-row">
      <style:table-row-properties style:row-height="1.3756in" fo:break-before="auto" style:use-optimal-row-height="true"/>
    </style:style>
    <style:style style:name="ro10" style:family="table-row">
      <style:table-row-properties style:row-height="0.9228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1" table:number-columns-repeated="16378"/>
        <table:table-row table:style-name="ro1">
          <table:table-cell table:style-name="ce4" office:value-type="string" calcext:value-type="string">
            <text:p>Datums</text:p>
          </table:table-cell>
          <table:table-cell table:style-name="ce4" office:value-type="string" calcext:value-type="string">
            <text:p>Sasniedzamais rezultāts</text:p>
          </table:table-cell>
          <table:table-cell table:style-name="ce4" office:value-type="string" calcext:value-type="string">
            <text:p>Uzdots</text:p>
          </table:table-cell>
          <table:table-cell table:style-name="ce4" office:value-type="string" calcext:value-type="string">
            <text:p>Temats</text:p>
          </table:table-cell>
          <table:table-cell table:style-name="ce4" office:value-type="string" calcext:value-type="string">
            <text:p>Kopsavilkums</text:p>
          </table:table-cell>
          <table:table-cell/>
          <table:table-cell table:style-name="ce6" table:number-columns-repeated="16378"/>
        </table:table-row>
        <table:table-row table:style-name="ro2">
          <table:table-cell table:style-name="ce5" office:value-type="string" calcext:value-type="string">
            <text:p>1.09.2025</text:p>
          </table:table-cell>
          <table:table-cell table:style-name="ce5" office:value-type="string" calcext:value-type="string">
            <text:p>Skaitļu virknes. SR: zina, kas ir skaitļu virkne; kādi apzīmējumi tiek lietori skaitļu virknes pierakstīšanai.</text:p>
            <text:p><text:a xlink:href="https://app.soma.lv/v2/e-gramatas/matematika-9-klasei-3-dala/pdf?page=99" xlink:type="simple">https://app.soma.lv/v2/e-gramatas/matematika-9-klasei-3-dala/pdf?page=...</text:a>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.09.2025</text:p>
          </table:table-cell>
          <table:table-cell table:style-name="ce5" office:value-type="string" calcext:value-type="string">
            <text:p>Skaitļu virknes. SR: zina, kas ir skaitļu virkne; kādi apzīmējumi tiek lietori skaitļu virknes pierakstīšanai.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.09.2025</text:p>
          </table:table-cell>
          <table:table-cell table:style-name="ce5" office:value-type="string" calcext:value-type="string">
            <text:p>Skaitļu virknes. SR: zina, kas ir skaitļu virkne; kādi apzīmējumi tiek lietori skaitļu virknes pierakstīšanai.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.09.2025</text:p>
          </table:table-cell>
          <table:table-cell table:style-name="ce5" office:value-type="string" calcext:value-type="string">
            <text:p>Virknes. SR: prot pierakstīt vārdiski dotu skaitļu virkni.</text:p>
            <text:p><text:a xlink:href="https://app.soma.lv/v2/e-gramatas/matematika-9-klasei-3-dala/pdf?page=99" xlink:type="simple">https://app.soma.lv/v2/e-gramatas/matematika-9-klasei-3-dala/pdf?page=...</text:a></text:p>
          </table:table-cell>
          <table:table-cell table:style-name="ce5" office:value-type="string" calcext:value-type="string">
            <text:p><text:a xlink:href="https://app.soma.lv/v2/e-gramatas/matematika-9-klasei-3-dala/pdf?page=99" xlink:type="simple">https://app.soma.lv/v2/e-gramatas/matematika-9-klasei-3-dala/pdf?page=...</text:a></text:p>
            <text:p>Izlasīt teorētisko materiālu no 99.-104.lpp.</text:p>
            <text:p>5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1">
          <table:table-cell table:style-name="ce5" office:value-type="string" calcext:value-type="string">
            <text:p>3.09.2025</text:p>
          </table:table-cell>
          <table:table-cell table:style-name="ce5" office:value-type="string" calcext:value-type="string">
            <text:p>Virknes. SR: prot pierakstīt vārdiski dotu skaitļu virkni.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5.09.2025</text:p>
          </table:table-cell>
          <table:table-cell table:style-name="ce5" office:value-type="string" calcext:value-type="string">
            <text:p>Virknes pieraksta veidi. SR: prot aprēķināt virknes loceklūs, ka virkne ir uzdota rekurenti.</text:p>
            <text:p><text:a xlink:href="https://app.soma.lv/v2/e-gramatas/matematika-9-klasei-3-dala/pdf?page=106" xlink:type="simple">https://app.soma.lv/v2/e-gramatas/matematika-9-klasei-3-dala/pdf?page=...</text:a></text:p>
          </table:table-cell>
          <table:table-cell table:style-name="ce5" office:value-type="string" calcext:value-type="string">
            <text:p>pierakstu kladē pabeigt risināt 13.; 14.; 15.; 16.uzdevumu (105.lpp.)</text:p>
            <text:p><text:a xlink:href="https://app.soma.lv/v2/e-gramatas/matematika-9-klasei-3-dala/pdf?page=106" xlink:type="simple">https://app.soma.lv/v2/e-gramatas/matematika-9-klasei-3-dala/pdf?page=...</text:a></text:p>
            <text:p>8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8.09.2025</text:p>
          </table:table-cell>
          <table:table-cell table:style-name="ce5" office:value-type="string" calcext:value-type="string">
            <text:p>Virknes pieraksta veidi. SR: prot aprēķināt virknes locekļus, ka virkne ir dota vispārīgaā locekļa formula; prot attēlot virkni grafiski.</text:p>
            <text:p><text:a xlink:href="https://app.soma.lv/v2/e-gramatas/matematika-9-klasei-3-dala/pdf?page=106" xlink:type="simple">https://app.soma.lv/v2/e-gramatas/matematika-9-klasei-3-dala/pdf?page=...</text:a>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8.09.2025</text:p>
          </table:table-cell>
          <table:table-cell table:style-name="ce5" office:value-type="string" calcext:value-type="string">
            <text:p>Virknes pieraksta veidi. SR: atbilstoši aprakstam, prot izveidot virknes vispārīgā locekļa formulu.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8.09.2025</text:p>
          </table:table-cell>
          <table:table-cell table:style-name="ce5" office:value-type="string" calcext:value-type="string">
            <text:p>Skaitļu virknes īpašības. SR: nosaka virknes īpašības.</text:p>
          </table:table-cell>
          <table:table-cell table:style-name="ce5" office:value-type="string" calcext:value-type="string">
            <text:p>7.; 8.c; 9.ac; 11.; 12.; 13. (110.lpp.)</text:p>
            <text:p><text:a xlink:href="https://app.soma.lv/v2/e-gramatas/matematika-9-klasei-3-dala/pdf?page=106" xlink:type="simple">https://app.soma.lv/v2/e-gramatas/matematika-9-klasei-3-dala/pdf?page=...</text:a></text:p>
            <text:p>9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9.09.2025</text:p>
          </table:table-cell>
          <table:table-cell table:style-name="ce5" office:value-type="string" calcext:value-type="string">
            <text:p>Virknes pieraksta veidi. Virknes pieraksta veidi. SR: prot aprēķināt virknes locekļus, ka virkne ir uzdota rekurenti vai ar vispārīgā locekļa formulu; nosaka, vai dotais skaitlis ir virknes loceklis; uzraksta virknes vispārīgā locekļa formulu.</text:p>
          </table:table-cell>
          <table:table-cell table:style-name="ce5" office:value-type="string" calcext:value-type="string">
            <text:p>1.; 5.; 6 (115.lpp.)</text:p>
            <text:p><text:a xlink:href="https://app.soma.lv/v2/e-gramatas/matematika-9-klasei-3-dala/pdf?page=111" xlink:type="simple">https://app.soma.lv/v2/e-gramatas/matematika-9-klasei-3-dala/pdf?page=...</text:a></text:p>
            <text:p>10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0.09.2025</text:p>
          </table:table-cell>
          <table:table-cell table:style-name="ce5" office:value-type="string" calcext:value-type="string">
            <text:p>Virknes īpašības. SR: nosaka un pierāda, ka virkne ir augoša (dilstoša).</text:p>
          </table:table-cell>
          <table:table-cell table:style-name="ce5" office:value-type="string" calcext:value-type="string">
            <text:p>skatīt pievienoto failu</text:p>
            <text:p> 9kl-MD-10sept.pdf</text:p>
            <text:p>12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2.09.2025</text:p>
          </table:table-cell>
          <table:table-cell table:style-name="ce5" office:value-type="string" calcext:value-type="string">
            <text:p>Aritmētiskā progresija. SR: zina, kādu virkni sauc par aritmētisko progresiju, prot aprēķināt diferenci un prasītos virknes locekļus.</text:p>
            <text:p><text:a xlink:href="https://app.soma.lv/v2/e-gramatas/matematika-9-klasei-3-dala/pdf?page=116" xlink:type="simple">https://app.soma.lv/v2/e-gramatas/matematika-9-klasei-3-dala/pdf?page=...</text:a></text:p>
          </table:table-cell>
          <table:table-cell table:style-name="ce5" office:value-type="string" calcext:value-type="string">
            <text:p>3.ac; 6.a; 7.a; 9.c; 10.d; 11.b; 12.; 13.; 14.c (121.lpp.)</text:p>
            <text:p><text:a xlink:href="https://app.soma.lv/v2/e-gramatas/matematika-9-klasei-3-dala/pdf?page=116" xlink:type="simple">https://app.soma.lv/v2/e-gramatas/matematika-9-klasei-3-dala/pdf?page=...</text:a></text:p>
            <text:p>15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5.09.2025</text:p>
          </table:table-cell>
          <table:table-cell table:style-name="ce5" office:value-type="string" calcext:value-type="string">
            <text:p>Aritmētiskā progresija. SR: pierāda, ka dotā virkne ir aritmētiskā progresija.</text:p>
            <text:p><text:a xlink:href="https://app.soma.lv/v2/e-gramatas/matematika-9-klasei-3-dala/pdf?page=116" xlink:type="simple">https://app.soma.lv/v2/e-gramatas/matematika-9-klasei-3-dala/pdf?page=...</text:a>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5.09.2025</text:p>
          </table:table-cell>
          <table:table-cell table:style-name="ce5" office:value-type="string" calcext:value-type="string">
            <text:p>Aritmētiskā progresija. SR: prot lietot aritmētiskās progresijas vispārīgā locekļa formulu- aprēķina diferenci un prasītos virknes locekļus.</text:p>
            <text:p><text:a xlink:href="https://app.soma.lv/v2/e-gramatas/matematika-9-klasei-3-dala/pdf?page=116" xlink:type="simple">https://app.soma.lv/v2/e-gramatas/matematika-9-klasei-3-dala/pdf?page=...</text:a>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15.09.2025</text:p>
          </table:table-cell>
          <table:table-cell table:style-name="ce5" office:value-type="string" calcext:value-type="string">
            <text:p>Aritmētiskā progresija. SR: prot lietot aritmētiskās progresijas vispārīgā locekļa formulu- aprēķina diferenci un prasītos virknes locekļus.</text:p>
            <text:p><text:a xlink:href="https://app.soma.lv/v2/e-gramatas/matematika-9-klasei-3-dala/pdf?page=116" xlink:type="simple">https://app.soma.lv/v2/e-gramatas/matematika-9-klasei-3-dala/pdf?page=...</text:a></text:p>
          </table:table-cell>
          <table:table-cell table:style-name="ce5" office:value-type="string" calcext:value-type="string">
            <text:p>no 122.lpp. līdz 127.lpp.izlasīt teorētisko materiālu;</text:p>
            <text:p>atrisināt 10.; 12.d; 13.b; 15.cd; 18.; 19. (129.lpp.)</text:p>
            <text:p>16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6.09.2025</text:p>
          </table:table-cell>
          <table:table-cell table:style-name="ce5" office:value-type="string" calcext:value-type="string">
            <text:p>Aritmētiskā progresija. SR: prot lietot aritmētiskās progresijas vispārīgā locekļa formulu- aprēķina diferenci un prasītos virknes locekļus.</text:p>
            <text:p><text:a xlink:href="https://app.soma.lv/v2/e-gramatas/matematika-9-klasei-3-dala/pdf?page=116" xlink:type="simple">https://app.soma.lv/v2/e-gramatas/matematika-9-klasei-3-dala/pdf?page=...</text:a></text:p>
          </table:table-cell>
          <table:table-cell table:style-name="ce5" office:value-type="string" calcext:value-type="string">
            <text:p>Izlasīt 129.-134.lpp.; izpildīt 6.; 11.; 12. (136.lpp.)</text:p>
            <text:p><text:a xlink:href="https://app.soma.lv/v2/e-gramatas/matematika-9-klasei-3-dala/pdf?page=136" xlink:type="simple">https://app.soma.lv/v2/e-gramatas/matematika-9-klasei-3-dala/pdf?page=...</text:a></text:p>
            <text:p>17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17.09.2025</text:p>
          </table:table-cell>
          <table:table-cell table:style-name="ce5" office:value-type="string" calcext:value-type="string">
            <text:p>Aritmētiskā progresija. SR: prot lietot aritmētiskās progresijas vispārīgā locekļa formulu- aprēķina diferenci un prasītos virknes locekļus.</text:p>
            <text:p><text:a xlink:href="https://app.soma.lv/v2/e-gramatas/matematika-9-klasei-3-dala/pdf?page=116" xlink:type="simple">https://app.soma.lv/v2/e-gramatas/matematika-9-klasei-3-dala/pdf?page=...</text:a></text:p>
          </table:table-cell>
          <table:table-cell table:style-name="ce5" office:value-type="string" calcext:value-type="string">
            <text:p>izlasīt atkārtojumu par airtmētiskās progresijas pirmo n locekļu summu (142.-148.lpp.); atrisināt 2.; 3.; un 7. (149.lpp.)</text:p>
            <text:p><text:a xlink:href="https://app.soma.lv/v2/e-gramatas/matematika-9-klasei-3-dala/pdf?page=150" xlink:type="simple">https://app.soma.lv/v2/e-gramatas/matematika-9-klasei-3-dala/pdf?page=...</text:a></text:p>
            <text:p>19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19.09.2025</text:p>
          </table:table-cell>
          <table:table-cell table:style-name="ce5" office:value-type="string" calcext:value-type="string">
            <text:p>Aritmētiskās progresijas pirmo n locekļu summa. SR: prot lietot aritmētiskās progresijas pirmo n locekļu summas formulu- aprēķina summu, pirmo locekli, n-to virknes loceki.</text:p>
            <text:p><text:a xlink:href="https://app.soma.lv/v2/e-gramatas/matematika-9-klasei-3-dala/pdf?page=150" xlink:type="simple">https://app.soma.lv/v2/e-gramatas/matematika-9-klasei-3-dala/pdf?page=...</text:a></text:p>
          </table:table-cell>
          <table:table-cell table:style-name="ce5" office:value-type="string" calcext:value-type="string">
            <text:p><text:a xlink:href="https://app.soma.lv/v2/e-gramatas/matematika-9-klasei-3-dala/pdf?page=150" xlink:type="simple">https://app.soma.lv/v2/e-gramatas/matematika-9-klasei-3-dala/pdf?page=...</text:a></text:p>
            <text:p>10.-13. (149.lpp.) atrisināt uzdevumus pēc spējām; izlasīt 150.-154.lpp.; atrisināt 1.; 2.; 3. (155.lpp.)</text:p>
            <text:p>22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2.09.2025</text:p>
          </table:table-cell>
          <table:table-cell table:style-name="ce5" office:value-type="string" calcext:value-type="string">
            <text:p>Aritmētiskās progresijas pirmo n locekļu summa. SR: prot lietot aritmētiskās progresijas pirmo n locekļu summas formulu- aprēķina summu, pirmo locekli, n-to virknes loceki.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2.09.2025</text:p>
          </table:table-cell>
          <table:table-cell table:style-name="ce5" office:value-type="string" calcext:value-type="string">
            <text:p>Aritmētiskās progresijas pirmo n locekļu summa. SR: prot lietot aritmētiskās progresijas pirmo n locekļu summas formulu- aprēķina summu, pirmo locekli, n-to virknes loceki.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2.09.2025</text:p>
          </table:table-cell>
          <table:table-cell table:style-name="ce5" office:value-type="string" calcext:value-type="string">
            <text:p>Aritmētiskās progresijas pirmo n locekļu summa. SR: prot lietot aritmētiskās progresijas pirmo n locekļu summas formulu- aprēķina summu, pirmo locekli, n-to virknes loceki.</text:p>
            <text:p><text:a xlink:href="https://app.soma.lv/v2/e-gramatas/matematika-9-klasei-3-dala/pdf?page=156" xlink:type="simple">https://app.soma.lv/v2/e-gramatas/matematika-9-klasei-3-dala/pdf?page=...</text:a></text:p>
          </table:table-cell>
          <table:table-cell table:style-name="ce5" office:value-type="string" calcext:value-type="string">
            <text:p>6.d; 7.b; 9. 11. (160.lpp.); pēc izvēles 12. un 13. (160.lpp.)</text:p>
            <text:p><text:a xlink:href="https://app.soma.lv/v2/e-gramatas/matematika-9-klasei-3-dala/pdf?page=156" xlink:type="simple">https://app.soma.lv/v2/e-gramatas/matematika-9-klasei-3-dala/pdf?page=...</text:a></text:p>
            <text:p>23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3.09.2025</text:p>
          </table:table-cell>
          <table:table-cell table:style-name="ce5" office:value-type="string" calcext:value-type="string">
            <text:p>Aritmētiskās progresijas pirmo n locekļu summa. SR: prot lietot aritmētiskās progresijas pirmo n locekļu summas formulu- aprēķina summu, pirmo locekli, n-to virknes loceki.</text:p>
            <text:p><text:a xlink:href="https://app.soma.lv/v2/e-gramatas/matematika-9-klasei-3-dala/pdf?page=156" xlink:type="simple">https://app.soma.lv/v2/e-gramatas/matematika-9-klasei-3-dala/pdf?page=...</text:a></text:p>
          </table:table-cell>
          <table:table-cell table:style-name="ce5" office:value-type="string" calcext:value-type="string">
            <text:p>1.-6. uzd. (165.lpp.)</text:p>
            <text:p><text:a xlink:href="https://app.soma.lv/v2/e-gramatas/matematika-9-klasei-3-dala/pdf?page=161" xlink:type="simple">https://app.soma.lv/v2/e-gramatas/matematika-9-klasei-3-dala/pdf?page=...</text:a></text:p>
            <text:p>24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4.09.2025</text:p>
          </table:table-cell>
          <table:table-cell table:style-name="ce5" office:value-type="string" calcext:value-type="string">
            <text:p>Aritmētiskās progresijas pirmo n locekļu summa. SR: prot lietot aritmētiskās progresijas pirmo n locekļu summas formulu- aprēķina summu, pirmo locekli, n-to virknes loceki.</text:p>
          </table:table-cell>
          <table:table-cell table:style-name="ce5" office:value-type="string" calcext:value-type="string">
            <text:p>1.-3. (169.lpp.)</text:p>
            <text:p><text:a xlink:href="https://app.soma.lv/v2/e-gramatas/matematika-9-klasei-3-dala/pdf?page=166" xlink:type="simple">https://app.soma.lv/v2/e-gramatas/matematika-9-klasei-3-dala/pdf?page=...</text:a></text:p>
            <text:p>26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6.09.2025</text:p>
          </table:table-cell>
          <table:table-cell table:style-name="ce5" office:value-type="string" calcext:value-type="string">
            <text:p>Ģeometriskā progresija. SR: zina, kādu virkni sauc par ģeometrisko progresiju; prot aprēķināt kvocientu; prot aprēķināt prasīto virknes locekli.</text:p>
            <text:p><text:a xlink:href="https://app.soma.lv/v2/e-gramatas/matematika-d73567eb-120f-404d-9171-b852c6fa2173/pdf?page=129" xlink:type="simple">https://app.soma.lv/v2/e-gramatas/matematika-d73567eb-120f-404d-9171-b...</text:a></text:p>
          </table:table-cell>
          <table:table-cell table:style-name="ce5" office:value-type="string" calcext:value-type="string">
            <text:p>izlasīt teorētisko materiālu no 129.-139.lpp.</text:p>
            <text:p><text:a xlink:href="https://app.soma.lv/v2/e-gramatas/matematika-d73567eb-120f-404d-9171-b852c6fa2173/pdf?page=129" xlink:type="simple">https://app.soma.lv/v2/e-gramatas/matematika-d73567eb-120f-404d-9171-b...</text:a></text:p>
            <text:p>7.57.bf; 7.58.bf; 7.59.bf</text:p>
            <text:p>26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9.09.2025</text:p>
          </table:table-cell>
          <table:table-cell table:style-name="ce5" office:value-type="string" calcext:value-type="string">
            <text:p>Ģeometriskā progresija. SR: izmanto ģeometrisko progresiju praktiska satura un ģeometriska satura uzdevumos; prot aprēķināt kvocientu; prot aprēķināt prasīto virknes locekli.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9.09.2025</text:p>
          </table:table-cell>
          <table:table-cell table:style-name="ce5" office:value-type="string" calcext:value-type="string">
            <text:p>Ģeometriskā progresija. SR: izmanto ģeometrisko progresiju praktiska satura un ģeometriska satura uzdevumos; prot aprēķināt kvocientu; prot aprēķināt prasīto virknes locekli.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9.09.2025</text:p>
          </table:table-cell>
          <table:table-cell table:style-name="ce5" office:value-type="string" calcext:value-type="string">
            <text:p>Ģeometriskā progresija. SR: izmanto ģeometrisko progresiju praktiska satura un ģeometriska satura uzdevumos; prot aprēķināt kvocientu; prot aprēķināt prasīto virknes locekli.</text:p>
          </table:table-cell>
          <table:table-cell table:style-name="ce5" office:value-type="string" calcext:value-type="string">
            <text:p>170.lpp. 7.; 8.; 11.; 14.; 171.lpp. 17. un 18.</text:p>
            <text:p><text:a xlink:href="https://app.soma.lv/v2/e-gramatas/matematika-9-klasei-3-dala/pdf?page=170" xlink:type="simple">https://app.soma.lv/v2/e-gramatas/matematika-9-klasei-3-dala/pdf?page=...</text:a></text:p>
            <text:p>30.09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30.09.2025</text:p>
          </table:table-cell>
          <table:table-cell table:style-name="ce5" office:value-type="string" calcext:value-type="string">
            <text:p>Virknes. SR: izmanto virknes praktiska satura un ģeometriska satura uzdevumos; prot pamatot virknes īpašības.</text:p>
          </table:table-cell>
          <table:table-cell table:style-name="ce5" office:value-type="string" calcext:value-type="string">
            <text:p>gatavoties pārbaudes darbam par virknēm; 43.; 44.; 47.; 48. (173.lpp.)</text:p>
            <text:p><text:a xlink:href="https://app.soma.lv/v2/e-gramatas/matematika-9-klasei-3-dala/pdf?page=175" xlink:type="simple">https://app.soma.lv/v2/e-gramatas/matematika-9-klasei-3-dala/pdf?page=...</text:a></text:p>
            <text:p>1.10.2025</text:p>
          </table:table-cell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7">
          <table:table-cell table:style-name="ce5" office:value-type="string" calcext:value-type="string">
            <text:p>1.10.2025</text:p>
          </table:table-cell>
          <table:table-cell table:style-name="ce5" office:value-type="string" calcext:value-type="string">
            <text:p>Virknes. SR: saskata virknes veidošanas likumsakarības; apraksta virkni dažādos veidos (ar formulu, kur izmanto iepriekšējo virknes locekli un ar formulu, kur izmanto virknes locekļa numuru; ar tabulu; ar secīgu rindu; ar grafiku; kā modeli); izpēta doto virkni un izvirza hipotēzi par virknes vispārīgā locekļa formulu; aprēķina nākamos vai iepriekšējos virknes locekļus; noskaidro vai skaitlis ir dotajā virknē; aprēķina aritmētiskās progresijas diferenci, lietojot vispārīgā locekļa formulu,</text:p>
          </table:table-cell>
          <table:table-cell table:style-name="ce7"/>
          <table:table-cell table:style-name="ce7" office:value-type="string" calcext:value-type="string">
            <text:p>Virknes un progresijas.</text:p>
          </table:table-cell>
          <table:table-cell office:value-type="string" calcext:value-type="string">
            <text:p>1.temats</text:p>
          </table:table-cell>
          <table:table-cell/>
          <table:table-cell table:style-name="ce6" table:number-columns-repeated="16378"/>
        </table:table-row>
        <table:table-row table:style-name="ro2">
          <table:table-cell table:style-name="ce5" office:value-type="string" calcext:value-type="string">
            <text:p>3.10.2025</text:p>
          </table:table-cell>
          <table:table-cell table:style-name="ce5" office:value-type="string" calcext:value-type="string">
            <text:p>Proporcionāli nogriežņi. SR: zina, kādus nogriežņus sauc par proporcionāliem nogriežņiem; izmanto nogriežņu proporciju uzdevumos.</text:p>
          </table:table-cell>
          <table:table-cell table:style-name="ce7"/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6.10.2025</text:p>
          </table:table-cell>
          <table:table-cell table:style-name="ce5" office:value-type="string" calcext:value-type="string">
            <text:p>Talesa teorēma. SR: zina Talesa teorēmu , izmanto to nogriežņa dalīšanā vienādās daļās.</text:p>
          </table:table-cell>
          <table:table-cell table:style-name="ce5" office:value-type="string" calcext:value-type="string">
            <text:p>No MG 48.-49.lpp. izlasīt teorētisko materiālu; uz stundu paņemt līdzi cirkuli un transportieri</text:p>
            <text:p>6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6.10.2025</text:p>
          </table:table-cell>
          <table:table-cell table:style-name="ce5" office:value-type="string" calcext:value-type="string">
            <text:p>Proporcionāli nogriežņi. SR: zina, kādus nogriežņus sauc par proporcionāliem nogriežņiem; izmanto nogriežņu proporciju uzdevumos.</text:p>
          </table:table-cell>
          <table:table-cell table:style-name="ce7"/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6.10.2025</text:p>
          </table:table-cell>
          <table:table-cell table:style-name="ce5" office:value-type="string" calcext:value-type="string">
            <text:p>Proporcionāli nogriežņi. SR: zina, kādus nogriežņus sauc par proporcionāliem nogriežņiem; izmanto nogriežņu proporciju uzdevumos.</text:p>
          </table:table-cell>
          <table:table-cell table:style-name="ce5" office:value-type="string" calcext:value-type="string">
            <text:p>Pārbaudes darba par virknēm kļūdu labojums</text:p>
            <text:p>7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7.10.2025</text:p>
          </table:table-cell>
          <table:table-cell table:style-name="ce5" office:value-type="string" calcext:value-type="string">
            <text:p>Pārbaudes darba par virknēm kļūdu analīze. SR: atrisina neatrisinātos pārbaudes darba uzdevumus.</text:p>
          </table:table-cell>
          <table:table-cell table:style-name="ce7"/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8.10.2025</text:p>
          </table:table-cell>
          <table:table-cell table:style-name="ce5" office:value-type="string" calcext:value-type="string">
            <text:p>Līdzīgi trijstūri. SR: zina, kas ir līdzīgi trijstūri un kas ir līdzības koeficients; prot uzralstīt atbilstošo malu attiecību.</text:p>
          </table:table-cell>
          <table:table-cell table:style-name="ce5" office:value-type="string" calcext:value-type="string">
            <text:p>No MG 54.-55.lpp. izlasīt par līdzīgiem trijstūriem; 13. bd (56.lpp.)</text:p>
            <text:p>10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0.10.2025</text:p>
          </table:table-cell>
          <table:table-cell table:style-name="ce5" office:value-type="string" calcext:value-type="string">
            <text:p>Līdzīgi trijstūri. SR: zina, kas ir līdzīgi trijstūri un kas ir līdzības koeficients; prot uzrakstīt atbilstošo malu attiecību; noskaidrot, vai trijstūri ar dotiem malu garumiem ir līdzīgi; prot aprēķināt nezināmo trijstūra malu; perimetru vai laukumu.</text:p>
          </table:table-cell>
          <table:table-cell table:style-name="ce5" office:value-type="string" calcext:value-type="string">
            <text:p>15.b.; 16.bd (57.lpp.)</text:p>
            <text:p>13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3.10.2025</text:p>
          </table:table-cell>
          <table:table-cell table:style-name="ce5" office:value-type="string" calcext:value-type="string">
            <text:p>Līdzīgi trijstūri. SR: zina, kas ir līdzīgi trijstūri un kas ir līdzības koeficients; prot uzrakstīt atbilstošo malu attiecību; noskaidrot, vai trijstūri ar dotiem malu garumiem ir līdzīgi; prot aprēķināt nezināmo trijstūra malu; perimetru vai laukumu.</text:p>
          </table:table-cell>
          <table:table-cell table:style-name="ce7"/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3.10.2025</text:p>
          </table:table-cell>
          <table:table-cell table:style-name="ce5" office:value-type="string" calcext:value-type="string">
            <text:p>Līdzīgi trijstūri. SR: zina, kas ir līdzīgi trijstūri un kas ir līdzības koeficients; prot uzrakstīt atbilstošo malu attiecību; noskaidrot, vai trijstūri ar dotiem malu garumiem ir līdzīgi; prot aprēķināt nezināmo trijstūra malu; perimetru vai laukumu.</text:p>
          </table:table-cell>
          <table:table-cell table:style-name="ce7"/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3.10.2025</text:p>
          </table:table-cell>
          <table:table-cell table:style-name="ce5" office:value-type="string" calcext:value-type="string">
            <text:p>Līdzīgi trijstūri. SR: zina, kas ir līdzīgi trijstūri un kas ir līdzības koeficients; prot uzrakstīt atbilstošo malu attiecību; noskaidrot, vai trijstūri ar dotiem malu garumiem ir līdzīgi; prot aprēķināt nezināmo trijstūra malu; perimetru vai laukumu.</text:p>
          </table:table-cell>
          <table:table-cell table:style-name="ce5" office:value-type="string" calcext:value-type="string">
            <text:p>31.; 33. (62.lpp.)</text:p>
            <text:p>14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4.10.2025</text:p>
          </table:table-cell>
          <table:table-cell table:style-name="ce5" office:value-type="string" calcext:value-type="string">
            <text:p>Patstāvīgais darbs- Līdzīgi trijstūri. SR: zina, kas ir līdzīgi trijstūri un kas ir līdzības koeficients; prot uzrakstīt atbilstošo malu attiecību; noskaidrot, vai trijstūri ar dotiem malu garumiem ir līdzīgi; prot aprēķināt nezināmo trijstūra malu; perimetru vai laukumu.</text:p>
          </table:table-cell>
          <table:table-cell table:style-name="ce5" office:value-type="string" calcext:value-type="string">
            <text:p>34.; 35. (62.-63.lpp.)</text:p>
            <text:p>15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5.10.2025</text:p>
          </table:table-cell>
          <table:table-cell table:style-name="ce5" office:value-type="string" calcext:value-type="string">
            <text:p>Trijstūru līdzības pazīmes. SR; zina trijstūru līdzības pazīmes; pamato, vai trijstūri ir līdzīgi.; aprēķina līdzīgu trijstūru nezināmās malas, perimetru un laukumu.</text:p>
          </table:table-cell>
          <table:table-cell table:style-name="ce5" office:value-type="string" calcext:value-type="string">
            <text:p>43.; 44. (63.lpp.)</text:p>
            <text:p>17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7.10.2025</text:p>
          </table:table-cell>
          <table:table-cell table:style-name="ce5" office:value-type="string" calcext:value-type="string">
            <text:p>Trijstūru līdzības pazīmes. SR; zina trijstūru līdzības pazīmes; pamato, vai trijstūri ir līdzīgi.; aprēķina līdzīgu trijstūru nezināmās malas, perimetru un laukumu.</text:p>
          </table:table-cell>
          <table:table-cell table:style-name="ce5" office:value-type="string" calcext:value-type="string">
            <text:p>no stundā izdalītās lapas atrisināt pirmos 4 uzdevumus (skatīt pievienoto failu)</text:p>
            <text:p> 9kl-DL-lidzigi trijsturi.pdf</text:p>
            <text:p>20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7.10.2025</text:p>
          </table:table-cell>
          <table:table-cell table:style-name="ce5" office:value-type="string" calcext:value-type="string">
            <text:p>Trijstūru līdzības pazīmes. SR; zina trijstūru līdzības pazīmes; pamato, vai trijstūri ir līdzīgi.; aprēķina līdzīgu trijstūru nezināmās malas, perimetru un laukumu.</text:p>
          </table:table-cell>
          <table:table-cell table:style-name="ce7"/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7.10.2025</text:p>
          </table:table-cell>
          <table:table-cell table:style-name="ce5" office:value-type="string" calcext:value-type="string">
            <text:p>Trijstūru līdzības pazīmes. SR; zina trijstūru līdzības pazīmes; pamato, vai trijstūri ir līdzīgi.; aprēķina līdzīgu trijstūru nezināmās malas, perimetru un laukumu.</text:p>
          </table:table-cell>
          <table:table-cell table:style-name="ce7"/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7.10.2025</text:p>
          </table:table-cell>
          <table:table-cell table:style-name="ce5" office:value-type="string" calcext:value-type="string">
            <text:p>Trijstūru līdzības pazīmes. SR; zina trijstūru līdzības pazīmes; pamato, vai trijstūri ir līdzīgi.; aprēķina līdzīgu trijstūru nezināmās malas, perimetru un laukumu.</text:p>
          </table:table-cell>
          <table:table-cell table:style-name="ce5" office:value-type="string" calcext:value-type="string">
            <text:p>no pievienotā faila otrās puses 7., 8. un 9. (10. un 11.pēc izvēles)</text:p>
            <text:p> 9kl-DL-lidzigi trijsturi-2.pdf</text:p>
            <text:p>28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8.10.2025</text:p>
          </table:table-cell>
          <table:table-cell table:style-name="ce5" office:value-type="string" calcext:value-type="string">
            <text:p>Praktiska satura uzdevumi, kuros jāizmanto trijstūru līdzība. SR: izveido situācijai atbilstošu matemātisko modeli; izmantojot trijstūru līdzību, aprēķina prasītos lielumus.</text:p>
          </table:table-cell>
          <table:table-cell table:style-name="ce5" office:value-type="string" calcext:value-type="string">
            <text:p>gatavoties pārbaudes darbam par līdzīgiem trijstūriem</text:p>
            <text:p> 9kl-DL-prakt-uzd-lidziba.pdf</text:p>
            <text:p>29.10.2025</text:p>
          </table:table-cell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8">
          <table:table-cell table:style-name="ce5" office:value-type="string" calcext:value-type="string">
            <text:p>29.10.2025</text:p>
          </table:table-cell>
          <table:table-cell table:style-name="ce5" office:value-type="string" calcext:value-type="string">
            <text:p>Līdzīgi trijstūri. SR: zina, kas ir proporcija un proporcionāli nogriežņi;  aprēķina proporcionālu nogriežņu garumu; zina, kas ir līdzīgi trijstūri un kas ir trijstūru līdzības koeficients; zina, kāda sakarība pastāv starp līdzīgu trijstūru malām, perimetriem un laukumiem; izmanto sakarības, kas pastāv līdzīgos trijstūros, lai aprēķināt trijstūra malu , perimetru vai laukumu; zina, kādas ir trijstūru līdzības pazīmes un izmanto tās, lai pierādītu trijstūru līdzību.</text:p>
          </table:table-cell>
          <table:table-cell table:style-name="ce7"/>
          <table:table-cell table:style-name="ce7" office:value-type="string" calcext:value-type="string">
            <text:p>Līdzīgi trijstūri.</text:p>
          </table:table-cell>
          <table:table-cell office:value-type="string" calcext:value-type="string">
            <text:p>2.temats</text:p>
          </table:table-cell>
          <table:table-cell/>
          <table:table-cell table:style-name="ce6" table:number-columns-repeated="16378"/>
        </table:table-row>
        <table:table-row table:style-name="ro2">
          <table:table-cell table:style-name="ce5" office:value-type="string" calcext:value-type="string">
            <text:p>31.10.2025</text:p>
          </table:table-cell>
          <table:table-cell table:style-name="ce5" office:value-type="string" calcext:value-type="string">
            <text:p>Trijstūra viduslīnija. SR: zina, kas ir trijhstūra viduslīnija; lieto trijstūra viduslīnijas īpašības; zina un lieto trijstūra viduslīnijas pazīmi.</text:p>
            <text:p><text:a xlink:href="https://app.soma.lv/v2/e-gramatas/matematika-9-klasei-1-dala-2024-13c0ce7b-2ee1-475a-9a34-368f06cb057d/pdf?page=177" xlink:type="simple">https://app.soma.lv/v2/e-gramatas/matematika-9-klasei-1-dala-2024-13c0...</text:a></text:p>
          </table:table-cell>
          <table:table-cell table:style-name="ce5" office:value-type="string" calcext:value-type="string">
            <text:p>no uzdevumu lapām 10.; 11.; 13.</text:p>
            <text:p> 9kl-DL-trijstura-viduslinija.pdf</text:p>
            <text:p>3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3.11.2025</text:p>
          </table:table-cell>
          <table:table-cell table:style-name="ce5" office:value-type="string" calcext:value-type="string">
            <text:p>Trijstūra viduslīnija. SR: zina, kas ir trijhstūra viduslīnija; lieto trijstūra viduslīnijas īpašības; zina un lieto trijstūra viduslīnijas pazīmi.</text:p>
          </table:table-cell>
          <table:table-cell table:style-name="ce7"/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3.11.2025</text:p>
          </table:table-cell>
          <table:table-cell table:style-name="ce5" office:value-type="string" calcext:value-type="string">
            <text:p>Trijstūra viduslīnija. SR: zina, kas ir trijhstūra viduslīnija; lieto trijstūra viduslīnijas īpašības; zina un lieto trijstūra viduslīnijas pazīmi.</text:p>
          </table:table-cell>
          <table:table-cell table:style-name="ce7"/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3.11.2025</text:p>
          </table:table-cell>
          <table:table-cell table:style-name="ce5" office:value-type="string" calcext:value-type="string">
            <text:p>Trijstūra viduslīnija. SR: zina, kas ir trijhstūra viduslīnija; lieto trijstūra viduslīnijas īpašības; zina un lieto trijstūra viduslīnijas pazīmi.</text:p>
          </table:table-cell>
          <table:table-cell table:style-name="ce5" office:value-type="string" calcext:value-type="string">
            <text:p>Pārbaudes darba par līdzīgiem trijstūriem kļūdu labojums</text:p>
            <text:p>4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4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.</text:p>
          </table:table-cell>
          <table:table-cell table:style-name="ce5" office:value-type="string" calcext:value-type="string">
            <text:p>No pievienotā faila atrisināt pirmos 5 uzdevumus</text:p>
            <text:p> 9kl-DL-taisnl-trijsturi-1.pdf</text:p>
            <text:p>5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5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.</text:p>
          </table:table-cell>
          <table:table-cell table:style-name="ce5" office:value-type="string" calcext:value-type="string">
            <text:p>No pievienotā faila atrisināt otrās puses 11.; 12.; 13.; pēc izvēles atrisināt 14. un 15.</text:p>
            <text:p>7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7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.</text:p>
          </table:table-cell>
          <table:table-cell table:style-name="ce5" office:value-type="string" calcext:value-type="string">
            <text:p>No uzdevumu lapām trisināt pēdējos trīz uzdevumus (9.; 10.; 11.)</text:p>
            <text:p>8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8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; aprēķinos izmanto zinātniskoas kalkulatorus.</text:p>
          </table:table-cell>
          <table:table-cell table:style-name="ce7"/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8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; aprēķinos izmanto zinātniskoas kalkulatorus.</text:p>
          </table:table-cell>
          <table:table-cell table:style-name="ce5" office:value-type="string" calcext:value-type="string">
            <text:p>No stundā izdalītajām lapām (skatīt pievienoto failu) atrisināt pirmās lappuses (stabiņa) uzdevumus</text:p>
            <text:p> 9kl-DL-taisnl-trijsturi-2.pdf</text:p>
            <text:p>10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0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; aprēķinos izmanto zinātniskoas kalkulatorus.</text:p>
          </table:table-cell>
          <table:table-cell table:style-name="ce7"/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0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; aprēķinos izmanto zinātniskos kalkulatorus.</text:p>
          </table:table-cell>
          <table:table-cell table:style-name="ce5" office:value-type="string" calcext:value-type="string">
            <text:p>no pievienotā faila 3. stabiņa atrisināt pēdējos 4 uzdevumus</text:p>
            <text:p> 9kl-DL-taisnl-trijsturi-2.pdf</text:p>
            <text:p>11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0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; aprēķinos izmanto zinātniskoas kalkulatorus.</text:p>
          </table:table-cell>
          <table:table-cell table:style-name="ce7"/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1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; aprēķinos izmanto zinātniskos kalkulatorus.</text:p>
          </table:table-cell>
          <table:table-cell table:style-name="ce5" office:value-type="string" calcext:value-type="string">
            <text:p>no pievienotā faila 4. stabiņa atrisināt pēdējos 4 uzdevumus</text:p>
            <text:p> 9kl-DL-taisnl-trijsturi-2.pdf</text:p>
            <text:p>12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2.11.2025</text:p>
          </table:table-cell>
          <table:table-cell table:style-name="ce5" office:value-type="string" calcext:value-type="string">
            <text:p>Sakarības taisnleņķa trijstūrī. SR: zina un lieto Pitagora teorēmu, zina un lieto šaurā leņķa trigonometriskās attiecības; aprēķinos izmanto zinātniskos kalkulatorus.</text:p>
          </table:table-cell>
          <table:table-cell table:style-name="ce5" office:value-type="string" calcext:value-type="string">
            <text:p> 9kl-DL-taisnl-trijsturi-3.pdf</text:p>
            <text:p>14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4.11.2025</text:p>
          </table:table-cell>
          <table:table-cell table:style-name="ce5" office:value-type="string" calcext:value-type="string">
            <text:p>Taisnleņķa trijstūra izmantošana uzdevumos par četrstūriem. SR: aprēķina dažādu četrstūru elementus un laukumu, izmantojot sakarības taisnleņķa trijstūrī.</text:p>
          </table:table-cell>
          <table:table-cell table:style-name="ce5" office:value-type="string" calcext:value-type="string">
            <text:p>no pievienotā faila 3.stabiņa atrisināt pirmos 5 uzdevumus;</text:p>
            <text:p>17.11.2025</text:p>
          </table:table-cell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8">
          <table:table-cell table:style-name="ce5" office:value-type="string" calcext:value-type="string">
            <text:p>19.11.2025</text:p>
          </table:table-cell>
          <table:table-cell table:style-name="ce5" office:value-type="string" calcext:value-type="string">
            <text:p>Trijstūra viduslīnija un sakarības taisnleņķa trijstūros. SR: zina, kas ir trijstūra viduslīnija un tās īpašības; zina Pitagora teorēmu, lieto to taisnleņķa trijstūra malu aprēķināšanā un taisnleņķa trijstūra pamatošanā; zina, kas ir sinuss, kosinuss, tangenss, kotangens; lieto trigonometriskās sakarības malu un leņķu aprēķināšanā; aprēķinos izmanto zinātnisko kalkulatoru; zina un lieto trijstūra, taisnstūra, paralelograma, romba un trapeces laukuma aprēķināšanas formulas.</text:p>
            <text:p> </text:p>
          </table:table-cell>
          <table:table-cell table:style-name="ce7"/>
          <table:table-cell table:style-name="ce7" office:value-type="string" calcext:value-type="string">
            <text:p>Sakarības taisnleņķa trijstūrī. </text:p>
          </table:table-cell>
          <table:table-cell office:value-type="string" calcext:value-type="string">
            <text:p>3.temats</text:p>
          </table:table-cell>
          <table:table-cell/>
          <table:table-cell table:style-name="ce6" table:number-columns-repeated="16378"/>
        </table:table-row>
        <table:table-row table:style-name="ro2">
          <table:table-cell table:style-name="ce5" office:value-type="string" calcext:value-type="string">
            <text:p>21.11.2025</text:p>
          </table:table-cell>
          <table:table-cell table:style-name="ce5" office:value-type="string" calcext:value-type="string">
            <text:p>Taisnleņķa trijstūra izmantošana uzdevumos par četrstūriem. SR: aprēķina dažādu četrstūru elementus un laukumu, izmantojot sakarības taisnleņķa trijstūrī.</text:p>
          </table:table-cell>
          <table:table-cell table:style-name="ce5" office:value-type="string" calcext:value-type="string">
            <text:p>Pēdējā stabiņa 10.; 2. un 4. uzdevums</text:p>
            <text:p>24.11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4.11.2025</text:p>
          </table:table-cell>
          <table:table-cell table:style-name="ce5" office:value-type="string" calcext:value-type="string">
            <text:p>Kvadrātvienādojumi. SR: zina, kas ir kvadrātvienādojums; kas ir kvadrātvienādojuma sakne; atrisina nepilnos kvadrātvienādojumus.</text:p>
          </table:table-cell>
          <table:table-cell table:style-name="ce7"/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4.11.2025</text:p>
          </table:table-cell>
          <table:table-cell table:style-name="ce5" office:value-type="string" calcext:value-type="string">
            <text:p>Kvadrātvienādojumi. SR: zina, kas ir kvadrātvienādojums; kas ir kvadrātvienādojuma sakne; atrisina nepilnos kvadrātvienādojumus.</text:p>
          </table:table-cell>
          <table:table-cell table:style-name="ce7"/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4.11.2025</text:p>
          </table:table-cell>
          <table:table-cell table:style-name="ce5" office:value-type="string" calcext:value-type="string">
            <text:p>Kvadrātvienādojumi. SR: zina, kas ir kvadrātvienādojums; kas ir kvadrātvienādojuma sakne; atrisina nepilnos kvadrātvienādojumus.</text:p>
          </table:table-cell>
          <table:table-cell table:style-name="ce5" office:value-type="string" calcext:value-type="string">
            <text:p>Pabeigt risināt otrā stabiņa uzdevums</text:p>
            <text:p> 9kl-DL-kvadr-vienad-1.pdf</text:p>
            <text:p>25.11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5.11.2025</text:p>
          </table:table-cell>
          <table:table-cell table:style-name="ce5" office:value-type="string" calcext:value-type="string">
            <text:p>Kvadrātvienādojumi. SR: zina, kas ir kvadrātvienādojums; kas ir kvadrātvienādojuma sakne; atrisina nepilnos kvadrātvienādojumus.</text:p>
          </table:table-cell>
          <table:table-cell table:style-name="ce5" office:value-type="string" calcext:value-type="string">
            <text:p>3.stabiņa 5.; 6.; 7.; 8.uzdevumi</text:p>
            <text:p> 9kl-DL-kvadr-vienad-1.pdf</text:p>
            <text:p>26.11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6.11.2025</text:p>
          </table:table-cell>
          <table:table-cell table:style-name="ce5" office:value-type="string" calcext:value-type="string">
            <text:p>Kvadrātvienādojumi. SR: zina, kas ir kvadrātvienādojums; kas ir kvadrātvienādojuma sakne; atrisina nepilnos kvadrātvienādojumus.</text:p>
          </table:table-cell>
          <table:table-cell table:style-name="ce5" office:value-type="string" calcext:value-type="string">
            <text:p>No pievienotā faila 4.stabiņa atrisināt 5. un 6.uzdevumus.; pēc izvēles atrisināt 10.; 11.; 7.; 8.; 9.uzdevmus</text:p>
            <text:p>28.11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28.11.2025</text:p>
          </table:table-cell>
          <table:table-cell table:style-name="ce5" office:value-type="string" calcext:value-type="string">
            <text:p>Dažādu kvadrātvienādojumu risināšana. SR: izvēlas atbilstošako metodi un atrisina kvadrātvienādojumu.</text:p>
          </table:table-cell>
          <table:table-cell table:style-name="ce5" office:value-type="string" calcext:value-type="string">
            <text:p>1.stabiņa 6.; 7.; 8.uzdevumi, kur jāatrisina vienādojumi; pēc izvēles 8. un 9.uzdevums (abi ir pierādījuma uzdevumi)</text:p>
            <text:p> 9kl-DL-kvadr-vienad-2.pdf</text:p>
            <text:p>1.12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.12.2025</text:p>
          </table:table-cell>
          <table:table-cell table:style-name="ce5" office:value-type="string" calcext:value-type="string">
            <text:p>Kvadrātvienādojumu rizināšana izmantojot palīgvienādojumu. SR: kvadrātvienādojuma atrisināšanā izmanto palīgvienādojumu.</text:p>
          </table:table-cell>
          <table:table-cell table:style-name="ce7"/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.12.2025</text:p>
          </table:table-cell>
          <table:table-cell table:style-name="ce5" office:value-type="string" calcext:value-type="string">
            <text:p>Kvadrāttrinoma sadalīšna reizinātājos. SR: sadala kvadrāttrinomu reizinātājos.</text:p>
          </table:table-cell>
          <table:table-cell table:style-name="ce7"/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.12.2025</text:p>
          </table:table-cell>
          <table:table-cell table:style-name="ce5" office:value-type="string" calcext:value-type="string">
            <text:p>Kvadrātvienādojumi. SR: zina, kas ir kvadrātvienādojums; kas ir kvadrātvienādojuma sakne; atrisina nepilnos kvadrātvienādojumus.</text:p>
          </table:table-cell>
          <table:table-cell table:style-name="ce5" office:value-type="string" calcext:value-type="string">
            <text:p>2.stabiņa uzdevums; pabeigt 2.stabiņa 3.; 4.; 5.uzdevumus; 3.stabiņa 4. uzdevums</text:p>
            <text:p>2.12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.12.2025</text:p>
          </table:table-cell>
          <table:table-cell table:style-name="ce5" office:value-type="string" calcext:value-type="string">
            <text:p>Teksta uzdevumu risināšana. SR: izveido situācijai atbilstošu matemātisko modeli (sastāda vienādojumu) un atrisina teksta uzdevumu.</text:p>
          </table:table-cell>
          <table:table-cell table:style-name="ce5" office:value-type="string" calcext:value-type="string">
            <text:p>3.stabiņa uzdevumi</text:p>
            <text:p>3.12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3.12.2025</text:p>
          </table:table-cell>
          <table:table-cell table:style-name="ce5" office:value-type="string" calcext:value-type="string">
            <text:p>Teksta uzdevumu risināšana. SR: izveido situācijai atbilstošu matemātisko modeli (sastāda vienādojumu) un atrisina teksta uzdevumu.</text:p>
          </table:table-cell>
          <table:table-cell table:style-name="ce5" office:value-type="string" calcext:value-type="string">
            <text:p>4.stabiņa uzdevumi</text:p>
            <text:p>5.12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5.12.2025</text:p>
          </table:table-cell>
          <table:table-cell table:style-name="ce5" office:value-type="string" calcext:value-type="string">
            <text:p>Kvadrātfunkcijas. SR: no dotā funkcijas grafika nosaka kvadrātfunkcijas īpašības.</text:p>
          </table:table-cell>
          <table:table-cell table:style-name="ce5" office:value-type="string" calcext:value-type="string">
            <text:p>no pievienoatā faila 2.uzdevums</text:p>
            <text:p> 9kl-DL-kvadr-fja-1.pdf</text:p>
            <text:p>8.12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8.12.2025</text:p>
          </table:table-cell>
          <table:table-cell table:style-name="ce5" office:value-type="string" calcext:value-type="string">
            <text:p>Kvadrātfunkcijas grafika konstruēšana un īpašību noteikšana. SR: nosakot kvadrātfunkcijas raksturīgos funktus, konstruē kvadrātfunkcijas grafiku; no grafika nosaka funkcijas īpašības.</text:p>
          </table:table-cell>
          <table:table-cell table:style-name="ce7"/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8.12.2025</text:p>
          </table:table-cell>
          <table:table-cell table:style-name="ce5" office:value-type="string" calcext:value-type="string">
            <text:p>Kvadrātfunkcijas grafika konstruēšana un īpašību noteikšana. SR: nosakot kvadrātfunkcijas raksturīgos funktus, konstruē kvadrātfunkcijas grafiku; no grafika nosaka funkcijas īpašības.</text:p>
          </table:table-cell>
          <table:table-cell table:style-name="ce7"/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8.12.2025</text:p>
          </table:table-cell>
          <table:table-cell table:style-name="ce5" office:value-type="string" calcext:value-type="string">
            <text:p>Kvadrātfunkcijas īpašību noteikšana. SR: atbilstoši dotajai informācijai, uzzīmē kvadrātfunkcijas grafika skici un nosaka prasītās funkcijas īpašības.</text:p>
          </table:table-cell>
          <table:table-cell table:style-name="ce5" office:value-type="string" calcext:value-type="string">
            <text:p>2. stabiņa 3.d; 3.stabiņa 4. c un 8.</text:p>
            <text:p> 9kl-DL-kvadr-fja-1.pdf</text:p>
            <text:p>9.12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9.12.2025</text:p>
          </table:table-cell>
          <table:table-cell table:style-name="ce5" office:value-type="string" calcext:value-type="string">
            <text:p>Kvadrātfunkcijas īpašību noteikšana. SR: atbilstoši dotajai informācijai, uzzīmē kvadrātfunkcijas grafika skici un nosaka prasītās funkcijas īpašības.</text:p>
          </table:table-cell>
          <table:table-cell table:style-name="ce5" office:value-type="string" calcext:value-type="string">
            <text:p>Gatavoties pārbaudes darbam par kvadrātvienādojumiem</text:p>
            <text:p>10.12.2025</text:p>
          </table:table-cell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9">
          <table:table-cell table:style-name="ce5" office:value-type="string" calcext:value-type="string">
            <text:p>10.12.2025</text:p>
          </table:table-cell>
          <table:table-cell table:style-name="ce5" office:value-type="string" calcext:value-type="string">
            <text:p>Kvadrātvienādojumi. SR: zina, kas ir kvadrātvienādojuma sakne; doto vienādojumu pārveido formā ax2+bx+c =0; atrisina nepilnos kvadrātvienādojumus (vienādojuma kreiso pusi sadalot reizinātājos; izsakot nezināmā kvadrātu); kvadrātvienādojuma risināšana izmanto Vjeta teorēmu un palīgvienādojumu; pilnos kvadrātvienādojumus atrisina izmantojot sakņu formulas; izmanto diskriminantu, lai noteiktu vienādojuma sakņu skaitu; kvadrāttrinomu sadala reizinātājos; atrisina teksta uzdevumu kā matemātisk</text:p>
          </table:table-cell>
          <table:table-cell table:style-name="ce7"/>
          <table:table-cell table:style-name="ce7" office:value-type="string" calcext:value-type="string">
            <text:p>Kvadrātfunkcijas.</text:p>
          </table:table-cell>
          <table:table-cell office:value-type="string" calcext:value-type="string">
            <text:p>4.temats</text:p>
          </table:table-cell>
          <table:table-cell/>
          <table:table-cell table:style-name="ce6" table:number-columns-repeated="16378"/>
        </table:table-row>
        <table:table-row table:style-name="ro7">
          <table:table-cell table:style-name="ce5" office:value-type="string" calcext:value-type="string">
            <text:p>10.12.2025</text:p>
          </table:table-cell>
          <table:table-cell table:style-name="ce5" office:value-type="string" calcext:value-type="string">
            <text:p>Kvadrātvienādojumi. SR: zina, kas ir kvadrātvienādojuma sakne; doto vienādojumu pārveido formā ax2+bx+c =0; atrisina nepilnos kvadrātvienādojumus (vienādojuma kreiso pusi sadalot reizinātājos; izsakot nezināmā kvadrātu); kvadrātvienādojuma risināšana izmanto Vjeta teorēmu un palīgvienādojumu; pilnos kvadrātvienādojumus atrisina izmantojot sakņu formulas; izmanto diskriminantu, lai noteiktu vienādojuma sakņu skaitu; kvadrāttrinomu sadala reizinātājos; atrisina teksta uzdevumu kā matemātisk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2.12.2025</text:p>
          </table:table-cell>
          <table:table-cell table:style-name="ce5" office:value-type="string" calcext:value-type="string">
            <text:p>Kvadrātfunkcijas izmantošana vienādojumu risināšanā. SR: izmanto funkciju grafikus, lai atrisinātu vienādojumu.</text:p>
            <text:p> 9kl-DL-kvadr-fjas-2.pdf</text:p>
          </table:table-cell>
          <table:table-cell table:style-name="ce5" office:value-type="string" calcext:value-type="string">
            <text:p>Pārbaudes darba par kvadrātvienādojumiem kļūdu labojums</text:p>
            <text:p>15.12.2025</text:p>
          </table:table-cell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15.12.2025</text:p>
          </table:table-cell>
          <table:table-cell table:style-name="ce5" office:value-type="string" calcext:value-type="string">
            <text:p>Kvadrātfunkcijas izmantošana uzdevumos ar praktisku vai ģeometrisku saturu. SR: izmanto kvadrātfunkciju kā procesa matemātisko modeli, lai atrisinātu praktiska vai ģeometriska satura uzdevumus.</text:p>
            <text:p> 9kl-DL-kvadr-fja-2.pdf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5.12.2025</text:p>
          </table:table-cell>
          <table:table-cell table:style-name="ce5" office:value-type="string" calcext:value-type="string">
            <text:p>Kvadrātfunkcijas izmantošana uzdevumos ar praktisku vai ģeometrisku saturu. SR: izmanto kvadrātfunkciju kā procesa matemātisko modeli, lai atrisinātu praktiska vai ģeometriska satura uzdevumus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10">
          <table:table-cell table:style-name="ce5" office:value-type="string" calcext:value-type="string">
            <text:p>15.12.2025</text:p>
          </table:table-cell>
          <table:table-cell table:style-name="ce5" office:value-type="string" calcext:value-type="string">
            <text:p>Kvadrātfunkcijas izmantošana uzdevumos ar praktisku vai ģeometrisku saturu. SR: izmanto kvadrātfunkciju kā procesa matemātisko modeli, lai atrisinātu praktiska vai ģeometriska satura uzdevumus.</text:p>
          </table:table-cell>
          <table:table-cell table:style-name="ce5" office:value-type="string" calcext:value-type="string">
            <text:p>no 2.uzd. lapas pēc izvēles 7.; 13. un 16.</text:p>
            <text:p>no 3.uzdevumu lapas no 1.stabiņa pirmie divi uzdevumi</text:p>
            <text:p> 9kl-DL-kvadr-fja-3.pdf</text:p>
            <text:p> 9kl-DL-kvadr-fjas-2.pdf</text:p>
            <text:p>16.12.2025</text:p>
          </table:table-cell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6.12.2025</text:p>
          </table:table-cell>
          <table:table-cell table:style-name="ce5" office:value-type="string" calcext:value-type="string">
            <text:p>Kvadrātfunkcijas izmantošana uzdevumos ar praktisku vai ģeometrisku saturu. SR: izmanto kvadrātfunkciju kā procesa matemātisko modeli, lai atrisinātu praktiska vai ģeometriska satura uzdevumus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7.12.2025</text:p>
          </table:table-cell>
          <table:table-cell table:style-name="ce5" office:value-type="string" calcext:value-type="string">
            <text:p>Veido praktiskas problēmas matemātisko modeli – kvadrātfunkciju vai kvadrātvienādojumu – un lieto zināšanas par kvadrātfunkciju un kvadrātvienādojumu, lai atrisinātu problēmu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9.12.2025</text:p>
          </table:table-cell>
          <table:table-cell table:style-name="ce5" office:value-type="string" calcext:value-type="string">
            <text:p>Veido praktiskas problēmas matemātisko modeli – kvadrātfunkciju vai kvadrātvienādojumu – un lieto zināšanas par kvadrātfunkciju un kvadrātvienādojumu, lai atrisinātu problēmu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5.01.2026</text:p>
          </table:table-cell>
          <table:table-cell table:style-name="ce5" office:value-type="string" calcext:value-type="string">
            <text:p>Kvadrātnevienādības. SR: zina, kas ir kvadrātnevienādības; izmantojot kvadrātfunkcijas grafiku, nosaka kvadrātnevienādības atrisinājumu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5.01.2026</text:p>
          </table:table-cell>
          <table:table-cell table:style-name="ce5" office:value-type="string" calcext:value-type="string">
            <text:p>Kvadrātnevienādības. SR: izveido kvadrātfunkcijas grafika skici un atrisina kvadrātnevienādības.</text:p>
          </table:table-cell>
          <table:table-cell table:style-name="ce5" office:value-type="string" calcext:value-type="string">
            <text:p>Atrisināt uzdevumus no pievienotā faila</text:p>
            <text:p> 9kl-md-5janv.pdf</text:p>
            <text:p>6.01.2026</text:p>
          </table:table-cell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6.01.2026</text:p>
          </table:table-cell>
          <table:table-cell table:style-name="ce5" office:value-type="string" calcext:value-type="string">
            <text:p>Patstāvīgais darbs. Kvadrātnevienādības. SR: izveido kvadrātfunkcijas grafika skici un atrisina kvadrātnevienādības.</text:p>
          </table:table-cell>
          <table:table-cell table:style-name="ce5" office:value-type="string" calcext:value-type="string">
            <text:p>Atrisināt uzdevumus no pievienotā faila</text:p>
            <text:p> 9kl-md-6janv.pdf</text:p>
            <text:p>7.01.2026</text:p>
          </table:table-cell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7.01.2026</text:p>
          </table:table-cell>
          <table:table-cell table:style-name="ce5" office:value-type="string" calcext:value-type="string">
            <text:p>Kvadrātnevienādības. SR: izveido kvadrātfunkcijas grafika skici un atrisina kvadrātnevienādības.</text:p>
            <text:p> 9kl-uzd-7janv.pdf</text:p>
          </table:table-cell>
          <table:table-cell table:style-name="ce5" office:value-type="string" calcext:value-type="string">
            <text:p>No pievienotā faila atrisināt 7. un 9. uzdevumu</text:p>
            <text:p> 9kl-uzd-7janv.pdf</text:p>
            <text:p>9.01.2026</text:p>
          </table:table-cell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9.01.2026</text:p>
          </table:table-cell>
          <table:table-cell table:style-name="ce5" office:value-type="string" calcext:value-type="string">
            <text:p>Teksta uzdevumi, kurus risina sastādot kvadrātnevienādības. SR: izveido matemātisko modeli (izmantojot kvadrātnevienādību) un aprēķina prasīto lielumu.</text:p>
          </table:table-cell>
          <table:table-cell table:style-name="ce5" office:value-type="string" calcext:value-type="string">
            <text:p>10.; 12. (pēc izvēles) un teksta uzdevumu 2.variants</text:p>
            <text:p> 9kl-teksta uzdevumi kvadrnev.pdf</text:p>
            <text:p>12.01.2026</text:p>
          </table:table-cell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9.01.2026</text:p>
          </table:table-cell>
          <table:table-cell table:style-name="ce5" office:value-type="string" calcext:value-type="string">
            <text:p>Kvadrātnevienādības. SR: izveido kvadrātfunkcijas grafika skici un atrisina kvadrātnevienādības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2.01.2026</text:p>
          </table:table-cell>
          <table:table-cell table:style-name="ce5" office:value-type="string" calcext:value-type="string">
            <text:p>Nevienādību sistēmas. SR; zina, kas ir nevienādību sistēma un tās atrisinājums; atrisina lineāru nevienādību sistēmas.</text:p>
          </table:table-cell>
          <table:table-cell table:style-name="ce5" office:value-type="string" calcext:value-type="string">
            <text:p>Atrisināt 2.varianta nevienādību sistēmas un divkāršās nevienādības</text:p>
            <text:p> 9kl-nevien-sist.pdf</text:p>
            <text:p>13.01.2026</text:p>
          </table:table-cell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2.01.2026</text:p>
          </table:table-cell>
          <table:table-cell table:style-name="ce5" office:value-type="string" calcext:value-type="string">
            <text:p>Nevienādību sistēmas. SR: atrisina nevienādību sistēmas, kuās ir lineāras un kvadrātnevienādības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3.01.2026</text:p>
          </table:table-cell>
          <table:table-cell table:style-name="ce5" office:value-type="string" calcext:value-type="string">
            <text:p>Nevienādību sistēmas. SR: atrisina nevienādību sistēmas, kuās ir lineāras un kvadrātnevienādības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10">
          <table:table-cell table:style-name="ce5" office:value-type="string" calcext:value-type="string">
            <text:p>14.01.2026</text:p>
          </table:table-cell>
          <table:table-cell table:style-name="ce5" office:value-type="string" calcext:value-type="string">
            <text:p>Teksta uzdevumi, kurus risina sastādot atbilstošu nevienādību sistēmu. Vevienādību pierādīšana. SR: atrisina teksta uzdevumu, kā matemātisko modeli izvēloties nevienādību sistēmu; pierāda nevienādību- izmantojot kvadrātnevienādību un atdalot pilno kvadrātu.</text:p>
            <text:p><text:a xlink:href="https://app.soma.lv/v2/e-gramatas/matematika-9-klasei-2-dala-2024-e3a75442-3bbf-436e-9ac9-8ae72c47edd8/pdf?page=252" xlink:type="simple">https://app.soma.lv/v2/e-gramatas/matematika-9-klasei-2-dala-2024-e3a7...</text:a></text:p>
          </table:table-cell>
          <table:table-cell table:style-name="ce5" office:value-type="string" calcext:value-type="string">
            <text:p>pēc izvēles risināt uzdevumus no <text:a xlink:href="https://app.soma.lv/v2/e-gramatas/matematika-9-klasei-2-dala-2024-e3a75442-3bbf-436e-9ac9-8ae72c47edd8/pdf?page=252" xlink:type="simple">https://app.soma.lv/v2/e-gramatas/matematika-9-klasei-2-dala-2024-e3a7...</text:a></text:p>
            <text:p>par nevienādību pierādīšanu</text:p>
            <text:p>16.01.2026</text:p>
          </table:table-cell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8">
          <table:table-cell table:style-name="ce5" office:value-type="string" calcext:value-type="string">
            <text:p>16.01.2026</text:p>
          </table:table-cell>
          <table:table-cell table:style-name="ce5" office:value-type="string" calcext:value-type="string">
            <text:p>Nevienādības un to sistēmas. SR: zina, kas ir nevienādība un tās atrisinājums; prot atrisināt lineāras nevienādības un kvadrātnevienādības; zina, kas ir nevienādību sistēma un tās atrisinājums; prot atrisināt nevienādību sistēmas, kurās in lineāras nevienādības; prot atrisināt nevienādību sistēmas, kurās ir kvadrātnevienādības; zina, kas ir divkārša nevienādība un tās atrisinājums; *prot divejādi atrisināt divkāršas nevienādības (izmantojot nevienādību īpašības un divkāršu nevienādību aizstājo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16.01.2026</text:p>
          </table:table-cell>
          <table:table-cell table:style-name="ce5" office:value-type="string" calcext:value-type="string">
            <text:p>Teksta uzdevumi, kurus risina sastādot atbilstošu nevienādību sistēmu. Vevienādību pierādīšana. SR: atrisina teksta uzdevumu, kā matemātisko modeli izvēloties nevienādību sistēmu; pierāda nevienādību- izmantojot kvadrātnevienādību un atdalot pilno kvadrātu.</text:p>
          </table:table-cell>
          <table:table-cell table:style-name="ce7"/>
          <table:table-cell table:style-name="ce7" office:value-type="string" calcext:value-type="string">
            <text:p>Nevienādības un to sistēmas.</text:p>
          </table:table-cell>
          <table:table-cell office:value-type="string" calcext:value-type="string">
            <text:p>5.temats</text:p>
          </table:table-cell>
          <table:table-cell/>
          <table:table-cell table:style-name="ce6" table:number-columns-repeated="16378"/>
        </table:table-row>
        <table:table-row table:style-name="ro11">
          <table:table-cell table:style-name="ce5" office:value-type="string" calcext:value-type="string">
            <text:p>19.01.2026</text:p>
          </table:table-cell>
          <table:table-cell table:style-name="ce5" office:value-type="string" calcext:value-type="string">
            <text:p>Vienādojumu sistēmas un vienādojumi ar diviem nezināmajiem. SR: zina, kas ir vienādojums ar diviem nezināmajiem; zina, kas ir vienādojuma atrisinājums; prot aprēķināt otra mainīgā vērtību; prot uzralkstīt vienādojumu, ja dots tā atrisinājums.</text:p>
          </table:table-cell>
          <table:table-cell table:style-name="ce7"/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9.01.2026</text:p>
          </table:table-cell>
          <table:table-cell table:style-name="ce5" office:value-type="string" calcext:value-type="string">
            <text:p>Vienādojumu sistēmas un vienādojumi ar diviem nezināmajiem. SR: zina, kas ir vienādojumu sistēma ar diviem nezināmajiem; zina, kas ir vienādojumu sistēmas atrisinājums; prot pārbaudīt, vai dotais skaitļu pāris ir vienādojuma atrisinājums.</text:p>
          </table:table-cell>
          <table:table-cell table:style-name="ce5" office:value-type="string" calcext:value-type="string">
            <text:p>27.bdfh (152.lpp.)</text:p>
            <text:p>20.01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0.01.2026</text:p>
          </table:table-cell>
          <table:table-cell table:style-name="ce5" office:value-type="string" calcext:value-type="string">
            <text:p>Vienādojums ar diviem nezināmajiem. SR: uzzīmē vienādojuma grafiku.</text:p>
          </table:table-cell>
          <table:table-cell table:style-name="ce5" office:value-type="string" calcext:value-type="string">
            <text:p>31.b un 32. (MG 153.lpp.)</text:p>
            <text:p>21.01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1.01.2026</text:p>
          </table:table-cell>
          <table:table-cell table:style-name="ce5" office:value-type="string" calcext:value-type="string">
            <text:p>Vienādojumu sistēmas. SR: nolasa vienādojumu sistēmas atrisinājumu no grafika.</text:p>
          </table:table-cell>
          <table:table-cell table:style-name="ce5" office:value-type="string" calcext:value-type="string">
            <text:p>pārbaudes darba par nevienādībām un nevienādību sistēmām kļūdu labojums</text:p>
            <text:p>23.01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3.01.2026</text:p>
          </table:table-cell>
          <table:table-cell table:style-name="ce5" office:value-type="string" calcext:value-type="string">
            <text:p>Vienādojumu sistēmas atrisināšana izmantojotfunkciju grafikus. SR: uzzīmē vienādojumu grafiku un nosaka vienādojumu sistēmas atrisinājumu.</text:p>
          </table:table-cell>
          <table:table-cell table:style-name="ce7"/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3.01.2026</text:p>
          </table:table-cell>
          <table:table-cell table:style-name="ce5" office:value-type="string" calcext:value-type="string">
            <text:p>Vienādojumu sistēmas atrisināšana izmantojotfunkciju grafikus. SR: uzzīmē vienādojumu grafiku un nosaka vienādojumu sistēmas atrisinājumu.</text:p>
          </table:table-cell>
          <table:table-cell table:style-name="ce5" office:value-type="string" calcext:value-type="string">
            <text:p>38.bdf (MG 155.lpp.)</text:p>
            <text:p>26.01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26.01.2026</text:p>
          </table:table-cell>
          <table:table-cell table:style-name="ce5" office:value-type="string" calcext:value-type="string">
            <text:p>Vienādojumu sistēmas atrisināšana izmantojot ievietošanas paņēmienu. SR: no viena vienādojuma izsaka vienu no nezināmajiem; ievieto otrā vienādojumā un aprēķina abu nezināmo vērtības.</text:p>
            <text:p> 9kl-vien-sist-grafiski.pdf</text:p>
          </table:table-cell>
          <table:table-cell table:style-name="ce5" office:value-type="string" calcext:value-type="string">
            <text:p>48.df; 49.b (MG 160.lpp.)</text:p>
            <text:p>27.01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6.01.2026</text:p>
          </table:table-cell>
          <table:table-cell table:style-name="ce5" office:value-type="string" calcext:value-type="string">
            <text:p>Patstāvīgais darbs- Vienādojumu sistēmas atrisināšana izmantojot funkciju grafikus. SR: uzzīmē vienādojumu grafiku un nosaka vienādojumu sistēmas atrisinājumu.</text:p>
          </table:table-cell>
          <table:table-cell table:style-name="ce7"/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7.01.2026</text:p>
          </table:table-cell>
          <table:table-cell table:style-name="ce5" office:value-type="string" calcext:value-type="string">
            <text:p>Vienādojumu sistēmas atrisināšana izmantojot funkciju grafikus. SR: uzzīmē vienādojumu grafiku un nosaka vienādojumu sistēmas atrisinājumu.</text:p>
          </table:table-cell>
          <table:table-cell table:style-name="ce5" office:value-type="string" calcext:value-type="string">
            <text:p>50.df; 51.df (MG 161.lpp.)</text:p>
            <text:p>28.01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8.01.2026</text:p>
          </table:table-cell>
          <table:table-cell table:style-name="ce5" office:value-type="string" calcext:value-type="string">
            <text:p>Patstāvīgais darbs- Vienādojumu sistēmas atrisināšana izmantojot ievietošanas paņēmienu. SR: no viena vienādojuma izsaka vienu no nezināmajiem; ievieto otrā vienādojumā un aprēķina abu nezināmo vērtības.</text:p>
          </table:table-cell>
          <table:table-cell table:style-name="ce5" office:value-type="string" calcext:value-type="string">
            <text:p>53.dfhjl (MG 161.lpp.)</text:p>
            <text:p>2.02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30.01.2026</text:p>
          </table:table-cell>
          <table:table-cell table:style-name="ce5" office:value-type="string" calcext:value-type="string">
            <text:p>Vienādojumu sistēmas atrisināšana izmantojot ievietošanas paņēmienu. SR: no viena vienādojuma izsaka vienu no nezināmajiem; ievieto otrā vienādojumā un aprēķina abu nezināmo vērtības.</text:p>
          </table:table-cell>
          <table:table-cell table:style-name="ce7"/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30.01.2026</text:p>
          </table:table-cell>
          <table:table-cell table:style-name="ce5" office:value-type="string" calcext:value-type="string">
            <text:p>Vienādojumu sistēmas. SR: vienādojumu sistēmu atrisina ar saskaitīšanas paņēmiemu.</text:p>
          </table:table-cell>
          <table:table-cell table:style-name="ce7"/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.02.2026</text:p>
          </table:table-cell>
          <table:table-cell table:style-name="ce5" office:value-type="string" calcext:value-type="string">
            <text:p>Vienādojumu sistēmas. SR: vienādojumu sistēmu atrisina ar saskaitīšanas paņēmiemu.</text:p>
          </table:table-cell>
          <table:table-cell table:style-name="ce7"/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.02.2026</text:p>
          </table:table-cell>
          <table:table-cell table:style-name="ce5" office:value-type="string" calcext:value-type="string">
            <text:p>Teksta uzdevumi. SR: Izveido vienādojumu sistēmu un atrisina teksta uzdevumu.</text:p>
          </table:table-cell>
          <table:table-cell table:style-name="ce5" office:value-type="string" calcext:value-type="string">
            <text:p>55. fh (MG 161.lpp.); 67.; 72.; 78. (MG 166.-167.lpp.)</text:p>
            <text:p>3.02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3.02.2026</text:p>
          </table:table-cell>
          <table:table-cell table:style-name="ce5" office:value-type="string" calcext:value-type="string">
            <text:p>Patstāvīgais darbs- Vienādojumu sistēmas un teksta uzdevumi. SR: ar saskaitīšanas paņēmienu atrisina vienādojumu sistēmu; izveido vienādojumu sistēmu un atrisina teksta uzdevumu.</text:p>
          </table:table-cell>
          <table:table-cell table:style-name="ce5" office:value-type="string" calcext:value-type="string">
            <text:p>no pievienotā faila 1.lappuses 1.; 2. 3. (11. un 12. pēc izvēles)</text:p>
            <text:p> 9-teksta-uzd-vien-sist.pdf</text:p>
            <text:p>4.02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4.02.2026</text:p>
          </table:table-cell>
          <table:table-cell table:style-name="ce5" office:value-type="string" calcext:value-type="string">
            <text:p>Lineāras vienādojumu sistēmas atrisināmumu skaits. SR: izmantojot tehnoloģijas zīmē vienādojumu grafikus un nosaka vienādojumu sistēmas atrisinājumu skaitu.</text:p>
          </table:table-cell>
          <table:table-cell table:style-name="ce5" office:value-type="string" calcext:value-type="string">
            <text:p>63.; 64.; 65. (MG 165.lpp.); pēc izvēles teksta uzdevumi no pievienotā faila</text:p>
            <text:p> 9-teksta-uzd-vien-sist.pdf</text:p>
            <text:p>6.02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8">
          <table:table-cell table:style-name="ce5" office:value-type="string" calcext:value-type="string">
            <text:p>6.02.2026</text:p>
          </table:table-cell>
          <table:table-cell table:style-name="ce5" office:value-type="string" calcext:value-type="string">
            <text:p>Vienādojumu sistēmas. SR: ar pārbaudes palīdzību noskaidro, vai dotais skaitlis (skaitļu pāris) ir vienādojuma vai vienādojumu sistēmas atrisinājums; vienādojumu sistēmas risina ar grafisko paņēmienu, ar ievietošanas paņēmienu un ar saskaitīšanas paņēmienu; vienādojumu sistēmas atrisināšanā izvēlas piemērotāko paņēmienu; situācijas modelēšanā izmanto vienādojumus vai to sistēmas; analizē un nosaka kādiem jābūt lineāras vienādojumu sistēmas koeficientiem, lai vienādojumu sistēmai būtu atrisin.</text:p>
          </table:table-cell>
          <table:table-cell table:style-name="ce7"/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8">
          <table:table-cell table:style-name="ce5" office:value-type="string" calcext:value-type="string">
            <text:p>6.02.2026</text:p>
          </table:table-cell>
          <table:table-cell table:style-name="ce5" office:value-type="string" calcext:value-type="string">
            <text:p>Vienādojumu sistēmas. SR: ar pārbaudes palīdzību noskaidro, vai dotais skaitlis (skaitļu pāris) ir vienādojuma vai vienādojumu sistēmas atrisinājums; vienādojumu sistēmas risina ar grafisko paņēmienu, ar ievietošanas paņēmienu un ar saskaitīšanas paņēmienu; vienādojumu sistēmas atrisināšanā izvēlas piemērotāko paņēmienu; situācijas modelēšanā izmanto vienādojumus vai to sistēmas; analizē un nosaka kādiem jābūt lineāras vienādojumu sistēmas koeficientiem, lai vienādojumu sistēmai būtu atrisin.</text:p>
          </table:table-cell>
          <table:table-cell table:style-name="ce5" office:value-type="string" calcext:value-type="string">
            <text:p>atrisināt 2025.gada matemātikas eksāmenu</text:p>
            <text:p>9.02.2026</text:p>
          </table:table-cell>
          <table:table-cell table:style-name="ce7" office:value-type="string" calcext:value-type="string">
            <text:p>Vienādojumu sistēmas.</text:p>
          </table:table-cell>
          <table:table-cell office:value-type="string" calcext:value-type="string">
            <text:p>6.temats</text:p>
          </table:table-cell>
          <table:table-cell/>
          <table:table-cell table:style-name="ce6" table:number-columns-repeated="16378"/>
        </table:table-row>
        <table:table-row table:style-name="ro12">
          <table:table-cell table:style-name="ce5" office:value-type="string" calcext:value-type="string">
            <text:p>9.02.2026</text:p>
          </table:table-cell>
          <table:table-cell table:style-name="ce5" office:value-type="string" calcext:value-type="string">
            <text:p>Pamatskolas matemātikas tēmu atkārtojums- 2025.gada CE matemātikā. SR: skolēmi atrisina 2025.gada CE matemātikā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9.02.2026</text:p>
          </table:table-cell>
          <table:table-cell table:style-name="ce5" office:value-type="string" calcext:value-type="string">
            <text:p>Pamatskolas matemātikas tēmu atkārtojums- 2025.gada CE matemātikā. SR: skolēmi atrisina 2025.gada CE matemātikā.</text:p>
          </table:table-cell>
          <table:table-cell table:style-name="ce5" office:value-type="string" calcext:value-type="string">
            <text:p>uz stundu paņemt līdzi cirkuli</text:p>
            <text:p>10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0.02.2026</text:p>
          </table:table-cell>
          <table:table-cell table:style-name="ce5" office:value-type="string" calcext:value-type="string">
            <text:p>Ar riņķi saistītas līnijas. SR: zina, kas ir riņķa rāduiss, diametrs, horda, pieskare un sekante; atpazīst šīs līnijas zīmējumā.</text:p>
          </table:table-cell>
          <table:table-cell table:style-name="ce5" office:value-type="string" calcext:value-type="string">
            <text:p>Pārbaudes darba par vienādojumu sistēmām kļūdu labojums</text:p>
            <text:p>11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1.02.2026</text:p>
          </table:table-cell>
          <table:table-cell table:style-name="ce5" office:value-type="string" calcext:value-type="string">
            <text:p>Ar riņķi saistītas līnijas. SR: zina, kas ir riņķa rādiuss, diametrs, horda, pieskare un sekante; atpazīst šīs līnijas zīmējumā.</text:p>
            <text:p> 9kl-uzd-piesk-sekante-11-febr.pdf</text:p>
          </table:table-cell>
          <table:table-cell table:style-name="ce5" office:value-type="string" calcext:value-type="string">
            <text:p>No pievienotā faila 5.6. un 5.7.</text:p>
            <text:p> 9kl-uzd-piesk-sekante-11-febr.pdf</text:p>
            <text:p>13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3.02.2026</text:p>
          </table:table-cell>
          <table:table-cell table:style-name="ce5" office:value-type="string" calcext:value-type="string">
            <text:p>Pieskare. SR: zina un lieto pieskares īpašību un pazīmi.</text:p>
            <text:p> 9kl-uzd-piesk-ipaiba-pazime.pdf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3.02.2026</text:p>
          </table:table-cell>
          <table:table-cell table:style-name="ce5" office:value-type="string" calcext:value-type="string">
            <text:p>Pieskare. SR: zina un lieto pieskares īpašību un pazīmi.</text:p>
            <text:p> 9kl-uzd-piesk-ipaiba-pazime.pdf</text:p>
          </table:table-cell>
          <table:table-cell table:style-name="ce5" office:value-type="string" calcext:value-type="string">
            <text:p>atrisināt 2025.gada iestājeksāmena uzdevumus (izdalītajās darba lapās)</text:p>
            <text:p>16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6.02.2026</text:p>
          </table:table-cell>
          <table:table-cell table:style-name="ce5" office:value-type="string" calcext:value-type="string">
            <text:p>Pamatskolas matemātikas tēmu atkārtojums-2025.gada iestējeksāmena uz Rīgas ģimnāzijām uzdevumu risināšana</text:p>
          </table:table-cell>
          <table:table-cell table:style-name="ce5" office:value-type="string" calcext:value-type="string">
            <text:p>Atrisināt 2024.gada CE matemātikā (skatīt pielikumu)</text:p>
            <text:p> 9-klase-matematika-2024.pdf</text:p>
            <text:p>23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6.02.2026</text:p>
          </table:table-cell>
          <table:table-cell table:style-name="ce5" office:value-type="string" calcext:value-type="string">
            <text:p>Pamatskolas matemātikas tēmu atkārtojums-2025.gada iestējeksāmena uz Rīgas ģimnāzijām uzdevumu risināšana</text:p>
          </table:table-cell>
          <table:table-cell table:style-name="ce5" office:value-type="string" calcext:value-type="string">
            <text:p>no pievienotā faila atrisināt 5.26. un 5.27.</text:p>
            <text:p> 9kl-uzd-piesk-ipaisba-pazime.pdf</text:p>
            <text:p>17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7.02.2026</text:p>
          </table:table-cell>
          <table:table-cell table:style-name="ce5" office:value-type="string" calcext:value-type="string">
            <text:p>Pieskare. SR: zina un lieto pieskares īpašību un pazīmi.</text:p>
          </table:table-cell>
          <table:table-cell table:style-name="ce5" office:value-type="string" calcext:value-type="string">
            <text:p>5.29. un 5.31.</text:p>
            <text:p> 9kl-uzd-piesk-ipaiba-pazime.pdf</text:p>
            <text:p>18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8.02.2026</text:p>
          </table:table-cell>
          <table:table-cell table:style-name="ce5" office:value-type="string" calcext:value-type="string">
            <text:p>Centra leņķis un ievilkts leņķis: SR: zina, kas ir centra leņķis un kas ie ievilkts leņķis; prot aprēķināt šo leņķu lielumus.</text:p>
            <text:p> 9kl-uzd-centra-ievilkts-lenkis.pdf</text:p>
          </table:table-cell>
          <table:table-cell table:style-name="ce5" office:value-type="string" calcext:value-type="string">
            <text:p><text:a xlink:href="https://maconis.zvaigzne.lv/produkts/96" xlink:type="simple">https://maconis.zvaigzne.lv/produkts/96 </text:a>no pievienotā faila 5.47. un 5.51.</text:p>
            <text:p> 9kl-uzd-centra-ievilkts-lenkis.pdf</text:p>
            <text:p>20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0.02.2026</text:p>
          </table:table-cell>
          <table:table-cell table:style-name="ce5" office:value-type="string" calcext:value-type="string">
            <text:p>Patstāvīgais darbs- Pieskare. SR: zina un lieto pieskares īpašību un pazīmi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0.02.2026</text:p>
          </table:table-cell>
          <table:table-cell table:style-name="ce5" office:value-type="string" calcext:value-type="string">
            <text:p>Centra leņķis un ievilkts leņķis: SR: zina, kas ir centra leņķis un kas ir ievilkts leņķis; prot aprēķināt šo leņķu lielumus.</text:p>
          </table:table-cell>
          <table:table-cell table:style-name="ce5" office:value-type="string" calcext:value-type="string">
            <text:p>5.50. un 5.57.</text:p>
            <text:p> 9kl-uzd-centra-ievilkts-lenkis.pdf</text:p>
            <text:p>24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3.02.2026</text:p>
          </table:table-cell>
          <table:table-cell table:style-name="ce5" office:value-type="string" calcext:value-type="string">
            <text:p>Pamatskolas matemātikas tēmu atkārtojums-2024.gada CE matemātikā uzdevumi. SR: prot atrisināt 2024.gada CE matemātikā uzdevumus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3.02.2026</text:p>
          </table:table-cell>
          <table:table-cell table:style-name="ce5" office:value-type="string" calcext:value-type="string">
            <text:p>Pamatskolas matemātikas tēmu atkārtojums-2024.gada CE matemātikā uzdevumi. SR: prot atrisināt 2024.gada CE matemātikā uzdevumus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4.02.2026</text:p>
          </table:table-cell>
          <table:table-cell table:style-name="ce5" office:value-type="string" calcext:value-type="string">
            <text:p>Ievilkts un apvilkts trijstūris: Zina,kas ir riņķa līnijā ievilkts un kas ir ap riņķa līniju apvilkts trijstūris. Konstruē ap trijstūri apvilktu riņķa līniju.</text:p>
          </table:table-cell>
          <table:table-cell table:style-name="ce5" office:value-type="string" calcext:value-type="string">
            <text:p>Atrisināt 2024.gada iestājeksāmena uzdevumus</text:p>
            <text:p>2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5.02.2026</text:p>
          </table:table-cell>
          <table:table-cell table:style-name="ce5" office:value-type="string" calcext:value-type="string">
            <text:p>Ievilkts un apvilkts trijstūris: Zina,kas ir riņķa līnijā ievilkts un kas ir ap riņķa līniju apvilkts trijstūris. Konstruē ap trijstūri apvilktu riņķa līniju.</text:p>
          </table:table-cell>
          <table:table-cell table:style-name="ce5" office:value-type="string" calcext:value-type="string">
            <text:p>no pievienotā faila 9. , 10. un 12.; paņemt cirkuli</text:p>
            <text:p> 9kl-ievilkti-trijst-1.pdf</text:p>
            <text:p>27.02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1">
          <table:table-cell table:style-name="ce5" office:value-type="string" calcext:value-type="string">
            <text:p>27.02.2026</text:p>
          </table:table-cell>
          <table:table-cell table:style-name="ce5" office:value-type="string" calcext:value-type="string">
            <text:p>Patstāvīgais darbs- SR:.konstruē ap trijstūri apvilktu riņķa līniju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7.02.2026</text:p>
          </table:table-cell>
          <table:table-cell table:style-name="ce5" office:value-type="string" calcext:value-type="string">
            <text:p>Ap taisnleņķa trijstūri apvilkta riņķa līnija: SR: Zina,kas ir ap taisnleņķa trijstūri apvilktas riņķa līnijas centrs un kā aprēķināt šīos riņķa līnijas rādiusu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.03.2026</text:p>
          </table:table-cell>
          <table:table-cell table:style-name="ce5" office:value-type="string" calcext:value-type="string">
            <text:p>Pamatskolas matemātikas tēmu atkārtojums- 2024.gada iestājeksāmens ģimnāzijās. SR: prot atrisināt 2024.gada iestājeksāmena ģimnāzijās matemātikā uzdevumus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.03.2026</text:p>
          </table:table-cell>
          <table:table-cell table:style-name="ce5" office:value-type="string" calcext:value-type="string">
            <text:p>Pamatskolas matemātikas tēmu atkārtojums-2024.gada iestājeksāmens ģimnāzijās. SR: prot atrisināt 2024.gada iestājeksāmena ģimnāzijās matemātikā uzdevumus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3.03.2026</text:p>
          </table:table-cell>
          <table:table-cell table:style-name="ce5" office:value-type="string" calcext:value-type="string">
            <text:p>Trijstūrī ievilkta riņķa līnija: SR: Zina, kas ir trijstūrī ievilktas riņķa līnijas centrs; prot konstruēt bisektrises un veic aprēķinus trijstūrī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3.03.2026</text:p>
          </table:table-cell>
          <table:table-cell table:style-name="ce5" office:value-type="string" calcext:value-type="string">
            <text:p>Trijstūrī ievilkta riņķa līnija: SR: Zina, kas ir trijstūrī ievilktas riņķa līnijas centrs; prot konstruēt bisektrises un veic aprēķinus trijstūrī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4.03.2026</text:p>
          </table:table-cell>
          <table:table-cell table:style-name="ce5" office:value-type="string" calcext:value-type="string">
            <text:p>Trijstūrī ievilkta riņķa līnija: SR: Zina, kas ir trijstūrī ievilktas riņķa līnijas centrs; prot konstruēt bisektrises un veic aprēķinus trijstūrī.</text:p>
          </table:table-cell>
          <table:table-cell table:style-name="ce5" office:value-type="string" calcext:value-type="string">
            <text:p> 9kl-trijst-ievilkti-rinki.pdf</text:p>
            <text:p>6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5.03.2026</text:p>
          </table:table-cell>
          <table:table-cell table:style-name="ce5" office:value-type="string" calcext:value-type="string">
            <text:p>Izmēģinājuma eksāmena darbs: SR: atrisina dažādus matemātikas uzdevumus par pamatskolas matemātikas kursu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6.03.2026</text:p>
          </table:table-cell>
          <table:table-cell table:style-name="ce5" office:value-type="string" calcext:value-type="string">
            <text:p>Trijstūrī ievilkta riņķa līnija: SR: Zina, kas ir trijstūrī ievilktas riņķa līnijas centrs; prot konstruēt bisektrises un veic aprēķinus trijstūrī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6.03.2026</text:p>
          </table:table-cell>
          <table:table-cell table:style-name="ce5" office:value-type="string" calcext:value-type="string">
            <text:p>Trijstūrī ievilkta riņķa līnija: SR: Zina, kas ir trijstūrī ievilktas riņķa līnijas centrs; prot konstruēt bisektrises un veic aprēķinus trijstūrī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6.03.2026</text:p>
          </table:table-cell>
          <table:table-cell table:style-name="ce5" office:value-type="string" calcext:value-type="string">
            <text:p>Vienādmalu trijstūrī ievilkta riņķa līnija un ao trijstūri apvilkta riņķa līnija: SR: zina, kas ir vienādmalu trijstūrī ievilktas riņķa līnijas centrs un apvilktas riņķa līnijas centrs; prot konstruēt vienādmalu trijstūrī ievilktu unapvilktu riņķa līniju un veic aprēķinus trijstūrī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16.03.2026</text:p>
          </table:table-cell>
          <table:table-cell table:style-name="ce5" office:value-type="string" calcext:value-type="string">
            <text:p>Vienādmalu trijstūrī ievilkta riņķa līnija un ao trijstūri apvilkta riņķa līnija: SR: zina, kas ir vienādmalu trijstūrī ievilktas riņķa līnijas centrs un apvilktas riņķa līnijas centrs; prot konstruēt vienādmalu trijstūrī ievilktu unapvilktu riņķa līniju un veic aprēķinus trijstūrī.</text:p>
            <text:p> 9kl-uzd-vienadmalu-trijst-ar-rinki.pdf</text:p>
          </table:table-cell>
          <table:table-cell table:style-name="ce5" office:value-type="string" calcext:value-type="string">
            <text:p>No pievienotā faila atrisināt 8. un 10.; pēc izvēles atrisināt 12.-15.</text:p>
            <text:p> 9kl-uzd-vienadmalu-trijst-ar-rinki.pdf</text:p>
            <text:p>17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17.03.2026</text:p>
          </table:table-cell>
          <table:table-cell table:style-name="ce5" office:value-type="string" calcext:value-type="string">
            <text:p>Patstāvīgais darbs- Vienādmalu trijstūrī ievilkta riņķa līnija un ao trijstūri apvilkta riņķa līnija: SR: zina, kas ir vienādmalu trijstūrī ievilktas riņķa līnijas centrs un apvilktas riņķa līnijas centrs; prot konstruēt vienādmalu trijstūrī ievilktu unapvilktu riņķa līniju un veic aprēķinus trijstūrī.</text:p>
          </table:table-cell>
          <table:table-cell table:style-name="ce5" office:value-type="string" calcext:value-type="string">
            <text:p>no pievienotā faila atrisināt 2.; 3. un 7.uzdevumus</text:p>
            <text:p>teorija <text:a xlink:href="https://app.soma.lv/v2/e-gramatas/matematika-9-klasei-3-dala/pdf?page=225" xlink:type="simple">https://app.soma.lv/v2/e-gramatas/matematika-9-klasei-3-dala/pdf?page=...</text:a></text:p>
            <text:p> 9kl-uzd-kvadr-rinkis.pdf</text:p>
            <text:p>18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8.03.2026</text:p>
          </table:table-cell>
          <table:table-cell table:style-name="ce5" office:value-type="string" calcext:value-type="string">
            <text:p>Kvadrātā ievilkta riņķa līnija un ap kvadrātu apvilkta riņķa līnija: SR: zina, kas ir kvadrātā ievilktas riņķa līnijas centrs un apvilktas riņķa līnijas centrs; prot aprēķināt riņķa līniju rādiusus.</text:p>
          </table:table-cell>
          <table:table-cell table:style-name="ce5" office:value-type="string" calcext:value-type="string">
            <text:p>no pievienotā faila 3., 4., 7. un 9.</text:p>
            <text:p> 9kl-uzd-taisnst-rinkis.pdf</text:p>
            <text:p>20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0.03.2026</text:p>
          </table:table-cell>
          <table:table-cell table:style-name="ce5" office:value-type="string" calcext:value-type="string">
            <text:p>Ap taisnstūri apvilkta riņķa līnija: SR: zina, kas ir ap taisnstūri apvilktas riņķa līnijas centrs; prot aprēķināt riņķa līnijas rādiusu.</text:p>
          </table:table-cell>
          <table:table-cell table:style-name="ce5" office:value-type="string" calcext:value-type="string">
            <text:p>Atrisināt 2023.gada CE matemātikā (skatīt pielikumu)</text:p>
            <text:p> 2023_matematika_9.pdf</text:p>
            <text:p>23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0.03.2026</text:p>
          </table:table-cell>
          <table:table-cell table:style-name="ce5" office:value-type="string" calcext:value-type="string">
            <text:p>Ap taisnstūri apvilkta riņķa līnija: SR: zina, kas ir ap taisnstūri apvilktas riņķa līnijas centrs; prot aprēķināt riņķa līnijas rādiusu.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3.03.2026</text:p>
          </table:table-cell>
          <table:table-cell table:style-name="ce5" office:value-type="string" calcext:value-type="string">
            <text:p>Pamatskolas matemātikas tēmu atkārtojums-2023.gada CE matemātikā uzdevumi. SR: prot atrisināt 2023.gada CE matemātikā uzdevumus</text:p>
          </table:table-cell>
          <table:table-cell table:style-name="ce5" office:value-type="string" calcext:value-type="string">
            <text:p>pabeigt risināt uzdevumus no izdalītajām darba lapām</text:p>
            <text:p> 9kl-DL-rinka-linija-loks.pdf</text:p>
            <text:p>24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3.03.2026</text:p>
          </table:table-cell>
          <table:table-cell table:style-name="ce5" office:value-type="string" calcext:value-type="string">
            <text:p>Pamatskolas matemātikas tēmu atkārtojums-2023.gada CE matemātikā uzdevumi. SR: prot atrisināt 2023.gada CE matemātikā uzdevumus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4.03.2026</text:p>
          </table:table-cell>
          <table:table-cell table:style-name="ce5" office:value-type="string" calcext:value-type="string">
            <text:p>Daudzstūra iekšējo leņķu summa; regulārs daudzstūris: SR: zina, kā aprēķina daudzstūra iekšējo leņķu summu; zinas, kas ir regulārs daudzstūris.</text:p>
          </table:table-cell>
          <table:table-cell table:style-name="ce5" office:value-type="string" calcext:value-type="string">
            <text:p>no pievienotā faila atrisināt 6.; 7. un 9.</text:p>
            <text:p> 9kl-uzd-regul-daudzst-rinkis.pdf</text:p>
            <text:p>25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25.03.2026</text:p>
          </table:table-cell>
          <table:table-cell table:style-name="ce5" office:value-type="string" calcext:value-type="string">
            <text:p>Regulārā daudzstūrī ievilkta riņķa līnija un ap regulāru daudzstūri apvilkta riņķa līnija: SR: zina, kas ir ievilktas riņķa līnijas centrs un apvilktas riņķa līnijas centrs; prot aprēķināt riņķa līniju rādiusus un leņķus daudzstūrī.</text:p>
          </table:table-cell>
          <table:table-cell table:style-name="ce5" office:value-type="string" calcext:value-type="string">
            <text:p>no pievienotā faila par regulāru daudzstūri atrisināt 8. 9. 10. 11. uzdevumu (pēc izvēles 12.; 13.; 14. uzdevumu)</text:p>
            <text:p> 9kl-uzd-regul-daudzst-rinkis.pdf</text:p>
            <text:p>27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9">
          <table:table-cell table:style-name="ce5" office:value-type="string" calcext:value-type="string">
            <text:p>27.03.2026</text:p>
          </table:table-cell>
          <table:table-cell table:style-name="ce5" office:value-type="string" calcext:value-type="string">
            <text:p>Riņķis un daudzstūris. SR: zina, kas ir centra leņķis un ievilkts leņķis, prot aprēķināt to lielumu; aprēķina riņķa līnijas garumu, loka garumu; aprēķina riņķa laukumu, sektora laukumu; zina, kas ir riņķī ievilkts daudzstūris un kas ir ap riņķi apvilkts daudzstūris; zina šo riņķu centru atrašanās vietu; prot to konstruēt; zina, kas ir regulārs daudzstūris, prot aprēķināt daudzstūra leņķu summu un regulāra daudzstūra leņķus; zina, kas ir riņķī ievilkts un kas ir ap riņķi apvilkts regurārs daudzst</text:p>
            <text:p> 9kl-uzd-rinki-daudzst.pdf</text:p>
          </table:table-cell>
          <table:table-cell table:style-name="ce5" office:value-type="string" calcext:value-type="string">
            <text:p>izdalītajās lapās atrisināt iestājeksāmena parauga uzdevumus</text:p>
            <text:p>30.03.2026</text:p>
          </table:table-cell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8">
          <table:table-cell table:style-name="ce5" office:value-type="string" calcext:value-type="string">
            <text:p>27.03.2026</text:p>
          </table:table-cell>
          <table:table-cell table:style-name="ce5" office:value-type="string" calcext:value-type="string">
            <text:p>Riņķis un daudzstūris. SR: zina, kas ir centra leņķis un ievilkts leņķis, prot aprēķināt to lielumu; aprēķina riņķa līnijas garumu, loka garumu; aprēķina riņķa laukumu, sektora laukumu; zina, kas ir riņķī ievilkts daudzstūris un kas ir ap riņķi apvilkts daudzstūris; zina šo riņķu centru atrašanās vietu; prot to konstruēt; zina, kas ir regulārs daudzstūris, prot aprēķināt daudzstūra leņķu summu un regulāra daudzstūra leņķus; zina, kas ir riņķī ievilkts un kas ir ap riņķi apvilkts regurārs daudzst</text:p>
          </table:table-cell>
          <table:table-cell table:style-name="ce7"/>
          <table:table-cell table:style-name="ce7" office:value-type="string" calcext:value-type="string">
            <text:p>Riņķis un daudzstūris.</text:p>
          </table:table-cell>
          <table:table-cell office:value-type="string" calcext:value-type="string">
            <text:p>7.temats</text:p>
          </table:table-cell>
          <table:table-cell/>
          <table:table-cell table:style-name="ce6" table:number-columns-repeated="16378"/>
        </table:table-row>
        <table:table-row table:style-name="ro2">
          <table:table-cell table:style-name="ce5" office:value-type="string" calcext:value-type="string">
            <text:p>30.03.2026</text:p>
          </table:table-cell>
          <table:table-cell table:style-name="ce5" office:value-type="string" calcext:value-type="string">
            <text:p>Pamatskolas matemātikas tēmu atkārtojums- 2023.gada iestājeksāmena matemātikā uzdevumi. SR: prot atrisināt 2023.gada iestājeksāmena matemātikā uzdevumus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30.03.2026</text:p>
          </table:table-cell>
          <table:table-cell table:style-name="ce5" office:value-type="string" calcext:value-type="string">
            <text:p>Pamatskolas matemātikas tēmu atkārtojums- Izmēģinājuma eksāmena matemātikā uzdevumi. SR: prot atrisināt RĀVĢ 2026.gada izmēģinājuma eksāmena matemātikā uzdevumus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31.03.2026</text:p>
          </table:table-cell>
          <table:table-cell table:style-name="ce5" office:value-type="string" calcext:value-type="string">
            <text:p>Algebriskas izteiksmes. SR: zina, kas ir algebriskas izteiksmes un kas ir skairliskas izteiksmes; zina, kas ir veselas izteiksmes un kas ir daļveida izteiksmes; zina, kas ir izteiksmes definīcijas apgabals; nosaka dotās izteiksmes definīcijas apgabalu.</text:p>
          </table:table-cell>
          <table:table-cell table:style-name="ce5" office:value-type="string" calcext:value-type="string">
            <text:p>1. un 2. uzdevums (MG 12.lpp.)</text:p>
            <text:p>1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.04.2026</text:p>
          </table:table-cell>
          <table:table-cell table:style-name="ce5" office:value-type="string" calcext:value-type="string">
            <text:p>Daļu saīsināšana: SR: saīsina skaitliskas daļas un algebriskas daļas.</text:p>
          </table:table-cell>
          <table:table-cell table:style-name="ce5" office:value-type="string" calcext:value-type="string">
            <text:p>atrisināt 2022.gada CE matemātikā uzdevumus</text:p>
            <text:p> 9kl_matematika_2022.pdf</text:p>
            <text:p>7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7.04.2026</text:p>
          </table:table-cell>
          <table:table-cell table:style-name="ce5" office:value-type="string" calcext:value-type="string">
            <text:p>Pamatskolas matemātikas tēmu atkārtojums: SR: atrisina 2022.gada iestājeksāmena uzdevumus</text:p>
          </table:table-cell>
          <table:table-cell table:style-name="ce5" office:value-type="string" calcext:value-type="string">
            <text:p> 9kl-iestajeks-2021-1lapa.pdf</text:p>
            <text:p> 9kl-iestajeks-2021-2lapa.pdf</text:p>
            <text:p>13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8.04.2026</text:p>
          </table:table-cell>
          <table:table-cell table:style-name="ce5" office:value-type="string" calcext:value-type="string">
            <text:p>Daļu saīsināšana: SR: saīsina skaitliskas daļas un algebriskas daļas.</text:p>
          </table:table-cell>
          <table:table-cell table:style-name="ce5" office:value-type="string" calcext:value-type="string">
            <text:p>Pārbaudes darba par riņķi un daudzstūri kļūdu labojums</text:p>
            <text:p>10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1">
          <table:table-cell table:style-name="ce5" office:value-type="string" calcext:value-type="string">
            <text:p>10.04.2026</text:p>
          </table:table-cell>
          <table:table-cell table:style-name="ce5" office:value-type="string" calcext:value-type="string">
            <text:p>Daļu saīsināšana: SR: saīsina algebriskas daļas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0.04.2026</text:p>
          </table:table-cell>
          <table:table-cell table:style-name="ce5" office:value-type="string" calcext:value-type="string">
            <text:p>Daļu saīsināšana: SR: saīsina algebriskas daļas.</text:p>
          </table:table-cell>
          <table:table-cell table:style-name="ce5" office:value-type="string" calcext:value-type="string">
            <text:p>23.fh; 24.d; 25.f; 26.b (MG 17.lpp.)</text:p>
            <text:p>14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3.04.2026</text:p>
          </table:table-cell>
          <table:table-cell table:style-name="ce5" office:value-type="string" calcext:value-type="string">
            <text:p>Daļu reizināšana un dalīšana: SR: algebriskas daļas sareizina un izdala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3.04.2026</text:p>
          </table:table-cell>
          <table:table-cell table:style-name="ce5" office:value-type="string" calcext:value-type="string">
            <text:p>Daļu reizināšana un dalīšana: SR: algebriskas daļas sareizina un izdala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4.04.2026</text:p>
          </table:table-cell>
          <table:table-cell table:style-name="ce5" office:value-type="string" calcext:value-type="string">
            <text:p>Patstāvīgais darbs- Daļu saīsināšana: SR: saīsina algebriskas daļas.</text:p>
            <text:p>Daļu reizināšana un dalīšana: SR: algebriskas daļas sareizina un izdala.</text:p>
          </table:table-cell>
          <table:table-cell table:style-name="ce5" office:value-type="string" calcext:value-type="string">
            <text:p>34.bdfhj; 35.b; 38.bdfhj (MG 25.lpp.)</text:p>
            <text:p>15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5.04.2026</text:p>
          </table:table-cell>
          <table:table-cell table:style-name="ce5" office:value-type="string" calcext:value-type="string">
            <text:p>Daļu reizināšana un dalīšana: SR: algebriskas daļas sareizina un izdala.</text:p>
          </table:table-cell>
          <table:table-cell table:style-name="ce5" office:value-type="string" calcext:value-type="string">
            <text:p>42. un 51.c, d, k, l (MG 26.lpp.)</text:p>
            <text:p>17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7.04.2026</text:p>
          </table:table-cell>
          <table:table-cell table:style-name="ce5" office:value-type="string" calcext:value-type="string">
            <text:p>Algebrisku daļu saskaitīšana un atņemšana. SR: saskaita un atņem atgebriskas daļas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7.04.2026</text:p>
          </table:table-cell>
          <table:table-cell table:style-name="ce5" office:value-type="string" calcext:value-type="string">
            <text:p>Algebrisku daļu saskaitīšana un atņemšana. SR: saskaita un atņem atgebriskas daļas.</text:p>
          </table:table-cell>
          <table:table-cell table:style-name="ce5" office:value-type="string" calcext:value-type="string">
            <text:p>atrisināt 2021.gada diagnosticējošā darba matemātikā uzdevumus</text:p>
            <text:p> 9kl_dd_matematika_2021.pdf</text:p>
            <text:p>20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0.04.2026</text:p>
          </table:table-cell>
          <table:table-cell table:style-name="ce5" office:value-type="string" calcext:value-type="string">
            <text:p>Darbības ar algebriskām daļām. SR: algebriskas daļas saskaita, atņem, reizina un dala.</text:p>
          </table:table-cell>
          <table:table-cell table:style-name="ce5" office:value-type="string" calcext:value-type="string">
            <text:p>atrisināt uzdevumus no pievienotā faila</text:p>
            <text:p> 9kl-MD-20-apr.pdf</text:p>
            <text:p>21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0.04.2026</text:p>
          </table:table-cell>
          <table:table-cell table:style-name="ce5" office:value-type="string" calcext:value-type="string">
            <text:p>Pamatskolas matemātikas tēmu atkārtojums: SR: atrisina 2021.gada diagnosticējošā darba uzdevumus</text:p>
          </table:table-cell>
          <table:table-cell table:style-name="ce5" office:value-type="string" calcext:value-type="string">
            <text:p>Atrisināt 2020.gada iestājeksāmena uzdevumus</text:p>
            <text:p> 9kl-iest-eks-2020-1.pdf</text:p>
            <text:p>27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1.04.2026</text:p>
          </table:table-cell>
          <table:table-cell table:style-name="ce5" office:value-type="string" calcext:value-type="string">
            <text:p>Patstāvīgais darbs- Darbības ar algebriskām daļām. SR: algebriskas daļas saskaita, atņem, reizina un dala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2.04.2026</text:p>
          </table:table-cell>
          <table:table-cell table:style-name="ce5" office:value-type="string" calcext:value-type="string">
            <text:p>Darbības ar algebriskām daļām. SR: algebriskas daļas saskaita, atņem, reizina un dala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1">
          <table:table-cell table:style-name="ce5" office:value-type="string" calcext:value-type="string">
            <text:p>24.04.2026</text:p>
          </table:table-cell>
          <table:table-cell table:style-name="ce5" office:value-type="string" calcext:value-type="string">
            <text:p>Daļveida vienādojumi. SR: atrisina daļveida vienādojumus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4.04.2026</text:p>
          </table:table-cell>
          <table:table-cell table:style-name="ce5" office:value-type="string" calcext:value-type="string">
            <text:p>Teksta uzdevumi. SR: sastāda vienādojumu un atrisina teksta uzdevumu -teksta uzdevumi par skaitļiem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7.04.2026</text:p>
          </table:table-cell>
          <table:table-cell table:style-name="ce5" office:value-type="string" calcext:value-type="string">
            <text:p>Teksta uzdevumi. SR: sastāda vienādojumu un atrisina teksta uzdevumu- teksta uzdevumi par plānoto un faktisko.</text:p>
          </table:table-cell>
          <table:table-cell table:style-name="ce5" office:value-type="string" calcext:value-type="string">
            <text:p>atrisināt 2019.gada CE matemātikā uzdevumus</text:p>
            <text:p> 9kl_matem_lv_2019.pdf</text:p>
            <text:p>8.05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7.04.2026</text:p>
          </table:table-cell>
          <table:table-cell table:style-name="ce5" office:value-type="string" calcext:value-type="string">
            <text:p>Teksta uzdevumi. SR: sastāda vienādojumu un atrisina teksta uzdevumu- teksta uzdevumi par kustību.</text:p>
          </table:table-cell>
          <table:table-cell table:style-name="ce5" office:value-type="string" calcext:value-type="string">
            <text:p>1.153.; 1.154.; 1.161.; 1.171.</text:p>
            <text:p>28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8.04.2026</text:p>
          </table:table-cell>
          <table:table-cell table:style-name="ce5" office:value-type="string" calcext:value-type="string">
            <text:p>Teksta uzdevumi. SR: sastāda vienādojumu un atrisina teksta uzdevumu- teksta uzdevumi par kopīgo darbu.</text:p>
            <text:p> 9kl-uzd-dalv-vien-teksta-uzdev.pdf</text:p>
          </table:table-cell>
          <table:table-cell table:style-name="ce5" office:value-type="string" calcext:value-type="string">
            <text:p>1.175.; 1.179.; 1.184.</text:p>
            <text:p>29.04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9.04.2026</text:p>
          </table:table-cell>
          <table:table-cell table:style-name="ce5" office:value-type="string" calcext:value-type="string">
            <text:p>Teksta uzdevumi. SR: sastāda vienādojumu un atrisina teksta uzdevumu- teksta uzdevumi par kopīgo darbu.</text:p>
          </table:table-cell>
          <table:table-cell table:style-name="ce5" office:value-type="string" calcext:value-type="string">
            <text:p>Gatavoties pārbaudes darbam par Daļveida izreiksmēm un vienādojumiem (MG 6.-35.lpp.); no MG 2.bh; 4bh; 5.ef; 6.bf</text:p>
            <text:p>5.05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10">
          <table:table-cell table:style-name="ce5" office:value-type="string" calcext:value-type="string">
            <text:p>5.05.2026</text:p>
          </table:table-cell>
          <table:table-cell table:style-name="ce5" office:value-type="string" calcext:value-type="string">
            <text:p>Darbības ar algebriskām daļām. SR: algebriskas daļas saskaita, atņem, reizina un dala ; teksta uzdevumos sastāda atbilstošu vienādojumu.</text:p>
          </table:table-cell>
          <table:table-cell table:style-name="ce5" office:value-type="string" calcext:value-type="string">
            <text:p>Gatavoties pārbaudes darbam par Daļveida izreiksmēm un vienādojumiem (MG 6.-35.lpp.); risināt uzdevumus no pievienota faila</text:p>
            <text:p> 9kl-md-5maijs.pdf</text:p>
            <text:p>6.05.2026</text:p>
          </table:table-cell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8">
          <table:table-cell table:style-name="ce5" office:value-type="string" calcext:value-type="string">
            <text:p>6.05.2026</text:p>
          </table:table-cell>
          <table:table-cell table:style-name="ce5" office:value-type="string" calcext:value-type="string">
            <text:p>Algebriskas daļas. SR: izvēlas atbilstošāko paņēmienu (kopīgā reizinātāja iznešana, saīsinātās reizināšanas formulas, grupēšana, kvadrāttrinoma sadalīšana reizinātājos) un sadala polinomu reizinātājos; nosaka algebriskas daļas definīcijas apgabalu; saīsina, saskaita, atņem, reizina un dala algebriskas daļas; nosaka daļveida vienādojuma definīcijas apgabalu; izvēlas atbilstošāko paņēmienu un atrisina daļveida vienādojumu; *situācijas modelēšanā izmanto daļveida vienādojumu.</text:p>
          </table:table-cell>
          <table:table-cell table:style-name="ce7"/>
          <table:table-cell table:style-name="ce7" office:value-type="string" calcext:value-type="string">
            <text:p>Algebriskas daļas.</text:p>
          </table:table-cell>
          <table:table-cell office:value-type="string" calcext:value-type="string">
            <text:p>8.temats</text:p>
          </table:table-cell>
          <table:table-cell/>
          <table:table-cell table:style-name="ce6" table:number-columns-repeated="16378"/>
        </table:table-row>
        <table:table-row table:style-name="ro13">
          <table:table-cell table:style-name="ce5" office:value-type="string" calcext:value-type="string">
            <text:p>8.05.2026</text:p>
          </table:table-cell>
          <table:table-cell table:style-name="ce5" office:value-type="string" calcext:value-type="string">
            <text:p>Pamatskolas matemātikas tēmu atkārtojums: SR: atrisina 2019.gada CE matemātikā uzdevumus</text:p>
          </table:table-cell>
          <table:table-cell table:style-name="ce5" office:value-type="string" calcext:value-type="string">
            <text:p>Atrisināt 2019.gada iestājeksāmena uzdevumus</text:p>
            <text:p> 9kl-iestajeks-atbildes (1).pdf</text:p>
            <text:p> 9kl-iestajeks-2019-1lapa.pdf</text:p>
            <text:p> 9kl-iestajeks-2019-2lapa (1).pdf</text:p>
            <text:p>11.05.2026</text:p>
          </table:table-cell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8.05.2026</text:p>
          </table:table-cell>
          <table:table-cell table:style-name="ce5" office:value-type="string" calcext:value-type="string">
            <text:p>Pamatskolas matemātikas tēmu atkārtojums: SR: atrisina 2019.gada CE matemātikā uzdevumus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11.05.2026</text:p>
          </table:table-cell>
          <table:table-cell table:style-name="ce5" office:value-type="string" calcext:value-type="string">
            <text:p>Pamatskolas matemātikas tēmu atkārtojums: SR: atrisina 2019.gada iestājeksāmena uzdevumus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1.05.2026</text:p>
          </table:table-cell>
          <table:table-cell table:style-name="ce5" office:value-type="string" calcext:value-type="string">
            <text:p>Pamatskolas matemātikas tēmu atkārtojums: SR: atrisina 2019.gada iestājeksāmena uzdevumus</text:p>
          </table:table-cell>
          <table:table-cell table:style-name="ce5" office:value-type="string" calcext:value-type="string">
            <text:p>atrisināt 2018.gada CE matemātikā uzdevumus</text:p>
            <text:p> 9kl_matem_lv_2018.pdf</text:p>
            <text:p>12.05.2026</text:p>
          </table:table-cell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2.05.2026</text:p>
          </table:table-cell>
          <table:table-cell table:style-name="ce5" office:value-type="string" calcext:value-type="string">
            <text:p>Pamatskolas matemātikas tēmu atkārtojums: SR: atrisina 2018.gada CE matemātikā uzdevumus</text:p>
          </table:table-cell>
          <table:table-cell table:style-name="ce5" office:value-type="string" calcext:value-type="string">
            <text:p>no pievienotā faila izpildīt 97., 98.ac, 99.cdeikl, 102., 103.</text:p>
            <text:p> 9kl-atk-funkcijas-2026.pdf</text:p>
            <text:p>13.05.2026</text:p>
          </table:table-cell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3.05.2026</text:p>
          </table:table-cell>
          <table:table-cell table:style-name="ce5" office:value-type="string" calcext:value-type="string">
            <text:p>Atkārtojums par funkcijām. SR: zīmē funkciju grafikus, nosaka funkciju īpašības.</text:p>
          </table:table-cell>
          <table:table-cell table:style-name="ce5" office:value-type="string" calcext:value-type="string">
            <text:p>no pievienotā faila izpildīt 108.; 111.; 112. un 113.</text:p>
            <text:p> 9kl-atk-funkcijas-2026.pdf</text:p>
            <text:p>15.05.2026</text:p>
          </table:table-cell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15.05.2026</text:p>
          </table:table-cell>
          <table:table-cell table:style-name="ce5" office:value-type="string" calcext:value-type="string">
            <text:p>Atkārtojums. SR: risina dažādus ģeometrijas uzdevumus.</text:p>
          </table:table-cell>
          <table:table-cell table:style-name="ce5" office:value-type="string" calcext:value-type="string">
            <text:p>atrisināt uzdevumus no pievienotā faila</text:p>
            <text:p> 9kl-pierad-kalkul.pdf</text:p>
            <text:p>18.05.2026</text:p>
          </table:table-cell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1">
          <table:table-cell table:style-name="ce5" office:value-type="string" calcext:value-type="string">
            <text:p>15.05.2026</text:p>
          </table:table-cell>
          <table:table-cell table:style-name="ce5" office:value-type="string" calcext:value-type="string">
            <text:p>Atkārtojums. SR: risina dažādus ģeometrijas uzdevumus.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1">
          <table:table-cell table:style-name="ce5" office:value-type="string" calcext:value-type="string">
            <text:p>18.05.2026</text:p>
          </table:table-cell>
          <table:table-cell table:style-name="ce5" office:value-type="string" calcext:value-type="string">
            <text:p>Atkārtojums. SR: risina dažādus ģeometrijas uzdevumus.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18.05.2026</text:p>
          </table:table-cell>
          <table:table-cell table:style-name="ce5" office:value-type="string" calcext:value-type="string">
            <text:p>Atkārtojums. SR: risina dažādus ģeometrijas uzdevumus.</text:p>
          </table:table-cell>
          <table:table-cell table:style-name="ce5" office:value-type="string" calcext:value-type="string">
            <text:p>risināt uzdevumus no pievienotajiem failiem</text:p>
            <text:p> Atkārtojums-virknes-2026.pdf</text:p>
            <text:p> Atkartojums-trapece-prizmas-2026-1.pdf</text:p>
            <text:p>19.05.2026</text:p>
          </table:table-cell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0.05.2026</text:p>
          </table:table-cell>
          <table:table-cell table:style-name="ce5" office:value-type="string" calcext:value-type="string">
            <text:p>Atkārtojums par kvadtātvienādojumiem un kvadrātnevienādībām. SR: atrisina dažāda veida kvadrātvienādojumus un kvadrātnevienādības.</text:p>
          </table:table-cell>
          <table:table-cell table:style-name="ce5" office:value-type="string" calcext:value-type="string">
            <text:p>risināt uzdevumus no pievienotā faila</text:p>
            <text:p> Atkartojums-kvadr-kvadrnev-2026.pdf</text:p>
            <text:p>22.05.2026</text:p>
          </table:table-cell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6">
          <table:table-cell table:style-name="ce5" office:value-type="string" calcext:value-type="string">
            <text:p>22.05.2026</text:p>
          </table:table-cell>
          <table:table-cell table:style-name="ce5" office:value-type="string" calcext:value-type="string">
            <text:p>Atkārtojums par teksta uzdevumiem. SR: izvēlas piemērotu matemātisko modeli un atrisina teksta uzdevumu.</text:p>
          </table:table-cell>
          <table:table-cell table:style-name="ce5" office:value-type="string" calcext:value-type="string">
            <text:p>risināt uzdevumus no pievienotajiem failiem</text:p>
            <text:p> Atkartojums-kombinat-2026.pdf</text:p>
            <text:p> 9kl-atk-polin-sadal-reizin-2026.pdf</text:p>
            <text:p> 9kl- text_daz-2026.pdf</text:p>
            <text:p>25.05.2026</text:p>
          </table:table-cell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4">
          <table:table-cell table:style-name="ce5" office:value-type="string" calcext:value-type="string">
            <text:p>25.05.2026</text:p>
          </table:table-cell>
          <table:table-cell table:style-name="ce5" office:value-type="string" calcext:value-type="string">
            <text:p>Atkārtojums- varbūtības. SR: risina uzdevumus par varbūtības aprēķināšanu.</text:p>
            <text:p> 9kl-atk-varbutibas.pdf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5.05.2026</text:p>
          </table:table-cell>
          <table:table-cell table:style-name="ce5" office:value-type="string" calcext:value-type="string">
            <text:p>Atkārtojums- statistika. SR: aprēķina statistiskos lielumus, zīmē diagrammas.</text:p>
            <text:p> 9kl-atk-kvadr-saknes.pdf</text:p>
            <text:p> 9kl-atk-statistika.pdf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7.05.2026</text:p>
          </table:table-cell>
          <table:table-cell table:style-name="ce5" office:value-type="string" calcext:value-type="string">
            <text:p>Atkārtojums- teksta uzdevumi. SR: risina dažādus teksta uzdevumus.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5">
          <table:table-cell table:style-name="ce5" office:value-type="string" calcext:value-type="string">
            <text:p>28.05.2026</text:p>
          </table:table-cell>
          <table:table-cell table:style-name="ce5" office:value-type="string" calcext:value-type="string">
            <text:p>Atkārtojums- teksta uzdevumi. SR: risina dažādus teksta uzdevumus.</text:p>
            <text:p> 9kl-atk-vien-nev-sist-2026.pdf</text:p>
            <text:p> 9kl-teksta-uzd-kons-1.pdf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9.05.2026</text:p>
          </table:table-cell>
          <table:table-cell table:style-name="ce5" office:value-type="string" calcext:value-type="string">
            <text:p>Atkārtojums- teksta uzdevumi. SR: risina dažādus teksta uzdevumus.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3">
          <table:table-cell table:style-name="ce5" office:value-type="string" calcext:value-type="string">
            <text:p>29.05.2026</text:p>
          </table:table-cell>
          <table:table-cell table:style-name="ce5" office:value-type="string" calcext:value-type="string">
            <text:p>Atkārtojums- teksta uzdevumi. SR: risina dažādus teksta uzdevumus.</text:p>
          </table:table-cell>
          <table:table-cell table:style-name="ce7"/>
          <table:table-cell table:style-name="ce7" office:value-type="string" calcext:value-type="string">
            <text:p>Nobeigums.</text:p>
          </table:table-cell>
          <table:table-cell office:value-type="string" calcext:value-type="string">
            <text:p>NA</text:p>
          </table:table-cell>
          <table:table-cell/>
          <table:table-cell table:style-name="ce6" table:number-columns-repeated="16378"/>
        </table:table-row>
        <table:table-row table:style-name="ro1" table:number-rows-repeated="1048373">
          <table:table-cell table:number-columns-repeated="6"/>
          <table:table-cell table:style-name="ce6" table:number-columns-repeated="16378"/>
        </table:table-row>
        <table:table-row table:style-name="ro1">
          <table:table-cell table:number-columns-repeated="6"/>
          <table:table-cell table:style-name="ce6" table:number-columns-repeated="16378"/>
        </table:table-row>
      </table:table>
      <table:named-expressions/>
      <table:database-ranges>
        <table:database-range table:name="__Anonymous_Sheet_DB__0" table:target-range-address="Sheet1.A1:Sheet1.XFD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4">00/00/0000</text:date>, <text:time style:data-style-name="N2" text:time-value="17:25:57.11350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3T13:46:11.948761900</meta:creation-date>
    <dc:date>2026-07-14T01:27:57.488362000</dc:date>
    <meta:editing-duration>PT2H47M13S</meta:editing-duration>
    <meta:editing-cycles>5</meta:editing-cycles>
    <meta:generator>LibreOffice/26.2.4.2$Windows_X86_64 LibreOffice_project/0229ac93fcf0d7cbc6376066c6f35021cef002dc</meta:generator>
    <meta:document-statistic meta:table-count="1" meta:cell-count="918" meta:object-count="0"/>
  </office:meta>
</office:document-meta>
</file>