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611in"/>
    </style:style>
    <style:style style:name="co3" style:family="table-column">
      <style:table-column-properties fo:break-before="auto" style:column-width="1.3098in"/>
    </style:style>
    <style:style style:name="co4" style:family="table-column">
      <style:table-column-properties fo:break-before="auto" style:column-width="1.2945in"/>
    </style:style>
    <style:style style:name="ro1" style:family="table-row">
      <style:table-row-properties style:row-height="0.178in" fo:break-before="auto" style:use-optimal-row-height="true"/>
    </style:style>
    <style:style style:name="ro2" style:family="table-row">
      <style:table-row-properties style:row-height="0.6362in" fo:break-before="auto" style:use-optimal-row-height="true"/>
    </style:style>
    <style:style style:name="ro3" style:family="table-row">
      <style:table-row-properties style:row-height="0.7917in" fo:break-before="auto" style:use-optimal-row-height="true"/>
    </style:style>
    <style:style style:name="ro4" style:family="table-row">
      <style:table-row-properties style:row-height="0.4807in" fo:break-before="auto" style:use-optimal-row-height="true"/>
    </style:style>
    <style:style style:name="ro5" style:family="table-row">
      <style:table-row-properties style:row-height="1.2583in" fo:break-before="auto" style:use-optimal-row-height="true"/>
    </style:style>
    <style:style style:name="ro6" style:family="table-row">
      <style:table-row-properties style:row-height="1.5693in" fo:break-before="auto" style:use-optimal-row-height="true"/>
    </style:style>
    <style:style style:name="ro7" style:family="table-row">
      <style:table-row-properties style:row-height="1.1028in" fo:break-before="auto" style:use-optimal-row-height="true"/>
    </style:style>
    <style:style style:name="ro8" style:family="table-row">
      <style:table-row-properties style:row-height="0.3256in" fo:break-before="auto" style:use-optimal-row-height="true"/>
    </style:style>
    <style:style style:name="ro9" style:family="table-row">
      <style:table-row-properties style:row-height="0.9472in" fo:break-before="auto" style:use-optimal-row-height="true"/>
    </style:style>
    <style:style style:name="ro10" style:family="table-row">
      <style:table-row-properties style:row-height="0.4866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1.4138in" fo:break-before="auto" style:use-optimal-row-height="true"/>
    </style:style>
    <style:style style:name="ro13" style:family="table-row">
      <style:table-row-properties style:row-height="0.95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dddddd"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dddddd"/>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style>
  </office:automatic-styles>
  <office:body>
    <office:spreadsheet>
      <table:calculation-settings table:automatic-find-labels="false" table:use-regular-expressions="false" table:use-wildcards="true" table:null-year="1950"/>
      <table:table table:name="Sheet1" table:style-name="ta1">
        <table:table-column table:style-name="co1" table:number-columns-repeated="8" table:default-cell-style-name="Default"/>
        <table:table-row table:style-name="ro1" table:number-rows-repeated="89">
          <table:table-cell table:number-columns-repeated="8"/>
        </table:table-row>
        <table:table-row table:style-name="ro1">
          <table:table-cell table:style-name="ce1" table:number-columns-spanned="8" table:number-rows-spanned="1"/>
          <table:covered-table-cell table:number-columns-repeated="7"/>
        </table:table-row>
      </table:table>
      <table:table table:name="Sheet2"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ce5"/>
        <table:table-row table:style-name="ro1">
          <table:table-cell office:value-type="float" office:value="1" calcext:value-type="float">
            <text:p>1</text:p>
          </table:table-cell>
          <table:table-cell table:style-name="ce2" office:value-type="string" calcext:value-type="string">
            <text:p>20.05.2026</text:p>
          </table:table-cell>
          <table:table-cell table:style-name="ce2" office:value-type="string" calcext:value-type="string">
            <text:p>Gada vērtējums</text:p>
          </table:table-cell>
          <table:table-cell table:style-name="ce1"/>
          <table:table-cell table:style-name="ce2" office:value-type="string" calcext:value-type="string">
            <text:p>Nobeigums.</text:p>
          </table:table-cell>
        </table:table-row>
        <table:table-row table:style-name="ro2">
          <table:table-cell office:value-type="string" calcext:value-type="string">
            <text:p>=</text:p>
          </table:table-cell>
          <table:table-cell table:style-name="ce2" office:value-type="string" calcext:value-type="string">
            <text:p>26.05.2026</text:p>
          </table:table-cell>
          <table:table-cell table:style-name="ce2" office:value-type="string" calcext:value-type="string">
            <text:p>Kopsavilkums par pakāpēm.</text:p>
            <text:p>SR: Prot kāpināt skaitli un burtu reizinājumu vai dalījumu. Lieto pakāpju īpašības izteiksmes vērtības aprēķināšanā vai vienkāršošanā.Lieto skaitļa normālformu, izpilda darbības ar skaitļiem normālformā.</text:p>
          </table:table-cell>
          <table:table-cell table:style-name="ce1"/>
          <table:table-cell table:style-name="ce2" office:value-type="string" calcext:value-type="string">
            <text:p>Nobeigums.</text:p>
          </table:table-cell>
        </table:table-row>
        <table:table-row table:style-name="ro2">
          <table:table-cell/>
          <table:table-cell table:style-name="ce2" office:value-type="string" calcext:value-type="string">
            <text:p>26.05.2026</text:p>
          </table:table-cell>
          <table:table-cell table:style-name="ce2" office:value-type="string" calcext:value-type="string">
            <text:p>Kopsavilkums par pakāpēm.</text:p>
            <text:p>SR: Prot kāpināt skaitli un burtu reizinājumu vai dalījumu. Lieto pakāpju īpašības izteiksmes vērtības aprēķināšanā vai vienkāršošanā.Lieto skaitļa normālformu, izpilda darbības ar skaitļiem normālformā.</text:p>
          </table:table-cell>
          <table:table-cell table:style-name="ce1"/>
          <table:table-cell table:style-name="ce2" office:value-type="string" calcext:value-type="string">
            <text:p>Nobeigums.</text:p>
          </table:table-cell>
        </table:table-row>
        <table:table-row table:style-name="ro2">
          <table:table-cell/>
          <table:table-cell table:style-name="ce2" office:value-type="string" calcext:value-type="string">
            <text:p>25.05.2026</text:p>
          </table:table-cell>
          <table:table-cell table:style-name="ce2" office:value-type="string" calcext:value-type="string">
            <text:p>Kopsavilkums par pakāpēm.</text:p>
            <text:p>SR: Prot kāpināt skaitli un burtu reizinājumu vai dalījumu. Lieto pakāpju īpašības izteiksmes vērtības aprēķināšanā vai vienkāršošanā.Lieto skaitļa normālformu, izpilda darbības ar skaitļiem normālformā.</text:p>
          </table:table-cell>
          <table:table-cell table:style-name="ce1"/>
          <table:table-cell table:style-name="ce2" office:value-type="string" calcext:value-type="string">
            <text:p>Nobeigums.</text:p>
          </table:table-cell>
        </table:table-row>
        <table:table-row table:style-name="ro2">
          <table:table-cell/>
          <table:table-cell table:style-name="ce2" office:value-type="string" calcext:value-type="string">
            <text:p>25.05.2026</text:p>
          </table:table-cell>
          <table:table-cell table:style-name="ce2" office:value-type="string" calcext:value-type="string">
            <text:p>Kopsavilkums par pakāpēm.</text:p>
            <text:p>SR: Prot kāpināt skaitli un burtu reizinājumu vai dalījumu. Lieto pakāpju īpašības izteiksmes vērtības aprēķināšanā vai vienkāršošanā.Lieto skaitļa normālformu, izpilda darbības ar skaitļiem normālformā.</text:p>
          </table:table-cell>
          <table:table-cell table:style-name="ce1"/>
          <table:table-cell table:style-name="ce2" office:value-type="string" calcext:value-type="string">
            <text:p>Nobeigums.</text:p>
          </table:table-cell>
        </table:table-row>
        <table:table-row table:style-name="ro2">
          <table:table-cell/>
          <table:table-cell table:style-name="ce3" office:value-type="string" calcext:value-type="string">
            <text:p>20.05.2026</text:p>
          </table:table-cell>
          <table:table-cell table:style-name="ce3" office:value-type="string" calcext:value-type="string">
            <text:p>Pakāpes.</text:p>
            <text:p>SR: Prot kāpināt skaitļus veselā kāpinātājā, zina, kas ir skaitļa normālforma, prot uzrakstīt skaitli normālformā, lieto pakāpju īpašības, saīsina daļas, izpilda darbības ar pakāpēm un skaitļiem normālformā.</text:p>
          </table:table-cell>
          <table:table-cell table:style-name="ce4"/>
          <table:table-cell table:style-name="ce3" office:value-type="string" calcext:value-type="string">
            <text:p>Pakāpju īpašības.</text:p>
          </table:table-cell>
        </table:table-row>
        <table:table-row table:style-name="ro2">
          <table:table-cell/>
          <table:table-cell table:style-name="ce2" office:value-type="string" calcext:value-type="string">
            <text:p>20.05.2026</text:p>
          </table:table-cell>
          <table:table-cell table:style-name="ce2" office:value-type="string" calcext:value-type="string">
            <text:p>Kopsavilkums par pakāpēm.</text:p>
            <text:p>SR: Prot kāpināt skaitli un burtu reizinājumu vai dalījumu. Lieto pakāpju īpašības izteiksmes vērtības aprēķināšanā vai vienkāršošanā.Lieto skaitļa normālformu, izpilda darbības ar skaitļiem normālformā.</text:p>
          </table:table-cell>
          <table:table-cell table:style-name="ce1"/>
          <table:table-cell table:style-name="ce2" office:value-type="string" calcext:value-type="string">
            <text:p>Pakāpju īpašības.</text:p>
          </table:table-cell>
        </table:table-row>
        <table:table-row table:style-name="ro3">
          <table:table-cell/>
          <table:table-cell table:style-name="ce2" office:value-type="string" calcext:value-type="string">
            <text:p>19.05.2026</text:p>
          </table:table-cell>
          <table:table-cell table:style-name="ce2" office:value-type="string" calcext:value-type="string">
            <text:p>Skaitļa normālforma.Reizināšana un dalīšana ar skaitļiem normālformā. Kopsavilkums par pakāpēm un darbībām ar tām.</text:p>
            <text:p>SE:Zina, kas ir skaitļa normālforma, prot skaitli uzrakstīt normālformā. Prot pāriet no vienas skaitļa formas uz otru.Prot sareizināt un izdalīt skaitļus normālformā.Lieto pakāpju īpašības, prot kāpināt veselā kāpinātājā.</text:p>
          </table:table-cell>
          <table:table-cell table:style-name="ce2" office:value-type="string" calcext:value-type="string">
            <text:p>Darba lapa.</text:p>
            <text:p>20.05.2026</text:p>
          </table:table-cell>
          <table:table-cell table:style-name="ce2" office:value-type="string" calcext:value-type="string">
            <text:p>Pakāpju īpašības.</text:p>
          </table:table-cell>
        </table:table-row>
        <table:table-row table:style-name="ro2">
          <table:table-cell/>
          <table:table-cell table:style-name="ce2" office:value-type="string" calcext:value-type="string">
            <text:p>19.05.2026</text:p>
          </table:table-cell>
          <table:table-cell table:style-name="ce2" office:value-type="string" calcext:value-type="string">
            <text:p>Skaitļa normālforma.Reizināšana un dalīšana ar skaitļiem normālformā.</text:p>
            <text:p>SE:Zina, kas ir skaitļa normālforma, prot skaitli uzrakstīt normālformā. Prot pāriet no vienas skaitļa formas uz otru.Prot sareizināt un izdalīt skaitļus normālformā.</text:p>
          </table:table-cell>
          <table:table-cell table:style-name="ce1"/>
          <table:table-cell table:style-name="ce2" office:value-type="string" calcext:value-type="string">
            <text:p>Pakāpju īpašības.</text:p>
          </table:table-cell>
        </table:table-row>
        <table:table-row table:style-name="ro4">
          <table:table-cell/>
          <table:table-cell table:style-name="ce2" office:value-type="string" calcext:value-type="string">
            <text:p>18.05.2026</text:p>
          </table:table-cell>
          <table:table-cell table:style-name="ce2" office:value-type="string" calcext:value-type="string">
            <text:p>Darbības ar pakāpēm.</text:p>
            <text:p>SR: Prot kāpināt skaitli, reizinājumu, dalījumu, pakāpi. Prot kāpināt veselā kāpinātājā. Lieto pakāpju īpašības.</text:p>
          </table:table-cell>
          <table:table-cell table:style-name="ce1"/>
          <table:table-cell table:style-name="ce2" office:value-type="string" calcext:value-type="string">
            <text:p>Pakāpju īpašības.</text:p>
          </table:table-cell>
        </table:table-row>
        <table:table-row table:style-name="ro4">
          <table:table-cell/>
          <table:table-cell table:style-name="ce2" office:value-type="string" calcext:value-type="string">
            <text:p>18.05.2026</text:p>
          </table:table-cell>
          <table:table-cell table:style-name="ce2" office:value-type="string" calcext:value-type="string">
            <text:p>Skaitļa normālforma.</text:p>
            <text:p>SE:Zina, kas ir skaitļa normālforma, prot skaitli uzrakstīt normālformā. Prot pāriet no vienas skaitļa formas uz otru.</text:p>
          </table:table-cell>
          <table:table-cell table:style-name="ce1"/>
          <table:table-cell table:style-name="ce2" office:value-type="string" calcext:value-type="string">
            <text:p>Pakāpju īpašības.</text:p>
          </table:table-cell>
        </table:table-row>
        <table:table-row table:style-name="ro2">
          <table:table-cell/>
          <table:table-cell table:style-name="ce2" office:value-type="string" calcext:value-type="string">
            <text:p>13.05.2026</text:p>
          </table:table-cell>
          <table:table-cell table:style-name="ce2" office:value-type="string" calcext:value-type="string">
            <text:p>Skaitļa normālforma.</text:p>
            <text:p>SE:Zina, kas ir skaitļa normālforma, prot skaitli uzrakstīt normālformā. Prot pāriet no vienas skaitļa formas uz otru.</text:p>
          </table:table-cell>
          <table:table-cell table:style-name="ce2" office:value-type="string" calcext:value-type="string">
            <text:p>258.lp 53., 55. uzdevumi, 261.lpp 9. uzdevums.</text:p>
            <text:p>18.05.2026</text:p>
          </table:table-cell>
          <table:table-cell table:style-name="ce2" office:value-type="string" calcext:value-type="string">
            <text:p>Pakāpju īpašības.</text:p>
          </table:table-cell>
        </table:table-row>
        <table:table-row table:style-name="ro2">
          <table:table-cell/>
          <table:table-cell table:style-name="ce2" office:value-type="string" calcext:value-type="string">
            <text:p>13.05.2026</text:p>
          </table:table-cell>
          <table:table-cell table:style-name="ce2" office:value-type="string" calcext:value-type="string">
            <text:p>Patstāvīgais darbs:Pakāpju īpašības. Skaitļa normālforma.</text:p>
            <text:p>SE: Lieto pakāpju īpašības, aprēķinot skaitlisko vērtību vai vienkāršojot algebrisku izteiksmi. Zina, kas ir skaitļa normālforma, prot skaitli uzrakstīt normālformā.</text:p>
          </table:table-cell>
          <table:table-cell table:style-name="ce1"/>
          <table:table-cell table:style-name="ce2" office:value-type="string" calcext:value-type="string">
            <text:p>Pakāpju īpašības.</text:p>
          </table:table-cell>
        </table:table-row>
        <table:table-row table:style-name="ro4">
          <table:table-cell/>
          <table:table-cell table:style-name="ce2" office:value-type="string" calcext:value-type="string">
            <text:p>12.05.2026</text:p>
          </table:table-cell>
          <table:table-cell table:style-name="ce2" office:value-type="string" calcext:value-type="string">
            <text:p>Darbības ar pakāpēm.</text:p>
            <text:p>SR: Prot kāpināt skaitli, reizinājumu, dalījumu, pakāpi. Prot kāpināt veselā kāpinātājā. Lieto pakāpju īpašības.</text:p>
          </table:table-cell>
          <table:table-cell table:style-name="ce2" office:value-type="string" calcext:value-type="string">
            <text:p>Pielikumā.</text:p>
            <text:p> majas_darbs.docx</text:p>
            <text:p>13.05.2026</text:p>
          </table:table-cell>
          <table:table-cell table:style-name="ce2" office:value-type="string" calcext:value-type="string">
            <text:p>Pakāpju īpašības.</text:p>
          </table:table-cell>
        </table:table-row>
        <table:table-row table:style-name="ro4">
          <table:table-cell/>
          <table:table-cell table:style-name="ce2" office:value-type="string" calcext:value-type="string">
            <text:p>12.05.2026</text:p>
          </table:table-cell>
          <table:table-cell table:style-name="ce2" office:value-type="string" calcext:value-type="string">
            <text:p>Darbības ar pakāpēm.</text:p>
            <text:p>SR: Prot kāpināt skaitli, reizinājumu, dalījumu, pakāpi. Prot kāpināt veselā kāpinātājā. Lieto pakāpju īpašības.</text:p>
          </table:table-cell>
          <table:table-cell table:style-name="ce1"/>
          <table:table-cell table:style-name="ce2" office:value-type="string" calcext:value-type="string">
            <text:p>Pakāpju īpašības.</text:p>
          </table:table-cell>
        </table:table-row>
        <table:table-row table:style-name="ro4">
          <table:table-cell/>
          <table:table-cell table:style-name="ce2" office:value-type="string" calcext:value-type="string">
            <text:p>11.05.2026</text:p>
          </table:table-cell>
          <table:table-cell table:style-name="ce2" office:value-type="string" calcext:value-type="string">
            <text:p>Visas darbības ar pakāpēm.</text:p>
            <text:p>SR: Prot pāriet uz vienādām bāzēm, lieto pakāpju īpašibas, prot kāpināt skaitlis kas un algebriskas izteiksmes.</text:p>
          </table:table-cell>
          <table:table-cell table:style-name="ce2" office:value-type="string" calcext:value-type="string">
            <text:p>257.lpp 44. uzdevums.</text:p>
            <text:p>12.05.2026</text:p>
          </table:table-cell>
          <table:table-cell table:style-name="ce2" office:value-type="string" calcext:value-type="string">
            <text:p>Pakāpju īpašības.</text:p>
          </table:table-cell>
        </table:table-row>
        <table:table-row table:style-name="ro5">
          <table:table-cell/>
          <table:table-cell table:style-name="ce2" office:value-type="string" calcext:value-type="string">
            <text:p>11.05.2026</text:p>
          </table:table-cell>
          <table:table-cell table:style-name="ce2" office:value-type="string" calcext:value-type="string">
            <text:p>Noslēguma pārbaudes darbs.</text:p>
            <text:p>SR: lieto kombinatorikas likumus; zina kopas elementus; lieto zināšanas par plaknes figūrām un to īpašībām; veido un lasa dažādus lineāras funkcijas attēlojumus, pāriet no vienas attēlojuma formas uz citu; nosaka trijstūra eksistenci.; pierāda figūru īpašības; aprēķina figūru lielumus; lieto sakarības, kuras pastāv starp malām un leņķiem trijstūros; lieto leņķu pie trīs taisnēm īpašības.; lieto trijstūra leņķu summu; atrisina lineārus vienādojumus un nevien.</text:p>
          </table:table-cell>
          <table:table-cell table:style-name="ce1"/>
          <table:table-cell table:style-name="ce2" office:value-type="string" calcext:value-type="string">
            <text:p>Pakāpju īpašības.</text:p>
          </table:table-cell>
        </table:table-row>
        <table:table-row table:style-name="ro4">
          <table:table-cell/>
          <table:table-cell table:style-name="ce2" office:value-type="string" calcext:value-type="string">
            <text:p>27.04.2026</text:p>
          </table:table-cell>
          <table:table-cell table:style-name="ce2" office:value-type="string" calcext:value-type="string">
            <text:p>Visas darbības ar pakāpēm.</text:p>
            <text:p>SR: Prot pāriet uz vienādām bāzēm, lieto pakāpju īpašibas, prot kāpināt skaitlis kas un algebriskas izteiksmes.</text:p>
          </table:table-cell>
          <table:table-cell table:style-name="ce1"/>
          <table:table-cell table:style-name="ce2" office:value-type="string" calcext:value-type="string">
            <text:p>Pakāpju īpašības.</text:p>
          </table:table-cell>
        </table:table-row>
        <table:table-row table:style-name="ro6">
          <table:table-cell/>
          <table:table-cell table:style-name="ce2" office:value-type="string" calcext:value-type="string">
            <text:p>27.04.2026</text:p>
          </table:table-cell>
          <table:table-cell table:style-name="ce2" office:value-type="string" calcext:value-type="string">
            <text:p>Visas darbības ar pakāpēm.</text:p>
            <text:p>SR: Prot pāriet uz vienādām bāzēm, lieto pakāpju īpašibas, prot kāpināt skaitlis kas un algebriskas izteiksmes.</text:p>
          </table:table-cell>
          <table:table-cell table:style-name="ce2" office:value-type="string" calcext:value-type="string">
            <text:p>Darba lapa - atkārtojums. Gatavošanās noslēguma pārbaudes darbam. Uzdevumi.lv risina, cik kuram vēlēšanās un spēks. Lai veicas noslēguma darbā.:)</text:p>
            <text:p>28.04.2026</text:p>
          </table:table-cell>
          <table:table-cell table:style-name="ce2" office:value-type="string" calcext:value-type="string">
            <text:p>Pakāpju īpašības.</text:p>
          </table:table-cell>
        </table:table-row>
        <table:table-row table:style-name="ro4">
          <table:table-cell/>
          <table:table-cell table:style-name="ce2" office:value-type="string" calcext:value-type="string">
            <text:p>22.04.2026</text:p>
          </table:table-cell>
          <table:table-cell table:style-name="ce2" office:value-type="string" calcext:value-type="string">
            <text:p>Pakāpe ar veselu kāpinātāju.</text:p>
            <text:p>SR: Prot skaitļus un monomus kāpināt gan nenegatīvā, gan negatīvā kāpinātājā.Lieto darbības ar pakāpēm. Prot pāriet uz vienādām bāzēm.</text:p>
          </table:table-cell>
          <table:table-cell table:style-name="ce2" office:value-type="string" calcext:value-type="string">
            <text:p>256.lpp 40.,41.,42. uzdevumi.</text:p>
            <text:p>27.04.2026</text:p>
          </table:table-cell>
          <table:table-cell table:style-name="ce2" office:value-type="string" calcext:value-type="string">
            <text:p>Pakāpju īpašības.</text:p>
          </table:table-cell>
        </table:table-row>
        <table:table-row table:style-name="ro4">
          <table:table-cell/>
          <table:table-cell table:style-name="ce2" office:value-type="string" calcext:value-type="string">
            <text:p>22.04.2026</text:p>
          </table:table-cell>
          <table:table-cell table:style-name="ce2" office:value-type="string" calcext:value-type="string">
            <text:p>Pakāpe ar veselu kāpinātāju.</text:p>
            <text:p>SR: Prot skaitļus un monomus kāpināt gan nenegatīvā, gan negatīvā kāpinātājā.Lieto darbības ar pakāpēm. Prot pāriet uz vienādām bāzēm.</text:p>
          </table:table-cell>
          <table:table-cell table:style-name="ce1"/>
          <table:table-cell table:style-name="ce2" office:value-type="string" calcext:value-type="string">
            <text:p>Pakāpju īpašības.</text:p>
          </table:table-cell>
        </table:table-row>
        <table:table-row table:style-name="ro4">
          <table:table-cell/>
          <table:table-cell table:style-name="ce2" office:value-type="string" calcext:value-type="string">
            <text:p>21.04.2026</text:p>
          </table:table-cell>
          <table:table-cell table:style-name="ce2" office:value-type="string" calcext:value-type="string">
            <text:p>Patstāvīgais darbs par kāpināšanu. Pakāpe ar veselu kāpinātāju.</text:p>
            <text:p>SR: Prot skaitļus un monomus kāpināt gan nenegatīvā, gan negatīvā kāpinātājā.Lieto darbības ar pakāpēm.</text:p>
          </table:table-cell>
          <table:table-cell table:style-name="ce1"/>
          <table:table-cell table:style-name="ce2" office:value-type="string" calcext:value-type="string">
            <text:p>Pakāpju īpašības.</text:p>
          </table:table-cell>
        </table:table-row>
        <table:table-row table:style-name="ro2">
          <table:table-cell/>
          <table:table-cell table:style-name="ce2" office:value-type="string" calcext:value-type="string">
            <text:p>21.04.2026</text:p>
          </table:table-cell>
          <table:table-cell table:style-name="ce2" office:value-type="string" calcext:value-type="string">
            <text:p>Pakāpe ar veselu kāpinātāju.</text:p>
            <text:p>SR: Prot skaitļus un monomus kāpināt gan nenegatīvā, gan negatīvā kāpinātājā.Lieto darbības ar pakāpēm.</text:p>
          </table:table-cell>
          <table:table-cell table:style-name="ce2" office:value-type="string" calcext:value-type="string">
            <text:p>256.lpp pabeigt 36. uzdevumu un 37., 39. uzdevumi.</text:p>
            <text:p>22.04.2026</text:p>
          </table:table-cell>
          <table:table-cell table:style-name="ce2" office:value-type="string" calcext:value-type="string">
            <text:p>Pakāpju īpašības.</text:p>
          </table:table-cell>
        </table:table-row>
        <table:table-row table:style-name="ro7">
          <table:table-cell/>
          <table:table-cell table:style-name="ce2" office:value-type="string" calcext:value-type="string">
            <text:p>20.04.2026</text:p>
          </table:table-cell>
          <table:table-cell table:style-name="ce2" office:value-type="string" calcext:value-type="string">
            <text:p>Pakāpju reizināšāna, dalīšana, kāpināšana ( kāpinātājs vesels, nenegatīvs skaitlis).</text:p>
            <text:p>SR: Zina un lieto pakāpju īpašības, prot pāriet uz vienādām bāzēm, prot pārveidot un uzrakstīt pakāpi vajadzīgajā formā.</text:p>
          </table:table-cell>
          <table:table-cell table:style-name="ce2" office:value-type="string" calcext:value-type="string">
            <text:p>252.lpp 28.,30.,32. uzdevumi. Gaidu pārbaudes darba kļūdu labojumus ( tiem, kuriem vēl nav ).</text:p>
            <text:p>21.04.2026</text:p>
          </table:table-cell>
          <table:table-cell table:style-name="ce2" office:value-type="string" calcext:value-type="string">
            <text:p>Pakāpju īpašības.</text:p>
          </table:table-cell>
        </table:table-row>
        <table:table-row table:style-name="ro4">
          <table:table-cell/>
          <table:table-cell table:style-name="ce2" office:value-type="string" calcext:value-type="string">
            <text:p>20.04.2026</text:p>
          </table:table-cell>
          <table:table-cell table:style-name="ce2" office:value-type="string" calcext:value-type="string">
            <text:p>Pāreja uz vienādām bāzēm, pakāpju īpašību lietošana.</text:p>
            <text:p>SR: Prot pāriet uz vienādām bāzēm vai vienādiem kāpinātājiem,zina un lieto pakāpju īpašības uzdevumu risināšanā.</text:p>
          </table:table-cell>
          <table:table-cell table:style-name="ce1"/>
          <table:table-cell table:style-name="ce2" office:value-type="string" calcext:value-type="string">
            <text:p>Pakāpju īpašības.</text:p>
          </table:table-cell>
        </table:table-row>
        <table:table-row table:style-name="ro2">
          <table:table-cell/>
          <table:table-cell table:style-name="ce2" office:value-type="string" calcext:value-type="string">
            <text:p>14.04.2026</text:p>
          </table:table-cell>
          <table:table-cell table:style-name="ce2" office:value-type="string" calcext:value-type="string">
            <text:p>Pakāpju īpašības.</text:p>
            <text:p>SR: Zina un lieto uzdevumu risināšanā pakāpju īpašības.</text:p>
          </table:table-cell>
          <table:table-cell table:style-name="ce2" office:value-type="string" calcext:value-type="string">
            <text:p>Iemācīties pakāpju īpašības. 260.lpp 4. uzdevums.</text:p>
            <text:p>20.04.2026</text:p>
          </table:table-cell>
          <table:table-cell table:style-name="ce2" office:value-type="string" calcext:value-type="string">
            <text:p>Pakāpju īpašības.</text:p>
          </table:table-cell>
        </table:table-row>
        <table:table-row table:style-name="ro8">
          <table:table-cell/>
          <table:table-cell table:style-name="ce2" office:value-type="string" calcext:value-type="string">
            <text:p>14.04.2026</text:p>
          </table:table-cell>
          <table:table-cell table:style-name="ce2" office:value-type="string" calcext:value-type="string">
            <text:p>Pakāpju īpašības.</text:p>
            <text:p>SR: Zina un lieto uzdevumu risināšanā pakāpju īpašības.</text:p>
          </table:table-cell>
          <table:table-cell table:style-name="ce1"/>
          <table:table-cell table:style-name="ce2" office:value-type="string" calcext:value-type="string">
            <text:p>Pakāpju īpašības.</text:p>
          </table:table-cell>
        </table:table-row>
        <table:table-row table:style-name="ro3">
          <table:table-cell/>
          <table:table-cell table:style-name="ce2" office:value-type="string" calcext:value-type="string">
            <text:p>13.04.2026</text:p>
          </table:table-cell>
          <table:table-cell table:style-name="ce2" office:value-type="string" calcext:value-type="string">
            <text:p>Uzdevumu risināšana par kāpināšanu.</text:p>
            <text:p>SR: Prot kāpināt pozitīvus un negatīvus skaitļus ar naturālu kāpinātāju. Zina darbību secību, ievēro to uzdevumu risināšanā.</text:p>
          </table:table-cell>
          <table:table-cell table:style-name="ce2" office:value-type="string" calcext:value-type="string">
            <text:p>Pabeigt Mācību grāmatas 3. līdz 12. uzdevumus 245., 246.lpp</text:p>
            <text:p>14.04.2026</text:p>
          </table:table-cell>
          <table:table-cell table:style-name="ce2" office:value-type="string" calcext:value-type="string">
            <text:p>Pakāpju īpašības.</text:p>
          </table:table-cell>
        </table:table-row>
        <table:table-row table:style-name="ro4">
          <table:table-cell/>
          <table:table-cell table:style-name="ce2" office:value-type="string" calcext:value-type="string">
            <text:p>13.04.2026</text:p>
          </table:table-cell>
          <table:table-cell table:style-name="ce2" office:value-type="string" calcext:value-type="string">
            <text:p>Pakāpes.</text:p>
            <text:p>SR: Zina, ko nozīmē kāpināt pozitīvu skaitli, negatīvu skaitli, daļu dažādās pakāpēs.Zina jēdzienus: pakāpe, kāpinātājs, bāze.</text:p>
          </table:table-cell>
          <table:table-cell table:style-name="ce1"/>
          <table:table-cell table:style-name="ce2" office:value-type="string" calcext:value-type="string">
            <text:p>Pakāpju īpašības.</text:p>
          </table:table-cell>
        </table:table-row>
        <table:table-row table:style-name="ro4">
          <table:table-cell/>
          <table:table-cell table:style-name="ce2" office:value-type="string" calcext:value-type="string">
            <text:p>8.04.2026</text:p>
          </table:table-cell>
          <table:table-cell table:style-name="ce2" office:value-type="string" calcext:value-type="string">
            <text:p>Kopsavilkums par trijstūriem. Vienādsānu un vienādmalu trijstūri.</text:p>
            <text:p>SR: Zina trijstūra īpašības, zina vienādsānu un vienādmalu trijstūru īpašības, lieto tās uzdevumu risināšanā un pierādījuma uzdevumos.</text:p>
          </table:table-cell>
          <table:table-cell table:style-name="ce1"/>
          <table:table-cell table:style-name="ce2" office:value-type="string" calcext:value-type="string">
            <text:p>Pakāpju īpašības.</text:p>
          </table:table-cell>
        </table:table-row>
        <table:table-row table:style-name="ro2">
          <table:table-cell/>
          <table:table-cell table:style-name="ce3" office:value-type="string" calcext:value-type="string">
            <text:p>8.04.2026</text:p>
          </table:table-cell>
          <table:table-cell table:style-name="ce3" office:value-type="string" calcext:value-type="string">
            <text:p>Vienādsānu un vienādmalu trijstūri.</text:p>
            <text:p>SR: Zina trijstūra īpašības, zina vienādsānu un vienādmalu trijstūru īpašības, lieto tās uzdevumu risināšanā un pierādījuma uzdevumos.Prot uzkonstruēt nogriežņa vidusperpendikulu un leņķa bisektrisi.</text:p>
          </table:table-cell>
          <table:table-cell table:style-name="ce4"/>
          <table:table-cell table:style-name="ce3" office:value-type="string" calcext:value-type="string">
            <text:p>Vienādsānu un vienādmalu trijstūri.</text:p>
          </table:table-cell>
        </table:table-row>
        <table:table-row table:style-name="ro5">
          <table:table-cell/>
          <table:table-cell table:style-name="ce2" office:value-type="string" calcext:value-type="string">
            <text:p>7.04.2026</text:p>
          </table:table-cell>
          <table:table-cell table:style-name="ce2" office:value-type="string" calcext:value-type="string">
            <text:p>Kopsavilkums par trijstūriem. Vienādsānu un vienādmalu trijstūri.</text:p>
            <text:p>SR: Zina trijstūra īpašības, zina vienādsānu un vienādmalu trijstūru īpašības, lieto tās uzdevumu risināšanā un pierādījuma uzdevumos.</text:p>
          </table:table-cell>
          <table:table-cell table:style-name="ce2" office:value-type="string" calcext:value-type="string">
            <text:p>Darba lapas: 1. lapa 4. un 5. sasniedamā rezultāta uzdevumi, 2. darba lapa 7.1. 7.2, 7.4, 8.1, 9.2 Ja ir vēlme var arī pārējos uzdevumus.</text:p>
            <text:p>8.04.2026</text:p>
          </table:table-cell>
          <table:table-cell table:style-name="ce2" office:value-type="string" calcext:value-type="string">
            <text:p>Vienādsānu un vienādmalu trijstūri.</text:p>
          </table:table-cell>
        </table:table-row>
        <table:table-row table:style-name="ro4">
          <table:table-cell/>
          <table:table-cell table:style-name="ce2" office:value-type="string" calcext:value-type="string">
            <text:p>7.04.2026</text:p>
          </table:table-cell>
          <table:table-cell table:style-name="ce2" office:value-type="string" calcext:value-type="string">
            <text:p>Kopsavilkums par trijstūriem. Vienādsānu un vienādmalu trijstūri.</text:p>
            <text:p>SR: Zina trijstūra īpašības, zina vienādsānu un vienādmalu trijstūru īpašības, lieto tās uzdevumu risināšanā un pierādījuma uzdevumos.</text:p>
          </table:table-cell>
          <table:table-cell table:style-name="ce1"/>
          <table:table-cell table:style-name="ce2" office:value-type="string" calcext:value-type="string">
            <text:p>Vienādsānu un vienādmalu trijstūri.</text:p>
          </table:table-cell>
        </table:table-row>
        <table:table-row table:style-name="ro3">
          <table:table-cell/>
          <table:table-cell table:style-name="ce2" office:value-type="string" calcext:value-type="string">
            <text:p>1.04.2026</text:p>
          </table:table-cell>
          <table:table-cell table:style-name="ce2" office:value-type="string" calcext:value-type="string">
            <text:p>Punktu ģeometriskā vieta. Konstrukciju uzdevumi.</text:p>
            <text:p>SR: Zina, kas ir nogriežņa vidusperpendikuls, zina vidusperpendikula īpašību. Zina, kas ir leņķa bisektrise, zina leņķa bisektrises īpašību. Lieto īpašības uzdevumu risināšanā un pierādījumu uzdevumos. Prot konstruēt leņķa bisektrisi un nogriežņa vidusperpendikulu.</text:p>
          </table:table-cell>
          <table:table-cell table:style-name="ce1"/>
          <table:table-cell table:style-name="ce2" office:value-type="string" calcext:value-type="string">
            <text:p>Vienādsānu un vienādmalu trijstūri.</text:p>
          </table:table-cell>
        </table:table-row>
        <table:table-row table:style-name="ro2">
          <table:table-cell/>
          <table:table-cell table:style-name="ce2" office:value-type="string" calcext:value-type="string">
            <text:p>1.04.2026</text:p>
          </table:table-cell>
          <table:table-cell table:style-name="ce2" office:value-type="string" calcext:value-type="string">
            <text:p>Punktu ģeometriskā vieta.</text:p>
            <text:p>SR: Zina, kas ir nogriežņa vidusperpendikuls, zina vidusperpendikula īpašību. Zina, kas ir leņķa bisektrise, zina leņķa bisektrises īpašību. Lieto īpašības uzdevumu risināšanā un pierādījumu uzdevumos.</text:p>
          </table:table-cell>
          <table:table-cell table:style-name="ce1"/>
          <table:table-cell table:style-name="ce2" office:value-type="string" calcext:value-type="string">
            <text:p>Vienādsānu un vienādmalu trijstūri.</text:p>
          </table:table-cell>
        </table:table-row>
        <table:table-row table:style-name="ro4">
          <table:table-cell/>
          <table:table-cell table:style-name="ce2" office:value-type="string" calcext:value-type="string">
            <text:p>31.03.2026</text:p>
          </table:table-cell>
          <table:table-cell table:style-name="ce2" office:value-type="string" calcext:value-type="string">
            <text:p>Vienādsānu un vienādmalu trijstūru īpašības. Uzdevumu risināšana.</text:p>
            <text:p>SR: Zina trijstūru veidus, zina to īpašības, prot tās pierādīt. Lieto īpašības uzdevumu risināšanā.</text:p>
          </table:table-cell>
          <table:table-cell table:style-name="ce2" office:value-type="string" calcext:value-type="string">
            <text:p>195.lpp 39.,40.,41.</text:p>
            <text:p>1.04.2026</text:p>
          </table:table-cell>
          <table:table-cell table:style-name="ce2" office:value-type="string" calcext:value-type="string">
            <text:p>Vienādsānu un vienādmalu trijstūri.</text:p>
          </table:table-cell>
        </table:table-row>
        <table:table-row table:style-name="ro4">
          <table:table-cell/>
          <table:table-cell table:style-name="ce2" office:value-type="string" calcext:value-type="string">
            <text:p>31.03.2026</text:p>
          </table:table-cell>
          <table:table-cell table:style-name="ce2" office:value-type="string" calcext:value-type="string">
            <text:p>Vienādsānu un vienādmalu trijstūru īpašības.</text:p>
            <text:p>SR: Zina trijstūru veidus, zina to īpašības, prot tās pierādīt. Lieto īpašības uzdevumu risināšanā.</text:p>
          </table:table-cell>
          <table:table-cell table:style-name="ce1"/>
          <table:table-cell table:style-name="ce2" office:value-type="string" calcext:value-type="string">
            <text:p>Vienādsānu un vienādmalu trijstūri.</text:p>
          </table:table-cell>
        </table:table-row>
        <table:table-row table:style-name="ro3">
          <table:table-cell/>
          <table:table-cell table:style-name="ce2" office:value-type="string" calcext:value-type="string">
            <text:p>30.03.2026</text:p>
          </table:table-cell>
          <table:table-cell table:style-name="ce2" office:value-type="string" calcext:value-type="string">
            <text:p>Vienādsānu un vienādmalu trijstūris.</text:p>
            <text:p>SR: Zina, kas ir vienādsānu un vienādmalu trojstūri, zina to īpašības, lieto tāuzdevumu risināšanā.</text:p>
          </table:table-cell>
          <table:table-cell table:style-name="ce2" office:value-type="string" calcext:value-type="string">
            <text:p>Pārbaudes darba kļūdu labojums. 19.,21.uzdevumi 192.lpp</text:p>
            <text:p>31.03.2026</text:p>
          </table:table-cell>
          <table:table-cell table:style-name="ce2" office:value-type="string" calcext:value-type="string">
            <text:p>Vienādsānu un vienādmalu trijstūri.</text:p>
          </table:table-cell>
        </table:table-row>
        <table:table-row table:style-name="ro8">
          <table:table-cell/>
          <table:table-cell table:style-name="ce2" office:value-type="string" calcext:value-type="string">
            <text:p>30.03.2026</text:p>
          </table:table-cell>
          <table:table-cell table:style-name="ce2" office:value-type="string" calcext:value-type="string">
            <text:p>Trijstūra leņķu summa.Tiešā un apgrieztā teorēma.</text:p>
            <text:p>SR:</text:p>
          </table:table-cell>
          <table:table-cell table:style-name="ce1"/>
          <table:table-cell table:style-name="ce2" office:value-type="string" calcext:value-type="string">
            <text:p>Vienādsānu un vienādmalu trijstūri.</text:p>
          </table:table-cell>
        </table:table-row>
        <table:table-row table:style-name="ro2">
          <table:table-cell/>
          <table:table-cell table:style-name="ce2" office:value-type="string" calcext:value-type="string">
            <text:p>25.03.2026</text:p>
          </table:table-cell>
          <table:table-cell table:style-name="ce2" office:value-type="string" calcext:value-type="string">
            <text:p>Sakarības un nogriežņi trijstūrī.</text:p>
            <text:p>SR: Zina trijstūra īpašības un nogriežņus trijstūrī. Prot tos novilkt. Zina sakarību strap trijstūra malām un leņķiem. Zina, kas ir teorēma un tai apgrieztā teorēma.</text:p>
          </table:table-cell>
          <table:table-cell table:style-name="ce2" office:value-type="string" calcext:value-type="string">
            <text:p>186.lpp 1.,2.,6. uzdevumi.</text:p>
            <text:p>30.03.2026</text:p>
          </table:table-cell>
          <table:table-cell table:style-name="ce2" office:value-type="string" calcext:value-type="string">
            <text:p>Vienādsānu un vienādmalu trijstūri.</text:p>
          </table:table-cell>
        </table:table-row>
        <table:table-row table:style-name="ro2">
          <table:table-cell/>
          <table:table-cell table:style-name="ce3" office:value-type="string" calcext:value-type="string">
            <text:p>25.03.2026</text:p>
          </table:table-cell>
          <table:table-cell table:style-name="ce3" office:value-type="string" calcext:value-type="string">
            <text:p>Ievads kombinatorikā un varbūtību teorijā.</text:p>
            <text:p>SR: Zina, kas ir kopa, prot uzrakstīt prasīto kopu, izpilda darbības ar kopām, lieto atbilstošus apzīmējumus. Lieot saskaitīšanas un reizināšanas likumus kombinatorikā. Lieto varbūtības aprēķināšanas formulu.</text:p>
          </table:table-cell>
          <table:table-cell table:style-name="ce4"/>
          <table:table-cell table:style-name="ce3" office:value-type="string" calcext:value-type="string">
            <text:p>Ievads kombinatorikā un varbūtību teorijā.</text:p>
          </table:table-cell>
        </table:table-row>
        <table:table-row table:style-name="ro7">
          <table:table-cell/>
          <table:table-cell table:style-name="ce2" office:value-type="string" calcext:value-type="string">
            <text:p>24.03.2026</text:p>
          </table:table-cell>
          <table:table-cell table:style-name="ce2" office:value-type="string" calcext:value-type="string">
            <text:p>Kopsavilkums par kombinatoriku un varb'ūtību teoriju.</text:p>
            <text:p>SR: Prot lietot saskaitīšanas un reizināšanas likumus izvēļu skaita noteikšanai. Lieto varbūtības aprēķināšanas formulu.</text:p>
          </table:table-cell>
          <table:table-cell table:style-name="ce2" office:value-type="string" calcext:value-type="string">
            <text:p>Iedotās darba lapas pabeigt un pielikumā darba lapa par kopām.</text:p>
            <text:p> darbības ar kopām.docx</text:p>
            <text:p>25.03.2026</text:p>
          </table:table-cell>
          <table:table-cell table:style-name="ce2" office:value-type="string" calcext:value-type="string">
            <text:p>Ievads kombinatorikā un varbūtību teorijā.</text:p>
          </table:table-cell>
        </table:table-row>
        <table:table-row table:style-name="ro4">
          <table:table-cell/>
          <table:table-cell table:style-name="ce2" office:value-type="string" calcext:value-type="string">
            <text:p>24.03.2026</text:p>
          </table:table-cell>
          <table:table-cell table:style-name="ce2" office:value-type="string" calcext:value-type="string">
            <text:p>Kopsavilkums par kombinatoriku un varb'ūtību teoriju.</text:p>
            <text:p>SR: Prot lietot saskaitīšanas un reizināšanas likumus izvēļu skaita noteikšanai. Lieto varbūtības aprēķināšanas formulu.</text:p>
          </table:table-cell>
          <table:table-cell table:style-name="ce2" office:value-type="string" calcext:value-type="string">
            <text:p>109.lpp 5.9, 5.10, 5.11, 5.13</text:p>
            <text:p>25.03.2026</text:p>
          </table:table-cell>
          <table:table-cell table:style-name="ce2" office:value-type="string" calcext:value-type="string">
            <text:p>Ievads kombinatorikā un varbūtību teorijā.</text:p>
          </table:table-cell>
        </table:table-row>
        <table:table-row table:style-name="ro2">
          <table:table-cell/>
          <table:table-cell table:style-name="ce2" office:value-type="string" calcext:value-type="string">
            <text:p>23.03.2026</text:p>
          </table:table-cell>
          <table:table-cell table:style-name="ce2" office:value-type="string" calcext:value-type="string">
            <text:p>Ievads varbūtību teorijā.</text:p>
            <text:p>SR:Saprot, ko nozīmē notikuma varbūtība, varbūtības iespējamās vērtības, zina klasiskās varbūtības formulu.Prot aprēķināt notikuma varbūtību.</text:p>
          </table:table-cell>
          <table:table-cell table:style-name="ce2" office:value-type="string" calcext:value-type="string">
            <text:p>127.lpp 75.uzdevums ,128.lpp 1.,2.,3.,4.uzdevumi</text:p>
            <text:p>24.03.2026</text:p>
          </table:table-cell>
          <table:table-cell table:style-name="ce2" office:value-type="string" calcext:value-type="string">
            <text:p>Ievads kombinatorikā un varbūtību teorijā.</text:p>
          </table:table-cell>
        </table:table-row>
        <table:table-row table:style-name="ro4">
          <table:table-cell/>
          <table:table-cell table:style-name="ce2" office:value-type="string" calcext:value-type="string">
            <text:p>23.03.2026</text:p>
          </table:table-cell>
          <table:table-cell table:style-name="ce2" office:value-type="string" calcext:value-type="string">
            <text:p>Ievads varbūtību teorijā.</text:p>
            <text:p>SR:Saprot, ko nozīmē notikuma varbūtība, varbūtības iespējamās vērtības, zina klasiskās varbūtības formulu.Prot aprēķināt notikuma varbūtību.</text:p>
          </table:table-cell>
          <table:table-cell table:style-name="ce1"/>
          <table:table-cell table:style-name="ce2" office:value-type="string" calcext:value-type="string">
            <text:p>Ievads kombinatorikā un varbūtību teorijā.</text:p>
          </table:table-cell>
        </table:table-row>
        <table:table-row table:style-name="ro4">
          <table:table-cell/>
          <table:table-cell table:style-name="ce2" office:value-type="string" calcext:value-type="string">
            <text:p>18.03.2026</text:p>
          </table:table-cell>
          <table:table-cell table:style-name="ce2" office:value-type="string" calcext:value-type="string">
            <text:p>Ievads varbūtību teorijā.</text:p>
            <text:p>SR:Saprot, ko nozīmē notikuma varbūtība, varbūtības iespējamās vērtības, zina klasiskās varbūtības formulu.Prot aprēķināt notikuma varbūtību.</text:p>
          </table:table-cell>
          <table:table-cell table:style-name="ce1"/>
          <table:table-cell table:style-name="ce2" office:value-type="string" calcext:value-type="string">
            <text:p>Ievads kombinatorikā un varbūtību teorijā.</text:p>
          </table:table-cell>
        </table:table-row>
        <table:table-row table:style-name="ro4">
          <table:table-cell/>
          <table:table-cell table:style-name="ce2" office:value-type="string" calcext:value-type="string">
            <text:p>18.03.2026</text:p>
          </table:table-cell>
          <table:table-cell table:style-name="ce2" office:value-type="string" calcext:value-type="string">
            <text:p>Ievads varbūtību teorijā.</text:p>
            <text:p>SR:Saprot, ko nozīmē notikuma varbūtība, varbūtības iespējamās vērtības, zina klasiskās varbūtības formulu.Prot aprēķināt notikuma varbūtību.</text:p>
          </table:table-cell>
          <table:table-cell table:style-name="ce1"/>
          <table:table-cell table:style-name="ce2" office:value-type="string" calcext:value-type="string">
            <text:p>Ievads kombinatorikā un varbūtību teorijā.</text:p>
          </table:table-cell>
        </table:table-row>
        <table:table-row table:style-name="ro4">
          <table:table-cell/>
          <table:table-cell table:style-name="ce2" office:value-type="string" calcext:value-type="string">
            <text:p>17.03.2026</text:p>
          </table:table-cell>
          <table:table-cell table:style-name="ce2" office:value-type="string" calcext:value-type="string">
            <text:p>Ievads varbūtību teorijā.</text:p>
            <text:p>SR:Saprot, ko nozīmē notikuma varbūtība, varbūtības iespējamās vērtības, zina klasiskās varbūtības formulu.Prot aprēķināt notikuma varbūtību.</text:p>
          </table:table-cell>
          <table:table-cell table:style-name="ce1"/>
          <table:table-cell table:style-name="ce2" office:value-type="string" calcext:value-type="string">
            <text:p>Ievads kombinatorikā un varbūtību teorijā.</text:p>
          </table:table-cell>
        </table:table-row>
        <table:table-row table:style-name="ro2">
          <table:table-cell/>
          <table:table-cell table:style-name="ce2" office:value-type="string" calcext:value-type="string">
            <text:p>17.03.2026</text:p>
          </table:table-cell>
          <table:table-cell table:style-name="ce2" office:value-type="string" calcext:value-type="string">
            <text:p>Uzdevumu sastādīšana un risināšana kombinatorikā Patstāvīgais darbs: Kombinatorikas elementi.</text:p>
            <text:p>SR: Lieto saskaitīšanas vai reizināšanas likumu kombinatorikas uzdevumu risināšanā. Saskata, vai elementi secība ir vai nav svarīga.</text:p>
          </table:table-cell>
          <table:table-cell table:style-name="ce2" office:value-type="string" calcext:value-type="string">
            <text:p>124.lpp 52.,53. uzdevumi.</text:p>
            <text:p>18.03.2026</text:p>
          </table:table-cell>
          <table:table-cell table:style-name="ce2" office:value-type="string" calcext:value-type="string">
            <text:p>Ievads kombinatorikā un varbūtību teorijā.</text:p>
          </table:table-cell>
        </table:table-row>
        <table:table-row table:style-name="ro3">
          <table:table-cell/>
          <table:table-cell table:style-name="ce2" office:value-type="string" calcext:value-type="string">
            <text:p>16.03.2026</text:p>
          </table:table-cell>
          <table:table-cell table:style-name="ce2" office:value-type="string" calcext:value-type="string">
            <text:p>Saskaitīšanas un reizināšanas likumi.</text:p>
            <text:p>SR: Prot noteikt prasīto iespēju skaitu, lietojot reizināšanas un saskaitīšanas likumus. Prot noteikt, vai elementu secība ir svarīga.</text:p>
          </table:table-cell>
          <table:table-cell table:style-name="ce2" office:value-type="string" calcext:value-type="string">
            <text:p>51. uzdevums (uzrakstīt, lai klasesbiedrs spēj izlasīt ).</text:p>
            <text:p>17.03.2026</text:p>
          </table:table-cell>
          <table:table-cell table:style-name="ce2" office:value-type="string" calcext:value-type="string">
            <text:p>Ievads kombinatorikā un varbūtību teorijā.</text:p>
          </table:table-cell>
        </table:table-row>
        <table:table-row table:style-name="ro4">
          <table:table-cell/>
          <table:table-cell table:style-name="ce2" office:value-type="string" calcext:value-type="string">
            <text:p>16.03.2026</text:p>
          </table:table-cell>
          <table:table-cell table:style-name="ce2" office:value-type="string" calcext:value-type="string">
            <text:p>Saskaitīšanas un reizināšanas likumi.</text:p>
            <text:p>SR: Prot noteikt prasīto iespēju skaitu, lietojot reizināšanas un saskaitīšanas likumus.</text:p>
          </table:table-cell>
          <table:table-cell table:style-name="ce1"/>
          <table:table-cell table:style-name="ce2" office:value-type="string" calcext:value-type="string">
            <text:p>Ievads kombinatorikā un varbūtību teorijā.</text:p>
          </table:table-cell>
        </table:table-row>
        <table:table-row table:style-name="ro4">
          <table:table-cell/>
          <table:table-cell table:style-name="ce2" office:value-type="string" calcext:value-type="string">
            <text:p>4.03.2026</text:p>
          </table:table-cell>
          <table:table-cell table:style-name="ce2" office:value-type="string" calcext:value-type="string">
            <text:p>Saskaitīšanas un reizināšanas likumi.</text:p>
            <text:p>SR: Prot noteikt prasīto iespēju skaitu, lietojot reizināšanas un saskaitīšanas likumus.</text:p>
          </table:table-cell>
          <table:table-cell table:style-name="ce1"/>
          <table:table-cell table:style-name="ce2" office:value-type="string" calcext:value-type="string">
            <text:p>Ievads kombinatorikā un varbūtību teorijā.</text:p>
          </table:table-cell>
        </table:table-row>
        <table:table-row table:style-name="ro4">
          <table:table-cell/>
          <table:table-cell table:style-name="ce2" office:value-type="string" calcext:value-type="string">
            <text:p>4.03.2026</text:p>
          </table:table-cell>
          <table:table-cell table:style-name="ce2" office:value-type="string" calcext:value-type="string">
            <text:p>Grafu veidošana kombinatorikas uzdevumu risināšanā.</text:p>
            <text:p>SR: Prot sistematizēt doto informāciju un izveidot grafu, no tā nolasīt vajadzīgo informāciju un atrisinājumu.</text:p>
          </table:table-cell>
          <table:table-cell table:style-name="ce1"/>
          <table:table-cell table:style-name="ce2" office:value-type="string" calcext:value-type="string">
            <text:p>Ievads kombinatorikā un varbūtību teorijā.</text:p>
          </table:table-cell>
        </table:table-row>
        <table:table-row table:style-name="ro4">
          <table:table-cell/>
          <table:table-cell table:style-name="ce2" office:value-type="string" calcext:value-type="string">
            <text:p>3.03.2026</text:p>
          </table:table-cell>
          <table:table-cell table:style-name="ce2" office:value-type="string" calcext:value-type="string">
            <text:p>Ievads kombinatorikā.</text:p>
            <text:p>SR: Zina, ko pēta kombinatorika, lieto pilno pārlasi kombināciju skaita noteikšanā.</text:p>
          </table:table-cell>
          <table:table-cell table:style-name="ce1"/>
          <table:table-cell table:style-name="ce2" office:value-type="string" calcext:value-type="string">
            <text:p>Ievads kombinatorikā un varbūtību teorijā.</text:p>
          </table:table-cell>
        </table:table-row>
        <table:table-row table:style-name="ro6">
          <table:table-cell/>
          <table:table-cell table:style-name="ce2" office:value-type="string" calcext:value-type="string">
            <text:p>3.03.2026</text:p>
          </table:table-cell>
          <table:table-cell table:style-name="ce2" office:value-type="string" calcext:value-type="string">
            <text:p>Ievads kombinatorikā.</text:p>
            <text:p>SR: Zina, ko pēta kombinatorika, lieto pilno pārlasi kombināciju skaita noteikšanā.</text:p>
          </table:table-cell>
          <table:table-cell table:style-name="ce2" office:value-type="string" calcext:value-type="string">
            <text:p>Mācību grāmata 110.lpp 4., 6.,8.,9. uzdevumi. Skolēniem, kuri ir fakultatīvā arī uzdevumi pielikumā 1. līdz 4. lpp.</text:p>
            <text:p> Grafi_NOV_teorija.pdf</text:p>
            <text:p>4.03.2026</text:p>
          </table:table-cell>
          <table:table-cell table:style-name="ce2" office:value-type="string" calcext:value-type="string">
            <text:p>Ievads kombinatorikā un varbūtību teorijā.</text:p>
          </table:table-cell>
        </table:table-row>
        <table:table-row table:style-name="ro3">
          <table:table-cell/>
          <table:table-cell table:style-name="ce2" office:value-type="string" calcext:value-type="string">
            <text:p>2.03.2026</text:p>
          </table:table-cell>
          <table:table-cell table:style-name="ce2" office:value-type="string" calcext:value-type="string">
            <text:p>patstāvīgais darbs: Kopas. Darbības ar kopam. Kopu šķēlums un apvienojums.Eilere- Venna diagramma.</text:p>
            <text:p>SR: Zina, kas ir kopu šķēlums un apvienojums, zina apzīmājumus, prot uzrakstīt doto kopu šķēlumu un apvienojumu.Prot uzzīmēt Eilera Venna diagrammu, prot nolasīt vai parēķināt prasīto.</text:p>
          </table:table-cell>
          <table:table-cell table:style-name="ce2" office:value-type="string" calcext:value-type="string">
            <text:p>Mājas darbs uzdevumi.lv ielikts pirmdienā.</text:p>
            <text:p>3.03.2026</text:p>
          </table:table-cell>
          <table:table-cell table:style-name="ce2" office:value-type="string" calcext:value-type="string">
            <text:p>Ievads kombinatorikā un varbūtību teorijā.</text:p>
          </table:table-cell>
        </table:table-row>
        <table:table-row table:style-name="ro2">
          <table:table-cell/>
          <table:table-cell table:style-name="ce2" office:value-type="string" calcext:value-type="string">
            <text:p>2.03.2026</text:p>
          </table:table-cell>
          <table:table-cell table:style-name="ce2" office:value-type="string" calcext:value-type="string">
            <text:p>Kopu šķēlums un apvienojums.Eilere- Venna diagramma.</text:p>
            <text:p>SR: Zina, kas ir kopu šķēlums un apvienojums, zina apzīmājumus, prot uzrakstīt doto kopu šķēlumu un apvienojumu.Prot uzzīmēt Eilera Venna diagrammu.</text:p>
          </table:table-cell>
          <table:table-cell table:style-name="ce1"/>
          <table:table-cell table:style-name="ce2" office:value-type="string" calcext:value-type="string">
            <text:p>Ievads kombinatorikā un varbūtību teorijā.</text:p>
          </table:table-cell>
        </table:table-row>
        <table:table-row table:style-name="ro3">
          <table:table-cell/>
          <table:table-cell table:style-name="ce2" office:value-type="string" calcext:value-type="string">
            <text:p>25.02.2026</text:p>
          </table:table-cell>
          <table:table-cell table:style-name="ce2" office:value-type="string" calcext:value-type="string">
            <text:p>Kopu šķēlums un apvienojums.</text:p>
            <text:p>SR: Zina, kas ir kopu šķēlums un apvienojums, zina apzīmājumus, prot uzrakstīt doto kopu šķēlumu un apvienojumu.</text:p>
          </table:table-cell>
          <table:table-cell table:style-name="ce2" office:value-type="string" calcext:value-type="string">
            <text:p>Māconī Januma, "Matemātika 1. daļa" 2023. 7.lpp 1.29 līdz 1.33 un 1.36</text:p>
            <text:p>2.03.2026</text:p>
          </table:table-cell>
          <table:table-cell table:style-name="ce2" office:value-type="string" calcext:value-type="string">
            <text:p>Ievads kombinatorikā un varbūtību teorijā.</text:p>
          </table:table-cell>
        </table:table-row>
        <table:table-row table:style-name="ro4">
          <table:table-cell/>
          <table:table-cell table:style-name="ce2" office:value-type="string" calcext:value-type="string">
            <text:p>25.02.2026</text:p>
          </table:table-cell>
          <table:table-cell table:style-name="ce2" office:value-type="string" calcext:value-type="string">
            <text:p>Kopas apakškopa.</text:p>
            <text:p>SR: Zina, kas ir kopas apakškopa, prot noteikt tās elementus un elementu skaitu, prot noteikt apakškopu skaitu.</text:p>
          </table:table-cell>
          <table:table-cell table:style-name="ce1"/>
          <table:table-cell table:style-name="ce2" office:value-type="string" calcext:value-type="string">
            <text:p>Ievads kombinatorikā un varbūtību teorijā.</text:p>
          </table:table-cell>
        </table:table-row>
        <table:table-row table:style-name="ro3">
          <table:table-cell/>
          <table:table-cell table:style-name="ce2" office:value-type="string" calcext:value-type="string">
            <text:p>24.02.2026</text:p>
          </table:table-cell>
          <table:table-cell table:style-name="ce2" office:value-type="string" calcext:value-type="string">
            <text:p>Kopas.</text:p>
            <text:p>SR: Zina, kas ir kopa. Prot izveidot kopas ar noteiktu elementu īpašību, prot noteikt elementu piederību kopai.</text:p>
          </table:table-cell>
          <table:table-cell table:style-name="ce2" office:value-type="string" calcext:value-type="string">
            <text:p>Māconī Januma, "Matemātika 1. daļa" 2023. 7.lpp 1.3, 1.5, 1.6, 1.7</text:p>
            <text:p>25.02.2026</text:p>
          </table:table-cell>
          <table:table-cell table:style-name="ce2" office:value-type="string" calcext:value-type="string">
            <text:p>Ievads kombinatorikā un varbūtību teorijā.</text:p>
          </table:table-cell>
        </table:table-row>
        <table:table-row table:style-name="ro9">
          <table:table-cell/>
          <table:table-cell table:style-name="ce3" office:value-type="string" calcext:value-type="string">
            <text:p>24.02.2026</text:p>
          </table:table-cell>
          <table:table-cell table:style-name="ce3" office:value-type="string" calcext:value-type="string">
            <text:p>Lineāra funkcija.</text:p>
            <text:p>SR:Atpazīst lineāru funkciju, lieto jēdzienus arguments, funkcijas vērtība. Prot uzkonstruēt funkcijas grafiku, prot nolasīt no grafika vajadzīgo informāciju, prot uzrakstīt dotajam grafikam paralēla grafika formulu, Prot aprēķināt grafiku krustpunktus un grafika krustpunktus ar koordinātu asīm, Prot izveidot lineāras funkcijas formulu.</text:p>
          </table:table-cell>
          <table:table-cell table:style-name="ce4"/>
          <table:table-cell table:style-name="ce3" office:value-type="string" calcext:value-type="string">
            <text:p>Lineāra funkcija.</text:p>
          </table:table-cell>
        </table:table-row>
        <table:table-row table:style-name="ro9">
          <table:table-cell/>
          <table:table-cell table:style-name="ce2" office:value-type="string" calcext:value-type="string">
            <text:p>23.02.2026</text:p>
          </table:table-cell>
          <table:table-cell table:style-name="ce2" office:value-type="string" calcext:value-type="string">
            <text:p>Reālu procesu attēlošana grafikos.</text:p>
            <text:p>SR: Prot noteikt dažādas lineāras funkcijas īpašības, prot lasīt grafikus, uzzīmēt prasītos grafikus, prot noteikt krustpunktu koordinātas ar asīm.</text:p>
          </table:table-cell>
          <table:table-cell table:style-name="ce2" office:value-type="string" calcext:value-type="string">
            <text:p>Darba lapas - gatavošanās pārbaudes darbam ( katram pēc spējām un vajadzības ).</text:p>
            <text:p>24.02.2026</text:p>
          </table:table-cell>
          <table:table-cell table:style-name="ce2" office:value-type="string" calcext:value-type="string">
            <text:p>Lineāra funkcija.</text:p>
          </table:table-cell>
        </table:table-row>
        <table:table-row table:style-name="ro4">
          <table:table-cell/>
          <table:table-cell table:style-name="ce2" office:value-type="string" calcext:value-type="string">
            <text:p>23.02.2026</text:p>
          </table:table-cell>
          <table:table-cell table:style-name="ce2" office:value-type="string" calcext:value-type="string">
            <text:p>Reālu procesu attēlošana grafikos.</text:p>
            <text:p>SR: Prot noteikt dažādas lineāras funkcijas īpašības, prot lasīt grafikus, uzzīmēt prasītos grafikus, prot noteikt krustpunktu koordinātas ar asīm.</text:p>
          </table:table-cell>
          <table:table-cell table:style-name="ce1"/>
          <table:table-cell table:style-name="ce2" office:value-type="string" calcext:value-type="string">
            <text:p>Lineāra funkcija.</text:p>
          </table:table-cell>
        </table:table-row>
        <table:table-row table:style-name="ro4">
          <table:table-cell/>
          <table:table-cell table:style-name="ce2" office:value-type="string" calcext:value-type="string">
            <text:p>18.02.2026</text:p>
          </table:table-cell>
          <table:table-cell table:style-name="ce2" office:value-type="string" calcext:value-type="string">
            <text:p>Reālu procesu attēlošana grafikos.</text:p>
            <text:p>SR: Prot noteikt dažādas lineāras funkcijas īpašības, prot lasīt grafikus, uzzīmēt prasītos grafikus, prot noteikt krustpunktu koordinātas ar asīm.</text:p>
          </table:table-cell>
          <table:table-cell table:style-name="ce2" office:value-type="string" calcext:value-type="string">
            <text:p>236.lpp 72., 75.,76. uzdevumi.</text:p>
            <text:p>23.02.2026</text:p>
          </table:table-cell>
          <table:table-cell table:style-name="ce2" office:value-type="string" calcext:value-type="string">
            <text:p>Lineāra funkcija.</text:p>
          </table:table-cell>
        </table:table-row>
        <table:table-row table:style-name="ro4">
          <table:table-cell/>
          <table:table-cell table:style-name="ce2" office:value-type="string" calcext:value-type="string">
            <text:p>18.02.2026</text:p>
          </table:table-cell>
          <table:table-cell table:style-name="ce2" office:value-type="string" calcext:value-type="string">
            <text:p>Patstāvīgais darbs: Lineāra funkcija.Reālu procesu attēlošana grafikos.</text:p>
            <text:p>SR: Prot noteikt dažādas lineāras funkcijas īpašības, prot lasīt grafikus, uzzīmēt prasītos grafikus, prot noteikt krustpunktu koordinātas ar asīm.</text:p>
          </table:table-cell>
          <table:table-cell table:style-name="ce1"/>
          <table:table-cell table:style-name="ce2" office:value-type="string" calcext:value-type="string">
            <text:p>Lineāra funkcija.</text:p>
          </table:table-cell>
        </table:table-row>
        <table:table-row table:style-name="ro4">
          <table:table-cell/>
          <table:table-cell table:style-name="ce2" office:value-type="string" calcext:value-type="string">
            <text:p>17.02.2026</text:p>
          </table:table-cell>
          <table:table-cell table:style-name="ce2" office:value-type="string" calcext:value-type="string">
            <text:p>Punkta piederība grafikam, krustpunktu ar asīm aprēķināšana.</text:p>
            <text:p>SR: prot arēķināt nezināmo koordinātu, prot noteikt vai dotais punkts pieder grafikam,prot aprēķināt grafika krustpunktus ar koordinātu asīm.</text:p>
          </table:table-cell>
          <table:table-cell table:style-name="ce2" office:value-type="string" calcext:value-type="string">
            <text:p>231.lpp 61.,67. uzdevumi.</text:p>
            <text:p>18.02.2026</text:p>
          </table:table-cell>
          <table:table-cell table:style-name="ce2" office:value-type="string" calcext:value-type="string">
            <text:p>Lineāra funkcija.</text:p>
          </table:table-cell>
        </table:table-row>
        <table:table-row table:style-name="ro4">
          <table:table-cell/>
          <table:table-cell table:style-name="ce2" office:value-type="string" calcext:value-type="string">
            <text:p>17.02.2026</text:p>
          </table:table-cell>
          <table:table-cell table:style-name="ce2" office:value-type="string" calcext:value-type="string">
            <text:p>Lineāras funkcijas grafika īpašības.</text:p>
            <text:p>SR: Zina lineāras funkcijas īpašības, prot nolasīt no grafika prasīto informāciju, nosaka funkcijas maiņzīmju intervālus.</text:p>
          </table:table-cell>
          <table:table-cell table:style-name="ce1"/>
          <table:table-cell table:style-name="ce2" office:value-type="string" calcext:value-type="string">
            <text:p>Lineāra funkcija.</text:p>
          </table:table-cell>
        </table:table-row>
        <table:table-row table:style-name="ro3">
          <table:table-cell/>
          <table:table-cell table:style-name="ce2" office:value-type="string" calcext:value-type="string">
            <text:p>16.02.2026</text:p>
          </table:table-cell>
          <table:table-cell table:style-name="ce2" office:value-type="string" calcext:value-type="string">
            <text:p>Lineāras funkcijas koeficientu ietekme uz grafika novietojumu koordinātu plaknē.</text:p>
            <text:p>SR: Zina lineāras funkcijas parametru ietekmi uz grafika novietojumu koordinātu plaknē, zina, kad funkcija aug, kad dilst, prot noteikt vai aprēķināt grafika krustpunktus ar asīm.</text:p>
          </table:table-cell>
          <table:table-cell table:style-name="ce1"/>
          <table:table-cell table:style-name="ce2" office:value-type="string" calcext:value-type="string">
            <text:p>Lineāra funkcija.</text:p>
          </table:table-cell>
        </table:table-row>
        <table:table-row table:style-name="ro5">
          <table:table-cell/>
          <table:table-cell table:style-name="ce2" office:value-type="string" calcext:value-type="string">
            <text:p>16.02.2026</text:p>
          </table:table-cell>
          <table:table-cell table:style-name="ce2" office:value-type="string" calcext:value-type="string">
            <text:p>Lineāras funkcijas koeficientu ietekme uz grafika novietojumu koordinātu plaknē.</text:p>
            <text:p>SR: Zina lineāras funkcijas parametru ietekmi uz grafika novietojumu koordinātu plaknē, zina, kad funkcija aug, kad dilst, prot noteikt vai aprēķināt grafika krustpunktus ar asīm.</text:p>
          </table:table-cell>
          <table:table-cell table:style-name="ce2" office:value-type="string" calcext:value-type="string">
            <text:p>225.lpp 39.,40.,42.,43. uzdevumi ( elektroniski uzzīmēt un saprast, kā mainās taišņu novietojums koordinātu plaknē).</text:p>
            <text:p>17.02.2026</text:p>
          </table:table-cell>
          <table:table-cell table:style-name="ce2" office:value-type="string" calcext:value-type="string">
            <text:p>Lineāra funkcija.</text:p>
          </table:table-cell>
        </table:table-row>
        <table:table-row table:style-name="ro2">
          <table:table-cell/>
          <table:table-cell table:style-name="ce2" office:value-type="string" calcext:value-type="string">
            <text:p>11.02.2026</text:p>
          </table:table-cell>
          <table:table-cell table:style-name="ce2" office:value-type="string" calcext:value-type="string">
            <text:p>Lineāras funkcijas grafiku konstruēšana, vienības nogriežņa izvēle, y izteikšana no formulas.</text:p>
            <text:p>SR: Prot sastādīt vērtību tabulu, prot uzzīmēt funkcijas grafiku, prot izteikt y no dotās formulas, izvēlas atbilstošu vienības nogriezni uz asīm.</text:p>
          </table:table-cell>
          <table:table-cell table:style-name="ce2" office:value-type="string" calcext:value-type="string">
            <text:p>Pabeigt zīmēt grafikus, 38. uzdevums 224.lpp</text:p>
            <text:p>16.02.2026</text:p>
          </table:table-cell>
          <table:table-cell table:style-name="ce2" office:value-type="string" calcext:value-type="string">
            <text:p>Lineāra funkcija.</text:p>
          </table:table-cell>
        </table:table-row>
        <table:table-row table:style-name="ro3">
          <table:table-cell/>
          <table:table-cell table:style-name="ce2" office:value-type="string" calcext:value-type="string">
            <text:p>11.02.2026</text:p>
          </table:table-cell>
          <table:table-cell table:style-name="ce2" office:value-type="string" calcext:value-type="string">
            <text:p>Patstāvīgais darbs: Funkcijas pamatjēdzieni.Lineāra funkcija.</text:p>
            <text:p>SR: Zina, kas ir funkcija, prot koordinātu plaknē atlikt punktus, nosaka funkcijas īpašības. Zina, kas ir lineāra funkcija, zina tās īpašības.</text:p>
          </table:table-cell>
          <table:table-cell table:style-name="ce2" office:value-type="string" calcext:value-type="string">
            <text:p>Pabeigt zīmēt klasē iesāktos funkciju grafikus. 32.uzdevums.</text:p>
            <text:p>13.02.2026</text:p>
          </table:table-cell>
          <table:table-cell table:style-name="ce2" office:value-type="string" calcext:value-type="string">
            <text:p>Lineāra funkcija.</text:p>
          </table:table-cell>
        </table:table-row>
        <table:table-row table:style-name="ro4">
          <table:table-cell/>
          <table:table-cell table:style-name="ce2" office:value-type="string" calcext:value-type="string">
            <text:p>10.02.2026</text:p>
          </table:table-cell>
          <table:table-cell table:style-name="ce2" office:value-type="string" calcext:value-type="string">
            <text:p>Grafiku lasīšana.</text:p>
            <text:p>SR: Prot analizēt grafikā attēloto situāciju. Izdara secinājumus.</text:p>
          </table:table-cell>
          <table:table-cell table:style-name="ce2" office:value-type="string" calcext:value-type="string">
            <text:p>219.lpp 29.,30. uzdevumi.</text:p>
            <text:p>11.02.2026</text:p>
          </table:table-cell>
          <table:table-cell table:style-name="ce2" office:value-type="string" calcext:value-type="string">
            <text:p>Lineāra funkcija.</text:p>
          </table:table-cell>
        </table:table-row>
        <table:table-row table:style-name="ro8">
          <table:table-cell/>
          <table:table-cell table:style-name="ce2" office:value-type="string" calcext:value-type="string">
            <text:p>10.02.2026</text:p>
          </table:table-cell>
          <table:table-cell table:style-name="ce2" office:value-type="string" calcext:value-type="string">
            <text:p>Sakarība un funkcija. Funkcijas grafiks.</text:p>
            <text:p>SR: Prot noteikt, vai dotā sakarība ir funkcija. Prot lasīt grafukus.</text:p>
          </table:table-cell>
          <table:table-cell table:style-name="ce1"/>
          <table:table-cell table:style-name="ce2" office:value-type="string" calcext:value-type="string">
            <text:p>Lineāra funkcija.</text:p>
          </table:table-cell>
        </table:table-row>
        <table:table-row table:style-name="ro3">
          <table:table-cell/>
          <table:table-cell table:style-name="ce2" office:value-type="string" calcext:value-type="string">
            <text:p>9.02.2026</text:p>
          </table:table-cell>
          <table:table-cell table:style-name="ce2" office:value-type="string" calcext:value-type="string">
            <text:p>Funkcija, tās uzdošanas veidi.</text:p>
            <text:p>SR: Zina, kas ir funkcija, zina tās uzdošanas veidu, prot pāriet no viena veida uz citu veidu.</text:p>
          </table:table-cell>
          <table:table-cell table:style-name="ce2" office:value-type="string" calcext:value-type="string">
            <text:p>22., 23. uzdevumi.Pārbaudes darba kļūdu labojums.</text:p>
            <text:p>10.02.2026</text:p>
          </table:table-cell>
          <table:table-cell table:style-name="ce2" office:value-type="string" calcext:value-type="string">
            <text:p>Lineāra funkcija.</text:p>
          </table:table-cell>
        </table:table-row>
        <table:table-row table:style-name="ro4">
          <table:table-cell/>
          <table:table-cell table:style-name="ce2" office:value-type="string" calcext:value-type="string">
            <text:p>9.02.2026</text:p>
          </table:table-cell>
          <table:table-cell table:style-name="ce2" office:value-type="string" calcext:value-type="string">
            <text:p>Uzdevumi par koordinātu plakni, sakarība starp x un y.</text:p>
            <text:p>SR: Lieto koordinātu plakni uzdevumu risināšanā, saskata sakarības koordinātu plaknē.</text:p>
          </table:table-cell>
          <table:table-cell table:style-name="ce1"/>
          <table:table-cell table:style-name="ce2" office:value-type="string" calcext:value-type="string">
            <text:p>Lineāra funkcija.</text:p>
          </table:table-cell>
        </table:table-row>
        <table:table-row table:style-name="ro10">
          <table:table-cell/>
          <table:table-cell table:style-name="ce3" office:value-type="string" calcext:value-type="string">
            <text:p>4.02.2026</text:p>
          </table:table-cell>
          <table:table-cell table:style-name="ce3" office:value-type="string" calcext:value-type="string">
            <text:p>Trijstūris, tā elementi. Trijstūru vienādības pazīmes.</text:p>
          </table:table-cell>
          <table:table-cell table:style-name="ce4"/>
          <table:table-cell table:style-name="ce3" office:value-type="string" calcext:value-type="string">
            <text:p>Trijstūris, tā elementi: Trijstūru vienādības pazīmes.</text:p>
          </table:table-cell>
        </table:table-row>
        <table:table-row table:style-name="ro4">
          <table:table-cell/>
          <table:table-cell table:style-name="ce2" office:value-type="string" calcext:value-type="string">
            <text:p>4.02.2026</text:p>
          </table:table-cell>
          <table:table-cell table:style-name="ce2" office:value-type="string" calcext:value-type="string">
            <text:p>Sakarības un to grafiki.</text:p>
            <text:p>SR: Zina un lieto jēdzienus abscisa un ordināte, definīcjas kopa, vērtību kopa, sakarība, kvadranti, izvirza hipotēzi par dotās sakarības formulu.</text:p>
          </table:table-cell>
          <table:table-cell table:style-name="ce2" office:value-type="string" calcext:value-type="string">
            <text:p>3.,5. uzdevumi 210.lpp</text:p>
            <text:p>9.02.2026</text:p>
          </table:table-cell>
          <table:table-cell table:style-name="ce2" office:value-type="string" calcext:value-type="string">
            <text:p>Trijstūris, tā elementi: Trijstūru vienādības pazīmes.</text:p>
          </table:table-cell>
        </table:table-row>
        <table:table-row table:style-name="ro2">
          <table:table-cell/>
          <table:table-cell table:style-name="ce2" office:value-type="string" calcext:value-type="string">
            <text:p>3.02.2026</text:p>
          </table:table-cell>
          <table:table-cell table:style-name="ce2" office:value-type="string" calcext:value-type="string">
            <text:p>Kopsavilkums par vienādiem trijstūriem un trijstūru nevienādību.</text:p>
            <text:p>SR: Lieto trijstūru nevienādību pierādījumu un aprēķinu uzdevumos, zina trijstūru vienādības pazīmes, lieto tās pierādījumu un aprēķinu uzdevumos.</text:p>
          </table:table-cell>
          <table:table-cell table:style-name="ce2" office:value-type="string" calcext:value-type="string">
            <text:p>Pabeigt darba lapu, 181.lpp 10.,11. uzdevumi.</text:p>
            <text:p>4.02.2026</text:p>
          </table:table-cell>
          <table:table-cell table:style-name="ce2" office:value-type="string" calcext:value-type="string">
            <text:p>Trijstūris, tā elementi: Trijstūru vienādības pazīmes.</text:p>
          </table:table-cell>
        </table:table-row>
        <table:table-row table:style-name="ro10">
          <table:table-cell/>
          <table:table-cell table:style-name="ce2" office:value-type="string" calcext:value-type="string">
            <text:p>3.02.2026</text:p>
          </table:table-cell>
          <table:table-cell table:style-name="ce2" office:value-type="string" calcext:value-type="string">
            <text:p>Kopsavilkums par vienādiem trijstūriem un trijstūru nevienādību.</text:p>
            <text:p>SR: Lieto trijstūru nevienādību pierādījumu un aprēķinu uzdevumos, zina trijstūru vienādības pazīmes, lieto tās pierādījumu un aprēķinu uzdevumos.</text:p>
          </table:table-cell>
          <table:table-cell table:style-name="ce1"/>
          <table:table-cell table:style-name="ce2" office:value-type="string" calcext:value-type="string">
            <text:p>Trijstūris, tā elementi: Trijstūru vienādības pazīmes.</text:p>
          </table:table-cell>
        </table:table-row>
        <table:table-row table:style-name="ro10">
          <table:table-cell/>
          <table:table-cell table:style-name="ce2" office:value-type="string" calcext:value-type="string">
            <text:p>2.02.2026</text:p>
          </table:table-cell>
          <table:table-cell table:style-name="ce2" office:value-type="string" calcext:value-type="string">
            <text:p>Uzdevumu risināšana par trijstūru un to elementu vienādības pierādīšanu.</text:p>
            <text:p>SR: Lieto trijstūru vienādības pazīmes tristūru vienādības pierādīšanai. Izmantojot trijstūru vienādību pierāda elementu vienādību.</text:p>
          </table:table-cell>
          <table:table-cell table:style-name="ce2" office:value-type="string" calcext:value-type="string">
            <text:p>179.lpp 80., 180.lpp 8. uzdevumi.</text:p>
            <text:p>3.02.2026</text:p>
          </table:table-cell>
          <table:table-cell table:style-name="ce2" office:value-type="string" calcext:value-type="string">
            <text:p>Trijstūris, tā elementi: Trijstūru vienādības pazīmes.</text:p>
          </table:table-cell>
        </table:table-row>
        <table:table-row table:style-name="ro10">
          <table:table-cell/>
          <table:table-cell table:style-name="ce2" office:value-type="string" calcext:value-type="string">
            <text:p>2.02.2026</text:p>
          </table:table-cell>
          <table:table-cell table:style-name="ce2" office:value-type="string" calcext:value-type="string">
            <text:p>Uzdevumu risināšana par trijstūru un to elementu vienādības pierādīšanu.</text:p>
            <text:p>SR: Lieto trijstūru vienādības pazīmes tristūru vienādības pierādīšanai. Izmantojot trijstūru vienādību pierāda elementu vienādību.</text:p>
          </table:table-cell>
          <table:table-cell table:style-name="ce1"/>
          <table:table-cell table:style-name="ce2" office:value-type="string" calcext:value-type="string">
            <text:p>Trijstūris, tā elementi: Trijstūru vienādības pazīmes.</text:p>
          </table:table-cell>
        </table:table-row>
        <table:table-row table:style-name="ro10">
          <table:table-cell/>
          <table:table-cell table:style-name="ce2" office:value-type="string" calcext:value-type="string">
            <text:p>28.01.2026</text:p>
          </table:table-cell>
          <table:table-cell table:style-name="ce2" office:value-type="string" calcext:value-type="string">
            <text:p>Vienādi trijstūri, trijstūru vienādības pazīmes.</text:p>
            <text:p>SR:Zina trijstūru viuenādības pazīmes, lieto tās pierādījumu uzdevumos.</text:p>
          </table:table-cell>
          <table:table-cell table:style-name="ce2" office:value-type="string" calcext:value-type="string">
            <text:p>178.lpp 70.,72.,73., uzdevumi.</text:p>
            <text:p>2.02.2026</text:p>
          </table:table-cell>
          <table:table-cell table:style-name="ce2" office:value-type="string" calcext:value-type="string">
            <text:p>Trijstūris, tā elementi: Trijstūru vienādības pazīmes.</text:p>
          </table:table-cell>
        </table:table-row>
        <table:table-row table:style-name="ro10">
          <table:table-cell/>
          <table:table-cell table:style-name="ce2" office:value-type="string" calcext:value-type="string">
            <text:p>28.01.2026</text:p>
          </table:table-cell>
          <table:table-cell table:style-name="ce2" office:value-type="string" calcext:value-type="string">
            <text:p>Vienādi trijstūri, trijstūru vienādības pazīmes.</text:p>
            <text:p>SR:Atklāj trijstūru vienādības pazīmes. Zina tās.</text:p>
          </table:table-cell>
          <table:table-cell table:style-name="ce1"/>
          <table:table-cell table:style-name="ce2" office:value-type="string" calcext:value-type="string">
            <text:p>Trijstūris, tā elementi: Trijstūru vienādības pazīmes.</text:p>
          </table:table-cell>
        </table:table-row>
        <table:table-row table:style-name="ro10">
          <table:table-cell/>
          <table:table-cell table:style-name="ce2" office:value-type="string" calcext:value-type="string">
            <text:p>27.01.2026</text:p>
          </table:table-cell>
          <table:table-cell table:style-name="ce2" office:value-type="string" calcext:value-type="string">
            <text:p>Nogriežņi trijstūrī. Vienādi trijstūri.</text:p>
            <text:p>SR: Zina un atpazīst mediānu, bisektrisi un augstumu. Zina, kas ir vienādi trijstūri, Prot noteikt vienādu trijstūru vienādos elementus.</text:p>
          </table:table-cell>
          <table:table-cell table:style-name="ce1"/>
          <table:table-cell table:style-name="ce2" office:value-type="string" calcext:value-type="string">
            <text:p>Trijstūris, tā elementi: Trijstūru vienādības pazīmes.</text:p>
          </table:table-cell>
        </table:table-row>
        <table:table-row table:style-name="ro10">
          <table:table-cell/>
          <table:table-cell table:style-name="ce2" office:value-type="string" calcext:value-type="string">
            <text:p>27.01.2026</text:p>
          </table:table-cell>
          <table:table-cell table:style-name="ce2" office:value-type="string" calcext:value-type="string">
            <text:p>Nogriežņi trijstūrī. Vienādi trijstūri.</text:p>
            <text:p>SR: Zina un atpazīst mediānu, bisektrisi un augstumu. Zina, kas ir vienādi trijstūri, Prot noteikt vienādu trijstūru vienādos elementus.</text:p>
          </table:table-cell>
          <table:table-cell table:style-name="ce2" office:value-type="string" calcext:value-type="string">
            <text:p>168.lpp 43.,45.,46.,55. uzdevumi.</text:p>
            <text:p>28.01.2026</text:p>
          </table:table-cell>
          <table:table-cell table:style-name="ce2" office:value-type="string" calcext:value-type="string">
            <text:p>Trijstūris, tā elementi: Trijstūru vienādības pazīmes.</text:p>
          </table:table-cell>
        </table:table-row>
        <table:table-row table:style-name="ro10">
          <table:table-cell/>
          <table:table-cell table:style-name="ce2" office:value-type="string" calcext:value-type="string">
            <text:p>26.01.2026</text:p>
          </table:table-cell>
          <table:table-cell table:style-name="ce2" office:value-type="string" calcext:value-type="string">
            <text:p>Nogriežņi trijstūrī: mediāna, bisektrise, augstums.</text:p>
            <text:p>SR: Zina, kas ir trijstūra mediāna, bisektrise augstums, atpazīst šos nogriežņus zīmējumā, prot tos iezīmēt zīmējumā, lieto to īpašības uzdevumu risināšanā.</text:p>
          </table:table-cell>
          <table:table-cell table:style-name="ce2" office:value-type="string" calcext:value-type="string">
            <text:p>164.lpp 39.,40. uzdevumi.</text:p>
            <text:p>27.01.2026</text:p>
          </table:table-cell>
          <table:table-cell table:style-name="ce2" office:value-type="string" calcext:value-type="string">
            <text:p>Trijstūris, tā elementi: Trijstūru vienādības pazīmes.</text:p>
          </table:table-cell>
        </table:table-row>
        <table:table-row table:style-name="ro2">
          <table:table-cell/>
          <table:table-cell table:style-name="ce2" office:value-type="string" calcext:value-type="string">
            <text:p>26.01.2026</text:p>
          </table:table-cell>
          <table:table-cell table:style-name="ce2" office:value-type="string" calcext:value-type="string">
            <text:p>Uzdevumu risināšana par trijstūriem (vienādojumu sastādīšana).Trijstūru nevienādība.</text:p>
            <text:p>SR: Prot risināt ģeometrijas uzdevumus sastādot vienādojumu. Lieto trijstūra nevienādību alas garum noteikšanai.</text:p>
          </table:table-cell>
          <table:table-cell table:style-name="ce1"/>
          <table:table-cell table:style-name="ce2" office:value-type="string" calcext:value-type="string">
            <text:p>Trijstūris, tā elementi: Trijstūru vienādības pazīmes.</text:p>
          </table:table-cell>
        </table:table-row>
        <table:table-row table:style-name="ro2">
          <table:table-cell/>
          <table:table-cell table:style-name="ce2" office:value-type="string" calcext:value-type="string">
            <text:p>21.01.2026</text:p>
          </table:table-cell>
          <table:table-cell table:style-name="ce2" office:value-type="string" calcext:value-type="string">
            <text:p>Trijstūris, tā elementi un nogriežņi trijstūrī.</text:p>
            <text:p>SR: Zinas trijstūra elementus, trijstūra eksistences nosacījumus. Zina jādzienus: mediāna, bisektrise, augstums, atpazīst tos zīmējumā un prot iezīmēt trijstūrī.</text:p>
          </table:table-cell>
          <table:table-cell table:style-name="ce2" office:value-type="string" calcext:value-type="string">
            <text:p>162.lpp 24., 28.</text:p>
            <text:p>26.01.2026</text:p>
          </table:table-cell>
          <table:table-cell table:style-name="ce2" office:value-type="string" calcext:value-type="string">
            <text:p>Trijstūris, tā elementi: Trijstūru vienādības pazīmes.</text:p>
          </table:table-cell>
        </table:table-row>
        <table:table-row table:style-name="ro2">
          <table:table-cell/>
          <table:table-cell table:style-name="ce2" office:value-type="string" calcext:value-type="string">
            <text:p>21.01.2026</text:p>
          </table:table-cell>
          <table:table-cell table:style-name="ce2" office:value-type="string" calcext:value-type="string">
            <text:p>Patstāvīgais darbs: Lauzta līnija, daudzstūris. Trijstūris, tā elementi, trijstūra nevienādība.</text:p>
            <text:p>SR: Zina lauztas līnijas veidus un elementus, prot aprēķināt tās garumu vai posmu garumu. Zina, kas ir daudzstūris, diagonāle, perimetrs.</text:p>
          </table:table-cell>
          <table:table-cell table:style-name="ce1"/>
          <table:table-cell table:style-name="ce2" office:value-type="string" calcext:value-type="string">
            <text:p>Trijstūris, tā elementi: Trijstūru vienādības pazīmes.</text:p>
          </table:table-cell>
        </table:table-row>
        <table:table-row table:style-name="ro4">
          <table:table-cell/>
          <table:table-cell table:style-name="ce2" office:value-type="string" calcext:value-type="string">
            <text:p>20.01.2026</text:p>
          </table:table-cell>
          <table:table-cell table:style-name="ce2" office:value-type="string" calcext:value-type="string">
            <text:p>Radoši uzdevumi par daudzstūru diagonālēm un ārējiem leņķiem.</text:p>
            <text:p>SR: Lieto esošās zināšanas nestandarta uzdevumu risināšanā. Spriež un analizē uzdevumā dotās situācijas.</text:p>
          </table:table-cell>
          <table:table-cell table:style-name="ce2" office:value-type="string" calcext:value-type="string">
            <text:p>Pabeigt 157.lpp 13. uzdevumu.</text:p>
            <text:p>21.01.2026</text:p>
          </table:table-cell>
          <table:table-cell table:style-name="ce2" office:value-type="string" calcext:value-type="string">
            <text:p>Trijstūris, tā elementi: Trijstūru vienādības pazīmes.</text:p>
          </table:table-cell>
        </table:table-row>
        <table:table-row table:style-name="ro4">
          <table:table-cell/>
          <table:table-cell table:style-name="ce2" office:value-type="string" calcext:value-type="string">
            <text:p>20.01.2026</text:p>
          </table:table-cell>
          <table:table-cell table:style-name="ce2" office:value-type="string" calcext:value-type="string">
            <text:p>Daudzstūris, tā perimetrs, malu garumu, leņķu lielumi.</text:p>
            <text:p>SR: Prot aprēķināt daudzstūra malu garumus, ja dots perimetrs, prot analizēt dažādu situāciju uzdevumus par daudzstūriem.</text:p>
          </table:table-cell>
          <table:table-cell table:style-name="ce1"/>
          <table:table-cell table:style-name="ce2" office:value-type="string" calcext:value-type="string">
            <text:p>Trijstūris, tā elementi: Trijstūru vienādības pazīmes.</text:p>
          </table:table-cell>
        </table:table-row>
        <table:table-row table:style-name="ro3">
          <table:table-cell/>
          <table:table-cell table:style-name="ce2" office:value-type="string" calcext:value-type="string">
            <text:p>19.01.2026</text:p>
          </table:table-cell>
          <table:table-cell table:style-name="ce2" office:value-type="string" calcext:value-type="string">
            <text:p>Daudzstūris, tā elementi.</text:p>
            <text:p>SR: Prot nodefinēt daudzstūri. zina tā elementus. Zina daudzstūru veidus.</text:p>
          </table:table-cell>
          <table:table-cell table:style-name="ce2" office:value-type="string" calcext:value-type="string">
            <text:p>156.lpp 4.,8.,9.,10. uzdevumi. Pārbaudes darba kļūdu labojums.</text:p>
            <text:p>20.01.2026</text:p>
          </table:table-cell>
          <table:table-cell table:style-name="ce2" office:value-type="string" calcext:value-type="string">
            <text:p>Trijstūris, tā elementi: Trijstūru vienādības pazīmes.</text:p>
          </table:table-cell>
        </table:table-row>
        <table:table-row table:style-name="ro4">
          <table:table-cell/>
          <table:table-cell table:style-name="ce2" office:value-type="string" calcext:value-type="string">
            <text:p>19.01.2026</text:p>
          </table:table-cell>
          <table:table-cell table:style-name="ce2" office:value-type="string" calcext:value-type="string">
            <text:p>Lauzta līnija.</text:p>
            <text:p>SR: Zinas, kas ir lauzta līnija. Zina lauztas līnijas veidus. Zina, kāds var būt attālums starp lauztas līnijas galapunktiem.</text:p>
          </table:table-cell>
          <table:table-cell table:style-name="ce1"/>
          <table:table-cell table:style-name="ce2" office:value-type="string" calcext:value-type="string">
            <text:p>Trijstūris, tā elementi: Trijstūru vienādības pazīmes.</text:p>
          </table:table-cell>
        </table:table-row>
        <table:table-row table:style-name="ro3">
          <table:table-cell/>
          <table:table-cell table:style-name="ce3" office:value-type="string" calcext:value-type="string">
            <text:p>14.01.2026</text:p>
          </table:table-cell>
          <table:table-cell table:style-name="ce3" office:value-type="string" calcext:value-type="string">
            <text:p>Lineāras nevienādības.</text:p>
            <text:p>SR: Prot salīdzināt skaitliskas izteiksmes, vārdisku apgalvojumu prot uzrakstīt kā nevienādību, prot atrisināt nevienādību, attēlot atrisinājumu uz skitļu ass un pierkastīt kā intervālu, prot sastādīt nevienādību no dotā teksta.Analizē nevienādības patiesumu dažādām mainīgo vērtībām.</text:p>
          </table:table-cell>
          <table:table-cell table:style-name="ce4"/>
          <table:table-cell table:style-name="ce3" office:value-type="string" calcext:value-type="string">
            <text:p>Lineāras nevienādības.</text:p>
          </table:table-cell>
        </table:table-row>
        <table:table-row table:style-name="ro2">
          <table:table-cell/>
          <table:table-cell table:style-name="ce2" office:value-type="string" calcext:value-type="string">
            <text:p>14.01.2026</text:p>
          </table:table-cell>
          <table:table-cell table:style-name="ce2" office:value-type="string" calcext:value-type="string">
            <text:p>Kopsavilkums par nevienādībām.Teksta uzdevumu risināšana, sastādot nevienādību.</text:p>
            <text:p>SR: Saprot tekstu, ievieš mainīgo, sastāda nevienādību, atrisina nevienādību.Prot atrisināt lineāras nevienādības.</text:p>
          </table:table-cell>
          <table:table-cell table:style-name="ce1"/>
          <table:table-cell table:style-name="ce2" office:value-type="string" calcext:value-type="string">
            <text:p>Lineāras nevienādības.</text:p>
          </table:table-cell>
        </table:table-row>
        <table:table-row table:style-name="ro7">
          <table:table-cell/>
          <table:table-cell table:style-name="ce2" office:value-type="string" calcext:value-type="string">
            <text:p>13.01.2026</text:p>
          </table:table-cell>
          <table:table-cell table:style-name="ce2" office:value-type="string" calcext:value-type="string">
            <text:p>Kopsavilkums par nevienādībām.Teksta uzdevumu risināšana, sastādot nevienādību.</text:p>
            <text:p>SR: Saprot tekstu, ievieš mainīgo, sastāda nevienādību, atrisina nevienādību.Prot atrisināt lineāras nevienādības.</text:p>
          </table:table-cell>
          <table:table-cell table:style-name="ce2" office:value-type="string" calcext:value-type="string">
            <text:p>Darba lapas- gatavošanās pārbaudes darbam. (Katram pēc spējām, gribēšanas un varēšanas).</text:p>
            <text:p>14.01.2026</text:p>
          </table:table-cell>
          <table:table-cell table:style-name="ce2" office:value-type="string" calcext:value-type="string">
            <text:p>Lineāras nevienādības.</text:p>
          </table:table-cell>
        </table:table-row>
        <table:table-row table:style-name="ro8">
          <table:table-cell/>
          <table:table-cell table:style-name="ce2" office:value-type="string" calcext:value-type="string">
            <text:p>13.01.2026</text:p>
          </table:table-cell>
          <table:table-cell table:style-name="ce2" office:value-type="string" calcext:value-type="string">
            <text:p>Teksta uzdevumu risināšana, sastādot nevienādību.</text:p>
            <text:p>SR: Saprot tekstu, ievieš mainīgo, sastāda nevienādību, atrisina nevienādību.</text:p>
          </table:table-cell>
          <table:table-cell table:style-name="ce1"/>
          <table:table-cell table:style-name="ce2" office:value-type="string" calcext:value-type="string">
            <text:p>Lineāras nevienādības.</text:p>
          </table:table-cell>
        </table:table-row>
        <table:table-row table:style-name="ro4">
          <table:table-cell/>
          <table:table-cell table:style-name="ce2" office:value-type="string" calcext:value-type="string">
            <text:p>12.01.2026</text:p>
          </table:table-cell>
          <table:table-cell table:style-name="ce2" office:value-type="string" calcext:value-type="string">
            <text:p>Teksta uzdevumu risināšana, sastādot nevienādību.</text:p>
            <text:p>SR: Saprot tekstu, ievieš mainīgo, sastāda nevienādību, atrisina nevienādību.</text:p>
          </table:table-cell>
          <table:table-cell table:style-name="ce2" office:value-type="string" calcext:value-type="string">
            <text:p>Darba lapas 5.97, 5.98, 5.101, 5.109</text:p>
            <text:p>13.01.2026</text:p>
          </table:table-cell>
          <table:table-cell table:style-name="ce2" office:value-type="string" calcext:value-type="string">
            <text:p>Lineāras nevienādības.</text:p>
          </table:table-cell>
        </table:table-row>
        <table:table-row table:style-name="ro8">
          <table:table-cell/>
          <table:table-cell table:style-name="ce2" office:value-type="string" calcext:value-type="string">
            <text:p>12.01.2026</text:p>
          </table:table-cell>
          <table:table-cell table:style-name="ce2" office:value-type="string" calcext:value-type="string">
            <text:p>Teksta uzdevumu risināšana, sastādot nevienādību.</text:p>
            <text:p>SR: Saprot tekstu, ievieš mainīgo, sastāda nevienādību, atrisina nevienādību.</text:p>
          </table:table-cell>
          <table:table-cell table:style-name="ce1"/>
          <table:table-cell table:style-name="ce2" office:value-type="string" calcext:value-type="string">
            <text:p>Lineāras nevienādības.</text:p>
          </table:table-cell>
        </table:table-row>
        <table:table-row table:style-name="ro2">
          <table:table-cell/>
          <table:table-cell table:style-name="ce2" office:value-type="string" calcext:value-type="string">
            <text:p>7.01.2026</text:p>
          </table:table-cell>
          <table:table-cell table:style-name="ce2" office:value-type="string" calcext:value-type="string">
            <text:p>Patstāvīgais darbs:Lineāras nevienādības atrisināšana.Lineāras nevienādības, kurās jānosaka atrisinājums ar papildus nosacījumiem.</text:p>
            <text:p>SR: Prot atrisināt nevienādību, attēlot atrisinājumu uz skaitļu ass, pierakstīt kā intervālu.</text:p>
          </table:table-cell>
          <table:table-cell table:style-name="ce2" office:value-type="string" calcext:value-type="string">
            <text:p>145.lpp 49.,50.,51. uzdevumi.</text:p>
            <text:p>12.01.2026</text:p>
          </table:table-cell>
          <table:table-cell table:style-name="ce2" office:value-type="string" calcext:value-type="string">
            <text:p>Lineāras nevienādības.</text:p>
          </table:table-cell>
        </table:table-row>
        <table:table-row table:style-name="ro3">
          <table:table-cell/>
          <table:table-cell table:style-name="ce2" office:value-type="string" calcext:value-type="string">
            <text:p>7.01.2026</text:p>
          </table:table-cell>
          <table:table-cell table:style-name="ce2" office:value-type="string" calcext:value-type="string">
            <text:p>Nevienādību īpašības, to lietošana nevienādību risināšanā.Divkāršās nevienādības risināšana.</text:p>
            <text:p>SR: Prot atrisināt vienkāršākās lineārās nevienādības, lietojot nevienādību īpašības, prot attēlot nevienādības atrisinājumu uz skaitļu ass, pieraksta atrisinājumu kā intervālu.</text:p>
          </table:table-cell>
          <table:table-cell table:style-name="ce1"/>
          <table:table-cell table:style-name="ce2" office:value-type="string" calcext:value-type="string">
            <text:p>Lineāras nevienādības.</text:p>
          </table:table-cell>
        </table:table-row>
        <table:table-row table:style-name="ro3">
          <table:table-cell/>
          <table:table-cell table:style-name="ce2" office:value-type="string" calcext:value-type="string">
            <text:p>6.01.2026</text:p>
          </table:table-cell>
          <table:table-cell table:style-name="ce2" office:value-type="string" calcext:value-type="string">
            <text:p>Lineāru nevienādību atrisināšana.Nevienādību īpašības, to lietošana nevienādību risināšanā.</text:p>
            <text:p>SR: Prot atrisināt lineārās nevienādības ( arī iekavu atvēršana), lietojot nevienādību īpašības, prot attēlot nevienādības atrisinājumu uz skaitļu ass, pieraksta atrisinājumu kā intervālu.</text:p>
          </table:table-cell>
          <table:table-cell table:style-name="ce2" office:value-type="string" calcext:value-type="string">
            <text:p>144.lpp 42.,45. (pabeigt) uzdevumi.</text:p>
            <text:p>7.01.2026</text:p>
          </table:table-cell>
          <table:table-cell table:style-name="ce2" office:value-type="string" calcext:value-type="string">
            <text:p>Lineāras nevienādības.</text:p>
          </table:table-cell>
        </table:table-row>
        <table:table-row table:style-name="ro3">
          <table:table-cell/>
          <table:table-cell table:style-name="ce2" office:value-type="string" calcext:value-type="string">
            <text:p>6.01.2026</text:p>
          </table:table-cell>
          <table:table-cell table:style-name="ce2" office:value-type="string" calcext:value-type="string">
            <text:p>Lineāru nevienādību atrisināšana.Nevienādību īpašības, to lietošana nevienādību risināšanā.</text:p>
            <text:p>SR: Prot atrisināt vienkāršākās lineārās nevienādības, lietojot nevienādību īpašības, prot attēlot nevienādības atrisinājumu uz skaitļu ass, pieraksta atrisinājumu kā intervālu.</text:p>
          </table:table-cell>
          <table:table-cell table:style-name="ce1"/>
          <table:table-cell table:style-name="ce2" office:value-type="string" calcext:value-type="string">
            <text:p>Lineāras nevienādības.</text:p>
          </table:table-cell>
        </table:table-row>
        <table:table-row table:style-name="ro3">
          <table:table-cell/>
          <table:table-cell table:style-name="ce2" office:value-type="string" calcext:value-type="string">
            <text:p>5.01.2026</text:p>
          </table:table-cell>
          <table:table-cell table:style-name="ce2" office:value-type="string" calcext:value-type="string">
            <text:p>Lineāru nevienādību atrisināšana.Ekvivalentas nevienādības.Nevienādību īpašības.</text:p>
            <text:p>SR: Zina, kas ir ekvivalentas nevienādības. Prot pārbaudīt, vai nevienādības ir ekvivalentas.Prot noteikt, vai skaitlis ir nevienādības atrisinājums. Prot atrisināt vienkāršākās lineārās nevienādības, lietojot nevienādību īpašības.</text:p>
          </table:table-cell>
          <table:table-cell table:style-name="ce2" office:value-type="string" calcext:value-type="string">
            <text:p>143.lpp 36. (pabeigt), 38. uzdevumi.</text:p>
            <text:p>6.01.2026</text:p>
          </table:table-cell>
          <table:table-cell table:style-name="ce2" office:value-type="string" calcext:value-type="string">
            <text:p>Lineāras nevienādības.</text:p>
          </table:table-cell>
        </table:table-row>
        <table:table-row table:style-name="ro3">
          <table:table-cell/>
          <table:table-cell table:style-name="ce2" office:value-type="string" calcext:value-type="string">
            <text:p>5.01.2026</text:p>
          </table:table-cell>
          <table:table-cell table:style-name="ce2" office:value-type="string" calcext:value-type="string">
            <text:p>Lineāru nevienādību atrisināšana.Ekvivalentas nevienādības.Nevienādību īpašības.</text:p>
            <text:p>SR: Zina, kas ir ekvivalentas nevienādības. Prot pārbaudīt, vai nevienādības ir ekvivalentas.Prot noteikt, vai skaitlis ir nevienādības atrisinājums. Prot atrisināt vienkāršākās lineārās nevienādības, lietojot nevienādību īpašības.</text:p>
          </table:table-cell>
          <table:table-cell table:style-name="ce1"/>
          <table:table-cell table:style-name="ce2" office:value-type="string" calcext:value-type="string">
            <text:p>Lineāras nevienādības.</text:p>
          </table:table-cell>
        </table:table-row>
        <table:table-row table:style-name="ro8">
          <table:table-cell/>
          <table:table-cell table:style-name="ce2" office:value-type="string" calcext:value-type="string">
            <text:p>15.12.2025</text:p>
          </table:table-cell>
          <table:table-cell table:style-name="ce2" office:value-type="string" calcext:value-type="string">
            <text:p>I semestra vērtējums</text:p>
          </table:table-cell>
          <table:table-cell table:style-name="ce1"/>
          <table:table-cell table:style-name="ce2" office:value-type="string" calcext:value-type="string">
            <text:p>Lineāras nevienādības.</text:p>
          </table:table-cell>
        </table:table-row>
        <table:table-row table:style-name="ro4">
          <table:table-cell/>
          <table:table-cell table:style-name="ce2" office:value-type="string" calcext:value-type="string">
            <text:p>19.12.2025</text:p>
          </table:table-cell>
          <table:table-cell table:style-name="ce2" office:value-type="string" calcext:value-type="string">
            <text:p>Nevienādības, kas satur mainīgo.</text:p>
            <text:p>SR: Prot izlasīt nevienādību, prot nevienādību attēlot uz skaitļu ass, prot to pierakstīt kā intervālu.</text:p>
          </table:table-cell>
          <table:table-cell table:style-name="ce1"/>
          <table:table-cell table:style-name="ce2" office:value-type="string" calcext:value-type="string">
            <text:p>Lineāras nevienādības.</text:p>
          </table:table-cell>
        </table:table-row>
        <table:table-row table:style-name="ro4">
          <table:table-cell/>
          <table:table-cell table:style-name="ce2" office:value-type="string" calcext:value-type="string">
            <text:p>19.12.2025</text:p>
          </table:table-cell>
          <table:table-cell table:style-name="ce2" office:value-type="string" calcext:value-type="string">
            <text:p>Nevienādības, kas satur mainīgo.</text:p>
            <text:p>SR: Prot izlasīt nevienādību, prot nevienādību attēlot uz skaitļu ass, prot to pierakstīt kā intervālu.</text:p>
          </table:table-cell>
          <table:table-cell table:style-name="ce1"/>
          <table:table-cell table:style-name="ce2" office:value-type="string" calcext:value-type="string">
            <text:p>Lineāras nevienādības.</text:p>
          </table:table-cell>
        </table:table-row>
        <table:table-row table:style-name="ro4">
          <table:table-cell/>
          <table:table-cell table:style-name="ce2" office:value-type="string" calcext:value-type="string">
            <text:p>16.12.2025</text:p>
          </table:table-cell>
          <table:table-cell table:style-name="ce2" office:value-type="string" calcext:value-type="string">
            <text:p>Divkāršā nevienādība.</text:p>
            <text:p>SR: Prot izlasīt un uzrakstīt divkāršo nevienādību, prot to attēlot uz ass un pierakstīt intervāla veidā.</text:p>
          </table:table-cell>
          <table:table-cell table:style-name="ce1"/>
          <table:table-cell table:style-name="ce2" office:value-type="string" calcext:value-type="string">
            <text:p>Lineāras nevienādības.</text:p>
          </table:table-cell>
        </table:table-row>
        <table:table-row table:style-name="ro4">
          <table:table-cell/>
          <table:table-cell table:style-name="ce2" office:value-type="string" calcext:value-type="string">
            <text:p>16.12.2025</text:p>
          </table:table-cell>
          <table:table-cell table:style-name="ce2" office:value-type="string" calcext:value-type="string">
            <text:p>Divkāršā nevienādība.</text:p>
            <text:p>SR: Prot izlasīt un uzrakstīt divkāršo nevienādību, prot to attēlot uz ass un pierakstīt intervāla veidā.</text:p>
          </table:table-cell>
          <table:table-cell table:style-name="ce1"/>
          <table:table-cell table:style-name="ce2" office:value-type="string" calcext:value-type="string">
            <text:p>Lineāras nevienādības.</text:p>
          </table:table-cell>
        </table:table-row>
        <table:table-row table:style-name="ro2">
          <table:table-cell/>
          <table:table-cell table:style-name="ce2" office:value-type="string" calcext:value-type="string">
            <text:p>15.12.2025</text:p>
          </table:table-cell>
          <table:table-cell table:style-name="ce2" office:value-type="string" calcext:value-type="string">
            <text:p>Nevienādības, kas satur mainīgo.</text:p>
            <text:p>SR: Prot izlasīt nevienādību, prot nevienādību attēlot uz skaitļu ass, prot to pierakstīt kā intervālu.</text:p>
          </table:table-cell>
          <table:table-cell table:style-name="ce2" office:value-type="string" calcext:value-type="string">
            <text:p>Pārbaudes darba kļūdu labojums. 135.lpp 13.,14.</text:p>
            <text:p>16.12.2025</text:p>
          </table:table-cell>
          <table:table-cell table:style-name="ce2" office:value-type="string" calcext:value-type="string">
            <text:p>Lineāras nevienādības.</text:p>
          </table:table-cell>
        </table:table-row>
        <table:table-row table:style-name="ro2">
          <table:table-cell/>
          <table:table-cell table:style-name="ce2" office:value-type="string" calcext:value-type="string">
            <text:p>15.12.2025</text:p>
          </table:table-cell>
          <table:table-cell table:style-name="ce2" office:value-type="string" calcext:value-type="string">
            <text:p>Lineāru nevienādību risināšana.</text:p>
            <text:p>SR: No lineāras nevienādības prot izteikt mainīgo, prot atvērt iekavas, savilkt līdzīgos saskaitāmos, prot attēlot nevienādību uz skaitļu ass un pierkastīt kā intervālu.</text:p>
          </table:table-cell>
          <table:table-cell table:style-name="ce1"/>
          <table:table-cell table:style-name="ce2" office:value-type="string" calcext:value-type="string">
            <text:p>Lineāras nevienādības.</text:p>
          </table:table-cell>
        </table:table-row>
        <table:table-row table:style-name="ro2">
          <table:table-cell/>
          <table:table-cell table:style-name="ce2" office:value-type="string" calcext:value-type="string">
            <text:p>12.12.2025</text:p>
          </table:table-cell>
          <table:table-cell table:style-name="ce2" office:value-type="string" calcext:value-type="string">
            <text:p>Lineāru nevienādību risināšana.</text:p>
            <text:p>SR: No lineāras nevienādības prot izteikt mainīgo, prot atvērt iekavas, savilkt līdzīgos saskaitāmos, prot attēlot nevienādību uz skaitļu ass un pierkastīt kā intervālu.</text:p>
          </table:table-cell>
          <table:table-cell table:style-name="ce1"/>
          <table:table-cell table:style-name="ce2" office:value-type="string" calcext:value-type="string">
            <text:p>Lineāras nevienādības.</text:p>
          </table:table-cell>
        </table:table-row>
        <table:table-row table:style-name="ro4">
          <table:table-cell/>
          <table:table-cell table:style-name="ce2" office:value-type="string" calcext:value-type="string">
            <text:p>12.12.2025</text:p>
          </table:table-cell>
          <table:table-cell table:style-name="ce2" office:value-type="string" calcext:value-type="string">
            <text:p>Nevienādības, kas satur mainīgo.</text:p>
            <text:p>SR: Prot izlasīt nevienādību, prot nevienādību attēlot uz skaitļu ass, prot to pierakstīt kā intervālu.</text:p>
          </table:table-cell>
          <table:table-cell table:style-name="ce1"/>
          <table:table-cell table:style-name="ce2" office:value-type="string" calcext:value-type="string">
            <text:p>Lineāras nevienādības.</text:p>
          </table:table-cell>
        </table:table-row>
        <table:table-row table:style-name="ro4">
          <table:table-cell/>
          <table:table-cell table:style-name="ce2" office:value-type="string" calcext:value-type="string">
            <text:p>9.12.2025</text:p>
          </table:table-cell>
          <table:table-cell table:style-name="ce2" office:value-type="string" calcext:value-type="string">
            <text:p>Nevienādības, nevienādību zīmes.</text:p>
            <text:p>SR: Zina stingrās un nestingrās nevienādību zīmes, prot salīdzināt skaitļus, lieto nevienādības zīmes, ja ir mainīgais lielums.</text:p>
          </table:table-cell>
          <table:table-cell table:style-name="ce1"/>
          <table:table-cell table:style-name="ce2" office:value-type="string" calcext:value-type="string">
            <text:p>Lineāras nevienādības.</text:p>
          </table:table-cell>
        </table:table-row>
        <table:table-row table:style-name="ro3">
          <table:table-cell/>
          <table:table-cell table:style-name="ce3" office:value-type="string" calcext:value-type="string">
            <text:p>9.12.2025</text:p>
          </table:table-cell>
          <table:table-cell table:style-name="ce3" office:value-type="string" calcext:value-type="string">
            <text:p>Lineāri vienādojumi, to lietojums teksta uzdevumu risināšanā.</text:p>
            <text:p>SR:Zina, kas ir vienādojuma sakne, prot pārbaudīt, vai skaitlis ir vienādojuma sakne, Prot atrisināt lineāru vienādojumu, prot sastādīt vienādojumu dotajam teksta uzdevumam, prot aprēķināt teksta uzdevumā prasīto. Pēc dotā zīmējuma prot sastādīt teksta uzdevumu un to atrisināt.</text:p>
          </table:table-cell>
          <table:table-cell table:style-name="ce4"/>
          <table:table-cell table:style-name="ce3" office:value-type="string" calcext:value-type="string">
            <text:p>Lineāri vienādojumi, to lietojums teksta uzdevumu risināšanā.</text:p>
          </table:table-cell>
        </table:table-row>
        <table:table-row table:style-name="ro11">
          <table:table-cell/>
          <table:table-cell table:style-name="ce2" office:value-type="string" calcext:value-type="string">
            <text:p>8.12.2025</text:p>
          </table:table-cell>
          <table:table-cell table:style-name="ce2" office:value-type="string" calcext:value-type="string">
            <text:p>Kopsavilkums par lineāru vienādojumu risināšanu un vienādojumu lietošanu teksta uzdevumu risināšanā.</text:p>
            <text:p>SR: Prot atrisināt lineāru vienādojumu, prot pārbaudīt, vai skaitlis ir vienādojuma sakne, prot sastādīt tekstam atbilstošu vienādojumu un to atrisināt.</text:p>
          </table:table-cell>
          <table:table-cell table:style-name="ce2" office:value-type="string" calcext:value-type="string">
            <text:p>Klasē iedotās darba lapas.</text:p>
            <text:p>9.12.2025</text:p>
          </table:table-cell>
          <table:table-cell table:style-name="ce2" office:value-type="string" calcext:value-type="string">
            <text:p>Lineāri vienādojumi, to lietojums teksta uzdevumu risināšanā.</text:p>
          </table:table-cell>
        </table:table-row>
        <table:table-row table:style-name="ro11">
          <table:table-cell/>
          <table:table-cell table:style-name="ce2" office:value-type="string" calcext:value-type="string">
            <text:p>8.12.2025</text:p>
          </table:table-cell>
          <table:table-cell table:style-name="ce2" office:value-type="string" calcext:value-type="string">
            <text:p>Kopsavilkums par lineāru vienādojumu risināšanu un vienādojumu lietošanu teksta uzdevumu risināšanā.</text:p>
            <text:p>SR: Prot atrisināt lineāru vienādojumu, prot pārbaudīt, vai skaitlis ir vienādojuma sakne, prot sastādīt tekstam atbilstošu vienādojumu un to atrisināt.</text:p>
          </table:table-cell>
          <table:table-cell table:style-name="ce1"/>
          <table:table-cell table:style-name="ce2" office:value-type="string" calcext:value-type="string">
            <text:p>Lineāri vienādojumi, to lietojums teksta uzdevumu risināšanā.</text:p>
          </table:table-cell>
        </table:table-row>
        <table:table-row table:style-name="ro12">
          <table:table-cell/>
          <table:table-cell table:style-name="ce2" office:value-type="string" calcext:value-type="string">
            <text:p>5.12.2025</text:p>
          </table:table-cell>
          <table:table-cell table:style-name="ce2" office:value-type="string" calcext:value-type="string">
            <text:p>Dažādu teksta uzdevumu risināšana, sastādot vienādojumu.</text:p>
            <text:p>SR: Izprot tekstu, prot eviest mainīgo, prot sastādīt tekstam atbilstošu vienādojumu, lieto vienādojuma īpašības nezināmā aprēķināšanai. Prot aprēķināt uzdevumā prasīto lielumu.</text:p>
          </table:table-cell>
          <table:table-cell table:style-name="ce2" office:value-type="string" calcext:value-type="string">
            <text:p><text:a xlink:href="https://maconis.zvaigzne.lv/produkts/592" xlink:type="simple">https://maconis.zvaigzne.lv/produkts/592 </text:a>-Ar šiem uzdevumiem var gatavoties pārbaudes darbam. Obligātais mājas darbs: 125.,126.,127. uzdevumi 103.lpp</text:p>
            <text:p>8.12.2025</text:p>
          </table:table-cell>
          <table:table-cell table:style-name="ce2" office:value-type="string" calcext:value-type="string">
            <text:p>Lineāri vienādojumi, to lietojums teksta uzdevumu risināšanā.</text:p>
          </table:table-cell>
        </table:table-row>
        <table:table-row table:style-name="ro2">
          <table:table-cell/>
          <table:table-cell table:style-name="ce2" office:value-type="string" calcext:value-type="string">
            <text:p>5.12.2025</text:p>
          </table:table-cell>
          <table:table-cell table:style-name="ce2" office:value-type="string" calcext:value-type="string">
            <text:p>Patstāvīgais darbs: Vienādojumi un teksta uzdevums. Teksta uzdevumi par procentiem ( izmantojot vienādojuma sastādīšanu).</text:p>
            <text:p>SR: Zina, kas ir vienādojuma sakne. Prot atrisināt lineāru vienādojumu. Prot no dotā teksta sastādīt vienādojumu un atrisināt to.</text:p>
          </table:table-cell>
          <table:table-cell table:style-name="ce1"/>
          <table:table-cell table:style-name="ce2" office:value-type="string" calcext:value-type="string">
            <text:p>Lineāri vienādojumi, to lietojums teksta uzdevumu risināšanā.</text:p>
          </table:table-cell>
        </table:table-row>
        <table:table-row table:style-name="ro10">
          <table:table-cell/>
          <table:table-cell table:style-name="ce2" office:value-type="string" calcext:value-type="string">
            <text:p>2.12.2025</text:p>
          </table:table-cell>
          <table:table-cell table:style-name="ce2" office:value-type="string" calcext:value-type="string">
            <text:p>Procenti teksta uzdevumos.</text:p>
            <text:p>SR: Prot aprēķināt procentu vērtību, aprēķināt visu lielumu, ja dota tā procentuālā vērtība, prot sastādīt proporciju un atrisināt to.</text:p>
          </table:table-cell>
          <table:table-cell table:style-name="ce2" office:value-type="string" calcext:value-type="string">
            <text:p>98.lpp 110.,116.,118. uzdevumi.</text:p>
            <text:p>5.12.2025</text:p>
          </table:table-cell>
          <table:table-cell table:style-name="ce2" office:value-type="string" calcext:value-type="string">
            <text:p>Lineāri vienādojumi, to lietojums teksta uzdevumu risināšanā.</text:p>
          </table:table-cell>
        </table:table-row>
        <table:table-row table:style-name="ro10">
          <table:table-cell/>
          <table:table-cell table:style-name="ce2" office:value-type="string" calcext:value-type="string">
            <text:p>2.12.2025</text:p>
          </table:table-cell>
          <table:table-cell table:style-name="ce2" office:value-type="string" calcext:value-type="string">
            <text:p>Proporcijas lietošana teksta uzdevumu risināšanā.</text:p>
            <text:p>SR: Saprot tekstu, atpazīst tiešo un apgriezto proporcionalitāti, prot sastādīt proporciju un aprēķināt nezināmo locekli.Prot aprēķināt teksta uzdevumā prasīto.</text:p>
          </table:table-cell>
          <table:table-cell table:style-name="ce1"/>
          <table:table-cell table:style-name="ce2" office:value-type="string" calcext:value-type="string">
            <text:p>Lineāri vienādojumi, to lietojums teksta uzdevumu risināšanā.</text:p>
          </table:table-cell>
        </table:table-row>
        <table:table-row table:style-name="ro2">
          <table:table-cell/>
          <table:table-cell table:style-name="ce2" office:value-type="string" calcext:value-type="string">
            <text:p>1.12.2025</text:p>
          </table:table-cell>
          <table:table-cell table:style-name="ce2" office:value-type="string" calcext:value-type="string">
            <text:p>Teksta uzdevumu risināšana, sastādot vienādojumu.</text:p>
            <text:p>SR: Izprot tekstu, prot ieviest mainīgo un atkarībā no tā prot satādīt tekstam atbilstošu vienādojumu un atrisināt to.</text:p>
          </table:table-cell>
          <table:table-cell table:style-name="ce2" office:value-type="string" calcext:value-type="string">
            <text:p>92.lpp 76.,84.,87.,94.,95. uzdevumi</text:p>
            <text:p>2.12.2025</text:p>
          </table:table-cell>
          <table:table-cell table:style-name="ce2" office:value-type="string" calcext:value-type="string">
            <text:p>Lineāri vienādojumi, to lietojums teksta uzdevumu risināšanā.</text:p>
          </table:table-cell>
        </table:table-row>
        <table:table-row table:style-name="ro4">
          <table:table-cell/>
          <table:table-cell table:style-name="ce2" office:value-type="string" calcext:value-type="string">
            <text:p>1.12.2025</text:p>
          </table:table-cell>
          <table:table-cell table:style-name="ce2" office:value-type="string" calcext:value-type="string">
            <text:p>Teksta uzdevumu risināšana, sastādot vienādojumu.</text:p>
            <text:p>SR: Izprot tekstu, prot ieviest mainīgo un atkarībā no tā prot satādīt tekstam atbilstošu vienādojumu un atrisināt to.</text:p>
          </table:table-cell>
          <table:table-cell table:style-name="ce1"/>
          <table:table-cell table:style-name="ce2" office:value-type="string" calcext:value-type="string">
            <text:p>Lineāri vienādojumi, to lietojums teksta uzdevumu risināšanā.</text:p>
          </table:table-cell>
        </table:table-row>
        <table:table-row table:style-name="ro4">
          <table:table-cell/>
          <table:table-cell table:style-name="ce2" office:value-type="string" calcext:value-type="string">
            <text:p>28.11.2025</text:p>
          </table:table-cell>
          <table:table-cell table:style-name="ce2" office:value-type="string" calcext:value-type="string">
            <text:p>Vienādojumu sastādīšana.</text:p>
            <text:p>SR: Izprot tekstu, prot sastādīt tekstam atbilstošu izteiksmi vai vienādojumu.</text:p>
          </table:table-cell>
          <table:table-cell table:style-name="ce1"/>
          <table:table-cell table:style-name="ce2" office:value-type="string" calcext:value-type="string">
            <text:p>Lineāri vienādojumi, to lietojums teksta uzdevumu risināšanā.</text:p>
          </table:table-cell>
        </table:table-row>
        <table:table-row table:style-name="ro2">
          <table:table-cell/>
          <table:table-cell table:style-name="ce2" office:value-type="string" calcext:value-type="string">
            <text:p>28.11.2025</text:p>
          </table:table-cell>
          <table:table-cell table:style-name="ce2" office:value-type="string" calcext:value-type="string">
            <text:p>Patstāvīgais darbs: Izteiksmju sastādīšana. Mainīgā izteikšana no formulas.Vienādojumu sastādīšanas plāns.</text:p>
            <text:p>SR: Izprot tekstu, prot sastādīt tekstam atbilstošu izteiksmi vai vienādojumu. prot izteikt mainīgo no formulas.</text:p>
          </table:table-cell>
          <table:table-cell table:style-name="ce1"/>
          <table:table-cell table:style-name="ce2" office:value-type="string" calcext:value-type="string">
            <text:p>Lineāri vienādojumi, to lietojums teksta uzdevumu risināšanā.</text:p>
          </table:table-cell>
        </table:table-row>
        <table:table-row table:style-name="ro4">
          <table:table-cell/>
          <table:table-cell table:style-name="ce2" office:value-type="string" calcext:value-type="string">
            <text:p>25.11.2025</text:p>
          </table:table-cell>
          <table:table-cell table:style-name="ce2" office:value-type="string" calcext:value-type="string">
            <text:p>Formulu veidošana.</text:p>
            <text:p>SR: Izprot tekstu, saskata sakarību, izveido formulu. Prot no formulas aprēķināt prasīto lielumu.</text:p>
          </table:table-cell>
          <table:table-cell table:style-name="ce2" office:value-type="string" calcext:value-type="string">
            <text:p>92.lpp 73. uzdevums.</text:p>
            <text:p>28.11.2025</text:p>
          </table:table-cell>
          <table:table-cell table:style-name="ce2" office:value-type="string" calcext:value-type="string">
            <text:p>Lineāri vienādojumi, to lietojums teksta uzdevumu risināšanā.</text:p>
          </table:table-cell>
        </table:table-row>
        <table:table-row table:style-name="ro4">
          <table:table-cell/>
          <table:table-cell table:style-name="ce2" office:value-type="string" calcext:value-type="string">
            <text:p>25.11.2025</text:p>
          </table:table-cell>
          <table:table-cell table:style-name="ce2" office:value-type="string" calcext:value-type="string">
            <text:p>Formulu veidošana.</text:p>
            <text:p>SR: Izprot tekstu, saskata sakarību, izveido formulu. Prot no formulas aprēķināt prasīto lielumu.</text:p>
          </table:table-cell>
          <table:table-cell table:style-name="ce1"/>
          <table:table-cell table:style-name="ce2" office:value-type="string" calcext:value-type="string">
            <text:p>Lineāri vienādojumi, to lietojums teksta uzdevumu risināšanā.</text:p>
          </table:table-cell>
        </table:table-row>
        <table:table-row table:style-name="ro4">
          <table:table-cell/>
          <table:table-cell table:style-name="ce2" office:value-type="string" calcext:value-type="string">
            <text:p>24.11.2025</text:p>
          </table:table-cell>
          <table:table-cell table:style-name="ce2" office:value-type="string" calcext:value-type="string">
            <text:p>Patstāvīgais darbs: vienādojuma atrisināšana. Formulu veidošana.</text:p>
            <text:p>SR: Prot atrisināt lineāru vienādojumu.</text:p>
          </table:table-cell>
          <table:table-cell table:style-name="ce2" office:value-type="string" calcext:value-type="string">
            <text:p>68. uzdevums 88. lpp.</text:p>
            <text:p>25.11.2025</text:p>
          </table:table-cell>
          <table:table-cell table:style-name="ce2" office:value-type="string" calcext:value-type="string">
            <text:p>Lineāri vienādojumi, to lietojums teksta uzdevumu risināšanā.</text:p>
          </table:table-cell>
        </table:table-row>
        <table:table-row table:style-name="ro4">
          <table:table-cell/>
          <table:table-cell table:style-name="ce2" office:value-type="string" calcext:value-type="string">
            <text:p>24.11.2025</text:p>
          </table:table-cell>
          <table:table-cell table:style-name="ce2" office:value-type="string" calcext:value-type="string">
            <text:p>Formulu veidošana.</text:p>
            <text:p>SR: Izprot tekstu, saskata sakarību, izveido formulu. Prot no formulas aprēķināt prasīto lielumu.</text:p>
          </table:table-cell>
          <table:table-cell table:style-name="ce1"/>
          <table:table-cell table:style-name="ce2" office:value-type="string" calcext:value-type="string">
            <text:p>Lineāri vienādojumi, to lietojums teksta uzdevumu risināšanā.</text:p>
          </table:table-cell>
        </table:table-row>
        <table:table-row table:style-name="ro2">
          <table:table-cell/>
          <table:table-cell table:style-name="ce2" office:value-type="string" calcext:value-type="string">
            <text:p>21.11.2025</text:p>
          </table:table-cell>
          <table:table-cell table:style-name="ce2" office:value-type="string" calcext:value-type="string">
            <text:p>Lineāri vienādojumi.</text:p>
            <text:p>SR: Zina, kas ir lineārs vienādojums, zina, cik atrisinājumu var būt lineāram vienādojumam, lietojot vienādojuma īpašības, prot atrisināt vienādojumu. No dotā teksta prot sastādīt lineāru vienādojumu un to atrisināt.</text:p>
          </table:table-cell>
          <table:table-cell table:style-name="ce2" office:value-type="string" calcext:value-type="string">
            <text:p>104.lpp 6. uzdevums.</text:p>
            <text:p>24.11.2025</text:p>
          </table:table-cell>
          <table:table-cell table:style-name="ce2" office:value-type="string" calcext:value-type="string">
            <text:p>Lineāri vienādojumi, to lietojums teksta uzdevumu risināšanā.</text:p>
          </table:table-cell>
        </table:table-row>
        <table:table-row table:style-name="ro2">
          <table:table-cell/>
          <table:table-cell table:style-name="ce2" office:value-type="string" calcext:value-type="string">
            <text:p>21.11.2025</text:p>
          </table:table-cell>
          <table:table-cell table:style-name="ce2" office:value-type="string" calcext:value-type="string">
            <text:p>Vienādojumu risināšana.</text:p>
            <text:p>SR: Zina, kas ir vienādojuma sakne, prot pārbaudīt, vai skaitlis ir vienādojuma sakne. Prot atvērt iekavas un , lietojot vienādojuma īpašības, aprēķina vienādojuma sakni.</text:p>
          </table:table-cell>
          <table:table-cell table:style-name="ce1"/>
          <table:table-cell table:style-name="ce2" office:value-type="string" calcext:value-type="string">
            <text:p>Lineāri vienādojumi, to lietojums teksta uzdevumu risināšanā.</text:p>
          </table:table-cell>
        </table:table-row>
        <table:table-row table:style-name="ro2">
          <table:table-cell/>
          <table:table-cell table:style-name="ce2" office:value-type="string" calcext:value-type="string">
            <text:p>14.11.2025</text:p>
          </table:table-cell>
          <table:table-cell table:style-name="ce2" office:value-type="string" calcext:value-type="string">
            <text:p>Vienādojuma sakņu skaits. Vienādojumu risināšana, izmantojot to īpašības.</text:p>
            <text:p>SR: Prot atrisināt vienkāršākos lineāros vienādojumus, Lieto vienādojuma īpašības. Zina, kad vienādojumam nav atrisinājuma, kad ir bezgalīgi daudz atrisinājumu.</text:p>
          </table:table-cell>
          <table:table-cell table:style-name="ce1"/>
          <table:table-cell table:style-name="ce2" office:value-type="string" calcext:value-type="string">
            <text:p>Lineāri vienādojumi, to lietojums teksta uzdevumu risināšanā.</text:p>
          </table:table-cell>
        </table:table-row>
        <table:table-row table:style-name="ro3">
          <table:table-cell/>
          <table:table-cell table:style-name="ce2" office:value-type="string" calcext:value-type="string">
            <text:p>14.11.2025</text:p>
          </table:table-cell>
          <table:table-cell table:style-name="ce2" office:value-type="string" calcext:value-type="string">
            <text:p>Vienādojuma sakņu skaits. Vienādojumu risināšana, izmantojot to īpašības. Patstāvīgais darbs: Vienādojuma atrisināšana.</text:p>
            <text:p>SR: Prot atrisināt vienkāršākos lineāros vienādojumus, Lieto vienādojuma īpašības. Zina, kad vienādojumam nav atrisinājuma, kad ir bezgalīgi daudz atrisinājumu.</text:p>
          </table:table-cell>
          <table:table-cell table:style-name="ce1"/>
          <table:table-cell table:style-name="ce2" office:value-type="string" calcext:value-type="string">
            <text:p>Lineāri vienādojumi, to lietojums teksta uzdevumu risināšanā.</text:p>
          </table:table-cell>
        </table:table-row>
        <table:table-row table:style-name="ro2">
          <table:table-cell/>
          <table:table-cell table:style-name="ce2" office:value-type="string" calcext:value-type="string">
            <text:p>11.11.2025</text:p>
          </table:table-cell>
          <table:table-cell table:style-name="ce2" office:value-type="string" calcext:value-type="string">
            <text:p>Vienādojuma īpašības, to lietošana sakņu aprēķināšanai.</text:p>
            <text:p>SR:Zina un lieto uzdevumu risināšanā vienādojuma īpašības. Prot atrisināt vienādojumu, lietojot vienādojuma īpašības.</text:p>
          </table:table-cell>
          <table:table-cell table:style-name="ce2" office:value-type="string" calcext:value-type="string">
            <text:p>83.lpp 49. uzdevums ( pabeigt klasē iesākto ).</text:p>
            <text:p>14.11.2025</text:p>
          </table:table-cell>
          <table:table-cell table:style-name="ce2" office:value-type="string" calcext:value-type="string">
            <text:p>Lineāri vienādojumi, to lietojums teksta uzdevumu risināšanā.</text:p>
          </table:table-cell>
        </table:table-row>
        <table:table-row table:style-name="ro4">
          <table:table-cell/>
          <table:table-cell table:style-name="ce2" office:value-type="string" calcext:value-type="string">
            <text:p>11.11.2025</text:p>
          </table:table-cell>
          <table:table-cell table:style-name="ce2" office:value-type="string" calcext:value-type="string">
            <text:p>Vienādojuma īpašības, to lietošana sakņu aprēķināšanai.</text:p>
            <text:p>SR:Zina un lieto uzdevumu risināšanā vienādojuma īpašības. Prot atrisināt vienādojumu, lietojot vienādojuma īpašības.</text:p>
          </table:table-cell>
          <table:table-cell table:style-name="ce1"/>
          <table:table-cell table:style-name="ce2" office:value-type="string" calcext:value-type="string">
            <text:p>Lineāri vienādojumi, to lietojums teksta uzdevumu risināšanā.</text:p>
          </table:table-cell>
        </table:table-row>
        <table:table-row table:style-name="ro2">
          <table:table-cell/>
          <table:table-cell table:style-name="ce2" office:value-type="string" calcext:value-type="string">
            <text:p>10.11.2025</text:p>
          </table:table-cell>
          <table:table-cell table:style-name="ce2" office:value-type="string" calcext:value-type="string">
            <text:p>Vienādojums, tā sakne.</text:p>
            <text:p>SR: Zina, kas ir vienādojums, zina, kas ir vienādojuma sakne. Prot pārbaudīt, vai skaitlis ir vienādojuma sakne, prot atrisināt vienkāršākos vienādojumus.</text:p>
          </table:table-cell>
          <table:table-cell table:style-name="ce2" office:value-type="string" calcext:value-type="string">
            <text:p>Uzdevumi pielikumā.</text:p>
            <text:p> md_vienadojumi.docx</text:p>
            <text:p>11.11.2025</text:p>
          </table:table-cell>
          <table:table-cell table:style-name="ce2" office:value-type="string" calcext:value-type="string">
            <text:p>Lineāri vienādojumi, to lietojums teksta uzdevumu risināšanā.</text:p>
          </table:table-cell>
        </table:table-row>
        <table:table-row table:style-name="ro4">
          <table:table-cell/>
          <table:table-cell table:style-name="ce2" office:value-type="string" calcext:value-type="string">
            <text:p>10.11.2025</text:p>
          </table:table-cell>
          <table:table-cell table:style-name="ce2" office:value-type="string" calcext:value-type="string">
            <text:p>Vienādojums, tā sakne.</text:p>
            <text:p>SR: Zina, kas ir vienādojums, zina, kas ir vienādojuma sakne. Prot pārbaudīt, vai skaitlis ir vienādojuma sakne, prot atrisināt vienkāršākos vienādojumus.</text:p>
          </table:table-cell>
          <table:table-cell table:style-name="ce1"/>
          <table:table-cell table:style-name="ce2" office:value-type="string" calcext:value-type="string">
            <text:p>Lineāri vienādojumi, to lietojums teksta uzdevumu risināšanā.</text:p>
          </table:table-cell>
        </table:table-row>
        <table:table-row table:style-name="ro4">
          <table:table-cell/>
          <table:table-cell table:style-name="ce2" office:value-type="string" calcext:value-type="string">
            <text:p>8.11.2025</text:p>
          </table:table-cell>
          <table:table-cell table:style-name="ce2" office:value-type="string" calcext:value-type="string">
            <text:p>Vienādojuma mainīgā aprēķināšana (vienkāršākie gadījumi).</text:p>
            <text:p>SR: Prot izteikt mainīgo no vienas darbības vienādojuma. Prot izpildīt darbības mainīgā aprēķināšanā.</text:p>
          </table:table-cell>
          <table:table-cell table:style-name="ce1"/>
          <table:table-cell table:style-name="ce2" office:value-type="string" calcext:value-type="string">
            <text:p>Lineāri vienādojumi, to lietojums teksta uzdevumu risināšanā.</text:p>
          </table:table-cell>
        </table:table-row>
        <table:table-row table:style-name="ro2">
          <table:table-cell/>
          <table:table-cell table:style-name="ce2" office:value-type="string" calcext:value-type="string">
            <text:p>8.11.2025</text:p>
          </table:table-cell>
          <table:table-cell table:style-name="ce2" office:value-type="string" calcext:value-type="string">
            <text:p>Vienādojums, tā sakne.</text:p>
            <text:p>SR: Zina, kas ir vienādojums, zina, kas ir vienādojuma sakne. Prot pārbaudīt, vai skaitlis ir vienādojuma sakne, prot atrisināt vienkāršākos vienādojumus.</text:p>
          </table:table-cell>
          <table:table-cell table:style-name="ce2" office:value-type="string" calcext:value-type="string">
            <text:p>Uzdevumi pielikumā.</text:p>
            <text:p> md_vienadojumi.docx</text:p>
            <text:p>10.11.2025</text:p>
          </table:table-cell>
          <table:table-cell table:style-name="ce2" office:value-type="string" calcext:value-type="string">
            <text:p>Lineāri vienādojumi, to lietojums teksta uzdevumu risināšanā.</text:p>
          </table:table-cell>
        </table:table-row>
        <table:table-row table:style-name="ro3">
          <table:table-cell/>
          <table:table-cell table:style-name="ce3" office:value-type="string" calcext:value-type="string">
            <text:p>7.11.2025</text:p>
          </table:table-cell>
          <table:table-cell table:style-name="ce3" office:value-type="string" calcext:value-type="string">
            <text:p>Skaitliskas un algebriskas izteiksmes.</text:p>
            <text:p>SR:SR:Prot no dotā teksta sastādīt atbilstošu algebrisku izteiksmi un aprēķināt tās vērtību, ja dota mainīgā vērtība. Prot izpildīt darbības ar racionāliem skaitļiem. Prot atvērt iekavas un savilkt līdzīgos saksaitāmos. Prot izteiksmi ieslēgt iekavās, ja to priekšā ir plus vai mīnuss zīme.</text:p>
          </table:table-cell>
          <table:table-cell table:style-name="ce4"/>
          <table:table-cell table:style-name="ce3" office:value-type="string" calcext:value-type="string">
            <text:p>Skaitliskas un algebriskas izteiksmes: No teksta sastāda atbilstošu izteiksmi.</text:p>
          </table:table-cell>
        </table:table-row>
        <table:table-row table:style-name="ro3">
          <table:table-cell/>
          <table:table-cell table:style-name="ce2" office:value-type="string" calcext:value-type="string">
            <text:p>7.11.2025</text:p>
          </table:table-cell>
          <table:table-cell table:style-name="ce2" office:value-type="string" calcext:value-type="string">
            <text:p>Kopsavilkums par skaitliskām un algebriskām izteiksmēm.</text:p>
            <text:p>SR:Prot no dotā teksta sastādīt atbilstošu algebrisku izteiksmi un aprēķināt tās vērtību, ja dota mainīgā vērtība. Prot izpildīt darbības ar racionāliem skaitļiem. Prot atvērt iekavas un savilkt līdzīgos saksaitāmos. Prot izteiksmi ieslēgt iekavās, ja to priekšā ir plus vai mīnuss zīme.</text:p>
          </table:table-cell>
          <table:table-cell table:style-name="ce2" office:value-type="string" calcext:value-type="string">
            <text:p>Darba lapa jāpabeidz.</text:p>
            <text:p>8.11.2025</text:p>
          </table:table-cell>
          <table:table-cell table:style-name="ce3" office:value-type="string" calcext:value-type="string">
            <text:p>Skaitliskas un algebriskas izteiksmes: No teksta sastāda atbilstošu izteiksmi.</text:p>
          </table:table-cell>
        </table:table-row>
        <table:table-row table:style-name="ro3">
          <table:table-cell/>
          <table:table-cell table:style-name="ce2" office:value-type="string" calcext:value-type="string">
            <text:p>4.11.2025</text:p>
          </table:table-cell>
          <table:table-cell table:style-name="ce2" office:value-type="string" calcext:value-type="string">
            <text:p>Kopsavilkums par skaitliskām un algebriskām izteiksmēm.</text:p>
            <text:p>SR:Prot no dotā teksta sastādīt atbilstošu algebrisku izteiksmi un aprēķināt tās vērtību, ja dota mainīgā vērtība. Prot izpildīt darbības ar racionāliem skaitļiem. Prot atvērt iekavas un savilkt līdzīgos saksaitāmos. Prot izteiksmi ieslēgt iekavās, ja to priekšā ir plus vai mīnuss zīme.</text:p>
          </table:table-cell>
          <table:table-cell table:style-name="ce2" office:value-type="string" calcext:value-type="string">
            <text:p>Darba lapa 159.lpp</text:p>
            <text:p>7.11.2025</text:p>
          </table:table-cell>
          <table:table-cell table:style-name="ce3" office:value-type="string" calcext:value-type="string">
            <text:p>Skaitliskas un algebriskas izteiksmes: No teksta sastāda atbilstošu izteiksmi.</text:p>
          </table:table-cell>
        </table:table-row>
        <table:table-row table:style-name="ro3">
          <table:table-cell/>
          <table:table-cell table:style-name="ce2" office:value-type="string" calcext:value-type="string">
            <text:p>4.11.2025</text:p>
          </table:table-cell>
          <table:table-cell table:style-name="ce2" office:value-type="string" calcext:value-type="string">
            <text:p>Kopsavilkums par skaitliskām un algebriskām izteiksmēm.</text:p>
            <text:p>SR:Prot no dotā teksta sastādīt atbilstošu algebrisku izteiksmi un aprēķināt tās vērtību, ja dota mainīgā vērtība. Prot izpildīt darbības ar racionāliem skaitļiem. Prot atvērt iekavas un savilkt līdzīgos saksaitāmos. Prot izteiksmi ieslēgt iekavās, ja to priekšā ir plus vai mīnuss zīme.</text:p>
          </table:table-cell>
          <table:table-cell table:style-name="ce1"/>
          <table:table-cell table:style-name="ce3" office:value-type="string" calcext:value-type="string">
            <text:p>Skaitliskas un algebriskas izteiksmes: No teksta sastāda atbilstošu izteiksmi.</text:p>
          </table:table-cell>
        </table:table-row>
        <table:table-row table:style-name="ro3">
          <table:table-cell/>
          <table:table-cell table:style-name="ce2" office:value-type="string" calcext:value-type="string">
            <text:p>3.11.2025</text:p>
          </table:table-cell>
          <table:table-cell table:style-name="ce2" office:value-type="string" calcext:value-type="string">
            <text:p>Līdzīgo saskaitāmo savilkšana, iekavu atvēršana.</text:p>
            <text:p>SR: Zina, kas ir līdzīgi monomi, prot tos saskatīt, saskaitīt un atņemt. Prot atvērt iekavas, ja to priekšā ir "+", "-" vai reizināšana.</text:p>
          </table:table-cell>
          <table:table-cell table:style-name="ce1"/>
          <table:table-cell table:style-name="ce3" office:value-type="string" calcext:value-type="string">
            <text:p>Skaitliskas un algebriskas izteiksmes: No teksta sastāda atbilstošu izteiksmi.</text:p>
          </table:table-cell>
        </table:table-row>
        <table:table-row table:style-name="ro3">
          <table:table-cell/>
          <table:table-cell table:style-name="ce2" office:value-type="string" calcext:value-type="string">
            <text:p>3.11.2025</text:p>
          </table:table-cell>
          <table:table-cell table:style-name="ce2" office:value-type="string" calcext:value-type="string">
            <text:p>Līdzīgo saskaitāmo savilkšana, iekavu atvēršana.</text:p>
            <text:p>SR: Zina, kas ir līdzīgi monomi, prot tos saskatīt, saskaitīt un atņemt. Prot atvērt iekavas, ja to priekšā ir "+", "-" vai reizināšana.</text:p>
          </table:table-cell>
          <table:table-cell table:style-name="ce1"/>
          <table:table-cell table:style-name="ce3" office:value-type="string" calcext:value-type="string">
            <text:p>Skaitliskas un algebriskas izteiksmes: No teksta sastāda atbilstošu izteiksmi.</text:p>
          </table:table-cell>
        </table:table-row>
        <table:table-row table:style-name="ro3">
          <table:table-cell/>
          <table:table-cell table:style-name="ce2" office:value-type="string" calcext:value-type="string">
            <text:p>31.10.2025</text:p>
          </table:table-cell>
          <table:table-cell table:style-name="ce2" office:value-type="string" calcext:value-type="string">
            <text:p>Līdzīgo saskaitāmo savilkšana, iekavu atvēršana.</text:p>
            <text:p>SR: Zina, kas ir līdzīgi monomi, prot tos saskatīt, saskaitīt un atņemt. Prot atvērt iekavas, ja to priekšā ir "+", "-" vai reizināšana.</text:p>
          </table:table-cell>
          <table:table-cell table:style-name="ce2" office:value-type="string" calcext:value-type="string">
            <text:p>75.lpp 26.,28. uzdevumi</text:p>
            <text:p>3.11.2025</text:p>
          </table:table-cell>
          <table:table-cell table:style-name="ce3" office:value-type="string" calcext:value-type="string">
            <text:p>Skaitliskas un algebriskas izteiksmes: No teksta sastāda atbilstošu izteiksmi.</text:p>
          </table:table-cell>
        </table:table-row>
        <table:table-row table:style-name="ro3">
          <table:table-cell/>
          <table:table-cell table:style-name="ce2" office:value-type="string" calcext:value-type="string">
            <text:p>31.10.2025</text:p>
          </table:table-cell>
          <table:table-cell table:style-name="ce2" office:value-type="string" calcext:value-type="string">
            <text:p>Patstāvīgais darbs: Izteiksmju sastādīšana, monomu saskatīšana. Līdzīgo saskaitāmo savilkšana, iekavu atvēršana.</text:p>
            <text:p>SR: Prot no dotā teksta izveidot skaitlisku vai algebrisku izteiksmi. Zina, kas ir līdzīgi monomi, prot tos saskatīt, saskaitīt un atņemt. Prot atvērt iekavas, ja to priekšā ir "+", "-" vai reizināšana.</text:p>
          </table:table-cell>
          <table:table-cell table:style-name="ce1"/>
          <table:table-cell table:style-name="ce3" office:value-type="string" calcext:value-type="string">
            <text:p>Skaitliskas un algebriskas izteiksmes: No teksta sastāda atbilstošu izteiksmi.</text:p>
          </table:table-cell>
        </table:table-row>
        <table:table-row table:style-name="ro3">
          <table:table-cell/>
          <table:table-cell table:style-name="ce2" office:value-type="string" calcext:value-type="string">
            <text:p>28.10.2025</text:p>
          </table:table-cell>
          <table:table-cell table:style-name="ce2" office:value-type="string" calcext:value-type="string">
            <text:p>Monomu saskaitīšana un atņemšana.</text:p>
            <text:p>SR: Zina, kādus monomus drīkst saskaitīt vai atņemt. saskata līdzīgus monomus un izpilda saskaitīšanu vai atņemšanu.</text:p>
          </table:table-cell>
          <table:table-cell table:style-name="ce2" office:value-type="string" calcext:value-type="string">
            <text:p>Pārbaudes darba kļūdu labojums. Mācību grāmatās 22. uzdevums 75.lpp</text:p>
            <text:p>31.10.2025</text:p>
          </table:table-cell>
          <table:table-cell table:style-name="ce3" office:value-type="string" calcext:value-type="string">
            <text:p>Skaitliskas un algebriskas izteiksmes: No teksta sastāda atbilstošu izteiksmi.</text:p>
          </table:table-cell>
        </table:table-row>
        <table:table-row table:style-name="ro3">
          <table:table-cell/>
          <table:table-cell table:style-name="ce2" office:value-type="string" calcext:value-type="string">
            <text:p>28.10.2025</text:p>
          </table:table-cell>
          <table:table-cell table:style-name="ce2" office:value-type="string" calcext:value-type="string">
            <text:p>Monoma jēdziens, to veidi.</text:p>
            <text:p>SR: Zina, kas ir monoms, zina, kas ir vienādi, pretēji, līdzīgi monomi.</text:p>
          </table:table-cell>
          <table:table-cell table:style-name="ce1"/>
          <table:table-cell table:style-name="ce3" office:value-type="string" calcext:value-type="string">
            <text:p>Skaitliskas un algebriskas izteiksmes: No teksta sastāda atbilstošu izteiksmi.</text:p>
          </table:table-cell>
        </table:table-row>
        <table:table-row table:style-name="ro3">
          <table:table-cell/>
          <table:table-cell table:style-name="ce2" office:value-type="string" calcext:value-type="string">
            <text:p>27.10.2025</text:p>
          </table:table-cell>
          <table:table-cell table:style-name="ce2" office:value-type="string" calcext:value-type="string">
            <text:p>Algebriskas izteiksmes, to sastādīšana.</text:p>
            <text:p>SR: Zina, kas ir skaitliska, kas algebriska izteiksme. Prot aprēķināt izteiksmes vērtību, ja dota mainīgā vērtība. Prot sastādīt algebrisku izteiksmi no dotā teksta.</text:p>
          </table:table-cell>
          <table:table-cell table:style-name="ce2" office:value-type="string" calcext:value-type="string">
            <text:p>68.lpp 2., 5. (2. stabiņš ), 70.lpp 12. uzd.</text:p>
            <text:p>28.10.2025</text:p>
          </table:table-cell>
          <table:table-cell table:style-name="ce3" office:value-type="string" calcext:value-type="string">
            <text:p>Skaitliskas un algebriskas izteiksmes: No teksta sastāda atbilstošu izteiksmi.</text:p>
          </table:table-cell>
        </table:table-row>
        <table:table-row table:style-name="ro3">
          <table:table-cell/>
          <table:table-cell table:style-name="ce2" office:value-type="string" calcext:value-type="string">
            <text:p>27.10.2025</text:p>
          </table:table-cell>
          <table:table-cell table:style-name="ce2" office:value-type="string" calcext:value-type="string">
            <text:p>Algebriskas izteiksmes.</text:p>
            <text:p>SR: Zina, kas ir skaitliska, kas algebriska izteiksme. Prot aprēķināt izteiksmes vērtību, ja dota mainīgā vērtība. Prot sastādīt algebrisku izteiksmi no dotā teksta.</text:p>
          </table:table-cell>
          <table:table-cell table:style-name="ce1"/>
          <table:table-cell table:style-name="ce3" office:value-type="string" calcext:value-type="string">
            <text:p>Skaitliskas un algebriskas izteiksmes: No teksta sastāda atbilstošu izteiksmi.</text:p>
          </table:table-cell>
        </table:table-row>
        <table:table-row table:style-name="ro3">
          <table:table-cell/>
          <table:table-cell table:style-name="ce2" office:value-type="string" calcext:value-type="string">
            <text:p>17.10.2025</text:p>
          </table:table-cell>
          <table:table-cell table:style-name="ce2" office:value-type="string" calcext:value-type="string">
            <text:p>Skaitliskas izteiksmes.</text:p>
            <text:p>SR: Atkārto darbības ar racionāliem skaitļiem. Prot saistīto pierakstu, ievēro darbību secību.</text:p>
          </table:table-cell>
          <table:table-cell table:style-name="ce2" office:value-type="string" calcext:value-type="string">
            <text:p>Darba lapas 7.9, 7.11</text:p>
            <text:p>27.10.2025</text:p>
          </table:table-cell>
          <table:table-cell table:style-name="ce3" office:value-type="string" calcext:value-type="string">
            <text:p>Skaitliskas un algebriskas izteiksmes: No teksta sastāda atbilstošu izteiksmi.</text:p>
          </table:table-cell>
        </table:table-row>
        <table:table-row table:style-name="ro3">
          <table:table-cell/>
          <table:table-cell table:style-name="ce2" office:value-type="string" calcext:value-type="string">
            <text:p>17.10.2025</text:p>
          </table:table-cell>
          <table:table-cell table:style-name="ce2" office:value-type="string" calcext:value-type="string">
            <text:p>Burtu izteiksmes (formulas). Skaitliskas izteiksmes.</text:p>
            <text:p>SR: Saskata formulu kā burtu izteiksmi. Atkārto darbības ar racionāliem skaitļiem. Prot saistīto pierakstu.</text:p>
          </table:table-cell>
          <table:table-cell table:style-name="ce1"/>
          <table:table-cell table:style-name="ce3" office:value-type="string" calcext:value-type="string">
            <text:p>Skaitliskas un algebriskas izteiksmes: No teksta sastāda atbilstošu izteiksmi.</text:p>
          </table:table-cell>
        </table:table-row>
        <table:table-row table:style-name="ro3">
          <table:table-cell/>
          <table:table-cell table:style-name="ce2" office:value-type="string" calcext:value-type="string">
            <text:p>14.10.2025</text:p>
          </table:table-cell>
          <table:table-cell table:style-name="ce2" office:value-type="string" calcext:value-type="string">
            <text:p>Leņķi.</text:p>
            <text:p>SR: Zina un lieto uzdevumu risināšanā jēdzienus un leņķu īpašības: krustleņķi, blakusleņķi, kāpšļu leņķi, iekšējie šķērsleņķi, iekšējie vienpusleņķi. Pierāda leņķu vienādību, lietojot leņķu pie paralēlām taisnēm īpašības.</text:p>
          </table:table-cell>
          <table:table-cell table:style-name="ce1"/>
          <table:table-cell table:style-name="ce3" office:value-type="string" calcext:value-type="string">
            <text:p>Skaitliskas un algebriskas izteiksmes: No teksta sastāda atbilstošu izteiksmi.</text:p>
          </table:table-cell>
        </table:table-row>
        <table:table-row table:style-name="ro3">
          <table:table-cell/>
          <table:table-cell table:style-name="ce2" office:value-type="string" calcext:value-type="string">
            <text:p>14.10.2025</text:p>
          </table:table-cell>
          <table:table-cell table:style-name="ce2" office:value-type="string" calcext:value-type="string">
            <text:p>Leņķi.</text:p>
            <text:p>SR: Zina un lieto uzdevumu risināšanā jēdzienus un leņķu īpašības: krustleņķi, blakusleņķi, kāpšļu leņķi, iekšējie šķērsleņķi, iekšējie vienpusleņķi. Pierāda leņķu vienādību, lietojot leņķu pie paralēlām taisnēm īpašības.</text:p>
          </table:table-cell>
          <table:table-cell table:style-name="ce1"/>
          <table:table-cell table:style-name="ce3" office:value-type="string" calcext:value-type="string">
            <text:p>Skaitliskas un algebriskas izteiksmes: No teksta sastāda atbilstošu izteiksmi.</text:p>
          </table:table-cell>
        </table:table-row>
        <table:table-row table:style-name="ro3">
          <table:table-cell/>
          <table:table-cell table:style-name="ce2" office:value-type="string" calcext:value-type="string">
            <text:p>13.10.2025</text:p>
          </table:table-cell>
          <table:table-cell table:style-name="ce2" office:value-type="string" calcext:value-type="string">
            <text:p>Leņķi.</text:p>
            <text:p>SR: Zina un lieto uzdevumu risināšanā jēdzienus un leņķu īpašības: krustleņķi, blakusleņķi, kāpšļu leņķi, iekšējie šķērsleņķi, iekšējie vienpusleņķi. Pierāda leņķu vienādību, lietojot leņķu pie paralēlām taisnēm īpašības.</text:p>
          </table:table-cell>
          <table:table-cell table:style-name="ce1"/>
          <table:table-cell table:style-name="ce3" office:value-type="string" calcext:value-type="string">
            <text:p>Skaitliskas un algebriskas izteiksmes: No teksta sastāda atbilstošu izteiksmi.</text:p>
          </table:table-cell>
        </table:table-row>
        <table:table-row table:style-name="ro13">
          <table:table-cell/>
          <table:table-cell table:style-name="ce3" office:value-type="string" calcext:value-type="string">
            <text:p>13.10.2025</text:p>
          </table:table-cell>
          <table:table-cell table:style-name="ce3" office:value-type="string" calcext:value-type="string">
            <text:p>Leņķi.</text:p>
            <text:p>SR: Zina un lieto uzdevumu risināšanā jēdzienus un leņķu īpašības: krustleņķi, blakusleņķi, kāpšļu leņķi, iekšējie šķērsleņķi, iekšējie vienpusleņķi. Pierāda leņķu vienādību, lietojot leņķu pie paralēlām taisnēm īpašības.</text:p>
          </table:table-cell>
          <table:table-cell table:style-name="ce4"/>
          <table:table-cell table:style-name="ce3" office:value-type="string" calcext:value-type="string">
            <text:p>Leņķu īpašības: krustleņķi, blakusleņķi, kāpšļu leņķi, iekšējie šķērsleņķi, iekšējie vienpusleņķi.</text:p>
          </table:table-cell>
        </table:table-row>
        <table:table-row table:style-name="ro9">
          <table:table-cell/>
          <table:table-cell table:style-name="ce2" office:value-type="string" calcext:value-type="string">
            <text:p>10.10.2025</text:p>
          </table:table-cell>
          <table:table-cell table:style-name="ce2" office:value-type="string" calcext:value-type="string">
            <text:p>Dažādi uzdevumi par leņķiem un to veidiem.</text:p>
            <text:p>SR: Zina leņķu veidus, prot tos saskatīt zīmējumā, zina leņķus, kas veidojas divām taisnēm krustojoties ar trešo taisni. Lieot leņķu īpašības uzdevumu risināšanā.</text:p>
          </table:table-cell>
          <table:table-cell table:style-name="ce1"/>
          <table:table-cell table:style-name="ce3" office:value-type="string" calcext:value-type="string">
            <text:p>Leņķu īpašības: krustleņķi, blakusleņķi, kāpšļu leņķi, iekšējie šķērsleņķi, iekšējie vienpusleņķi.</text:p>
          </table:table-cell>
        </table:table-row>
        <table:table-row table:style-name="ro9">
          <table:table-cell/>
          <table:table-cell table:style-name="ce2" office:value-type="string" calcext:value-type="string">
            <text:p>10.10.2025</text:p>
          </table:table-cell>
          <table:table-cell table:style-name="ce2" office:value-type="string" calcext:value-type="string">
            <text:p>Dažādi uzdevumi par leņķiem un to veidiem.</text:p>
            <text:p>SR: Zina leņķu veidus, prot tos saskatīt zīmējumā, zina leņķus, kas veidojas divām taisnēm krustojoties ar trešo taisni. Lieot leņķu īpašības uzdevumu risināšanā.</text:p>
          </table:table-cell>
          <table:table-cell table:style-name="ce1"/>
          <table:table-cell table:style-name="ce3" office:value-type="string" calcext:value-type="string">
            <text:p>Leņķu īpašības: krustleņķi, blakusleņķi, kāpšļu leņķi, iekšējie šķērsleņķi, iekšējie vienpusleņķi.</text:p>
          </table:table-cell>
        </table:table-row>
        <table:table-row table:style-name="ro9">
          <table:table-cell/>
          <table:table-cell table:style-name="ce2" office:value-type="string" calcext:value-type="string">
            <text:p>7.10.2025</text:p>
          </table:table-cell>
          <table:table-cell table:style-name="ce2" office:value-type="string" calcext:value-type="string">
            <text:p>Kopsavilkums par leņķiem, to veidiem.</text:p>
            <text:p>SR: Atpazīst krustleņķus, blakusleņķus, vienpusleņķus, šķērsleņķus, kāpšļu leņķus, zina to īpašības, lieto leņķu īpašības uzdevumu risināšanā.</text:p>
          </table:table-cell>
          <table:table-cell table:style-name="ce2" office:value-type="string" calcext:value-type="string">
            <text:p><text:a xlink:href="https://maconis.zvaigzne.lv/produkts/592" xlink:type="simple">https://maconis.zvaigzne.lv/produkts/592</text:a> 6.94, 6.96</text:p>
            <text:p>10.10.2025</text:p>
          </table:table-cell>
          <table:table-cell table:style-name="ce3" office:value-type="string" calcext:value-type="string">
            <text:p>Leņķu īpašības: krustleņķi, blakusleņķi, kāpšļu leņķi, iekšējie šķērsleņķi, iekšējie vienpusleņķi.</text:p>
          </table:table-cell>
        </table:table-row>
        <table:table-row table:style-name="ro9">
          <table:table-cell/>
          <table:table-cell table:style-name="ce2" office:value-type="string" calcext:value-type="string">
            <text:p>7.10.2025</text:p>
          </table:table-cell>
          <table:table-cell table:style-name="ce2" office:value-type="string" calcext:value-type="string">
            <text:p>Patstāvīgais darbs: Leņķi, kas veidojas divām taisnēm krustojoties ar trešo taisni. Kopsavilkums par leņķiem.</text:p>
            <text:p>SR: Atpazīst noteiktu leņķu pārus, zina un lieto uzdevumu risināšanā to īpašības.</text:p>
          </table:table-cell>
          <table:table-cell table:style-name="ce1"/>
          <table:table-cell table:style-name="ce3" office:value-type="string" calcext:value-type="string">
            <text:p>Leņķu īpašības: krustleņķi, blakusleņķi, kāpšļu leņķi, iekšējie šķērsleņķi, iekšējie vienpusleņķi.</text:p>
          </table:table-cell>
        </table:table-row>
        <table:table-row table:style-name="ro9">
          <table:table-cell/>
          <table:table-cell table:style-name="ce2" office:value-type="string" calcext:value-type="string">
            <text:p>6.10.2025</text:p>
          </table:table-cell>
          <table:table-cell table:style-name="ce2" office:value-type="string" calcext:value-type="string">
            <text:p>Leņķu pie paralēlām taisnēm īpašības.Uzdevumu risināšana.</text:p>
            <text:p>SR: Zina kāpšļu leņķu, iekšējo šķērsleņķu un iekšējo vienpusleņķu īpašības pie paralēlām taisnēm Lieto šīs īpašības uzdevumu risināšanā.</text:p>
          </table:table-cell>
          <table:table-cell table:style-name="ce2" office:value-type="string" calcext:value-type="string">
            <text:p>60.lpp 71.,73. uzdevumi.</text:p>
            <text:p>7.10.2025</text:p>
          </table:table-cell>
          <table:table-cell table:style-name="ce3" office:value-type="string" calcext:value-type="string">
            <text:p>Leņķu īpašības: krustleņķi, blakusleņķi, kāpšļu leņķi, iekšējie šķērsleņķi, iekšējie vienpusleņķi.</text:p>
          </table:table-cell>
        </table:table-row>
        <table:table-row table:style-name="ro9">
          <table:table-cell/>
          <table:table-cell table:style-name="ce2" office:value-type="string" calcext:value-type="string">
            <text:p>6.10.2025</text:p>
          </table:table-cell>
          <table:table-cell table:style-name="ce2" office:value-type="string" calcext:value-type="string">
            <text:p>Leņķu pie paralēlām taisnēm īpašības.</text:p>
            <text:p>SR: Zina kāpšļu leņķu, iekšējo šķērsleņķu un iekšējo vienpusleņķu īpašības pie paralēlām taisnēm Lieto šīs īpašības uzdevumu risināšanā.</text:p>
          </table:table-cell>
          <table:table-cell table:style-name="ce1"/>
          <table:table-cell table:style-name="ce3" office:value-type="string" calcext:value-type="string">
            <text:p>Leņķu īpašības: krustleņķi, blakusleņķi, kāpšļu leņķi, iekšējie šķērsleņķi, iekšējie vienpusleņķi.</text:p>
          </table:table-cell>
        </table:table-row>
        <table:table-row table:style-name="ro9">
          <table:table-cell/>
          <table:table-cell table:style-name="ce2" office:value-type="string" calcext:value-type="string">
            <text:p>3.10.2025</text:p>
          </table:table-cell>
          <table:table-cell table:style-name="ce2" office:value-type="string" calcext:value-type="string">
            <text:p>Leņķi, kas veidojas divām taisnēm krustojoties ar trešo taisni. Uzdevumu risināšana.</text:p>
            <text:p>SR: Zina, kas ir kāpšļu leņķi, iekšējie šķērsleņķi, iekšējie vienpusleņķi. Lieto šo leņķu īpašības uzdevumu risināšanā. Lieto krustleņķu un blakusleņķu īpašības.</text:p>
          </table:table-cell>
          <table:table-cell table:style-name="ce2" office:value-type="string" calcext:value-type="string">
            <text:p>56.lpp iemācīties, kas ir attālums starp paralēlām taisnēm. 58.lpp 62.,63.,65. uzdevumi.</text:p>
            <text:p>6.10.2025</text:p>
          </table:table-cell>
          <table:table-cell table:style-name="ce3" office:value-type="string" calcext:value-type="string">
            <text:p>Leņķu īpašības: krustleņķi, blakusleņķi, kāpšļu leņķi, iekšējie šķērsleņķi, iekšējie vienpusleņķi.</text:p>
          </table:table-cell>
        </table:table-row>
        <table:table-row table:style-name="ro9">
          <table:table-cell/>
          <table:table-cell table:style-name="ce2" office:value-type="string" calcext:value-type="string">
            <text:p>3.10.2025</text:p>
          </table:table-cell>
          <table:table-cell table:style-name="ce2" office:value-type="string" calcext:value-type="string">
            <text:p>Leņķi, kas veidojas divām taisnēm krustojoties ar trešo taisni.</text:p>
            <text:p>SR: Zina, kas ir kāpšļu leņķi, iekšējie šķērsleņķi, iekšējie vienpusleņķi. Lieto šo leņķu īpašības uzdevumu risināšanā. Lieto krustleņķu un blakusleņķu īpašības.</text:p>
          </table:table-cell>
          <table:table-cell table:style-name="ce1"/>
          <table:table-cell table:style-name="ce3" office:value-type="string" calcext:value-type="string">
            <text:p>Leņķu īpašības: krustleņķi, blakusleņķi, kāpšļu leņķi, iekšējie šķērsleņķi, iekšējie vienpusleņķi.</text:p>
          </table:table-cell>
        </table:table-row>
        <table:table-row table:style-name="ro9">
          <table:table-cell/>
          <table:table-cell table:style-name="ce2" office:value-type="string" calcext:value-type="string">
            <text:p>30.09.2025</text:p>
          </table:table-cell>
          <table:table-cell table:style-name="ce2" office:value-type="string" calcext:value-type="string">
            <text:p>Uzdevumu risināšana par leņķiem.</text:p>
            <text:p>SR: Lieto blakusleņķu un krustleņķu ''ipašības leņķu lielumu aprēķināšanai. Lieto perpendikula īpašību, lai iezīmētu attālumu.</text:p>
          </table:table-cell>
          <table:table-cell table:style-name="ce2" office:value-type="string" calcext:value-type="string">
            <text:p>53.lpp 39. uzdevums, 54.lpp 55. uzdevums</text:p>
            <text:p>3.10.2025</text:p>
          </table:table-cell>
          <table:table-cell table:style-name="ce3" office:value-type="string" calcext:value-type="string">
            <text:p>Leņķu īpašības: krustleņķi, blakusleņķi, kāpšļu leņķi, iekšējie šķērsleņķi, iekšējie vienpusleņķi.</text:p>
          </table:table-cell>
        </table:table-row>
        <table:table-row table:style-name="ro9">
          <table:table-cell/>
          <table:table-cell table:style-name="ce2" office:value-type="string" calcext:value-type="string">
            <text:p>30.09.2025</text:p>
          </table:table-cell>
          <table:table-cell table:style-name="ce2" office:value-type="string" calcext:value-type="string">
            <text:p>Patstāvīgais darbs: Leņķi, to veidi, bisektrise. Uzdevumu risināšana par krustleņķiem un blakusleņķiem.</text:p>
            <text:p>SR: Zina, kas ir leņķis, to veidus, lieto bisektrises jēdzienu uzdevumu risināšanā, lieto zināšanas par krustleņķiem un blakusleņķiem leņķu lielumu aprēķināšanā.</text:p>
          </table:table-cell>
          <table:table-cell table:style-name="ce1"/>
          <table:table-cell table:style-name="ce3" office:value-type="string" calcext:value-type="string">
            <text:p>Leņķu īpašības: krustleņķi, blakusleņķi, kāpšļu leņķi, iekšējie šķērsleņķi, iekšējie vienpusleņķi.</text:p>
          </table:table-cell>
        </table:table-row>
        <table:table-row table:style-name="ro9">
          <table:table-cell/>
          <table:table-cell table:style-name="ce2" office:value-type="string" calcext:value-type="string">
            <text:p>29.09.2025</text:p>
          </table:table-cell>
          <table:table-cell table:style-name="ce2" office:value-type="string" calcext:value-type="string">
            <text:p>Blakusleņķi un krustleņķi. Perpendikulāras taisnes.</text:p>
            <text:p>SR: Zina, kas ir krustleņķi un blakusleņki, zina šo leņķu īpašības. Lieto tās uzdevumu risināšanā.</text:p>
          </table:table-cell>
          <table:table-cell table:style-name="ce2" office:value-type="string" calcext:value-type="string">
            <text:p>43., 45. uzdevumi 53.lpp</text:p>
            <text:p>30.09.2025</text:p>
          </table:table-cell>
          <table:table-cell table:style-name="ce3" office:value-type="string" calcext:value-type="string">
            <text:p>Leņķu īpašības: krustleņķi, blakusleņķi, kāpšļu leņķi, iekšējie šķērsleņķi, iekšējie vienpusleņķi.</text:p>
          </table:table-cell>
        </table:table-row>
        <table:table-row table:style-name="ro9">
          <table:table-cell/>
          <table:table-cell table:style-name="ce2" office:value-type="string" calcext:value-type="string">
            <text:p>29.09.2025</text:p>
          </table:table-cell>
          <table:table-cell table:style-name="ce2" office:value-type="string" calcext:value-type="string">
            <text:p>Leņķa lielums, to veidi. Leņķa bisektrise.</text:p>
            <text:p>SR: Prot izmērīt leņķi, prot uzzīmēt prasītā lieluma leņķi. Zina leņķu veidus. Prot aprēķināt leņķa vai to da\lu lielumu. Zina, kas ir lenķa bisektrise, lieto to uzdevumu risināšanā.</text:p>
          </table:table-cell>
          <table:table-cell table:style-name="ce1"/>
          <table:table-cell table:style-name="ce3" office:value-type="string" calcext:value-type="string">
            <text:p>Leņķu īpašības: krustleņķi, blakusleņķi, kāpšļu leņķi, iekšējie šķērsleņķi, iekšējie vienpusleņķi.</text:p>
          </table:table-cell>
        </table:table-row>
        <table:table-row table:style-name="ro9">
          <table:table-cell/>
          <table:table-cell table:style-name="ce2" office:value-type="string" calcext:value-type="string">
            <text:p>26.09.2025</text:p>
          </table:table-cell>
          <table:table-cell table:style-name="ce2" office:value-type="string" calcext:value-type="string">
            <text:p>Leņķa lielums, to veidi. Leņķa bisektrise.</text:p>
            <text:p>SR: Prot izmērīt leņķi, prot uzzīmēt prasītā lieluma leņķi. Zina leņķu veidus. Prot aprēķināt leņķa vai to da\lu lielumu. Zina, kas ir lenķa bisektrise, lieto to uzdevumu risināšanā.</text:p>
          </table:table-cell>
          <table:table-cell table:style-name="ce2" office:value-type="string" calcext:value-type="string">
            <text:p>Pārbaudes darba kļūdu labojums uz lapas. 44.lpp 19.,22. uzdevumi.</text:p>
            <text:p>29.09.2025</text:p>
          </table:table-cell>
          <table:table-cell table:style-name="ce3" office:value-type="string" calcext:value-type="string">
            <text:p>Leņķu īpašības: krustleņķi, blakusleņķi, kāpšļu leņķi, iekšējie šķērsleņķi, iekšējie vienpusleņķi.</text:p>
          </table:table-cell>
        </table:table-row>
        <table:table-row table:style-name="ro9">
          <table:table-cell/>
          <table:table-cell table:style-name="ce2" office:value-type="string" calcext:value-type="string">
            <text:p>26.09.2025</text:p>
          </table:table-cell>
          <table:table-cell table:style-name="ce2" office:value-type="string" calcext:value-type="string">
            <text:p>Leņķa lielums, to veidi. Leņķa bisektrise.</text:p>
            <text:p>SR: Prot izmērīt leņķi, prot uzzīmēt prasītā lieluma leņķi. Zina leņķu veidus. Prot aprēķināt leņķa vai to da\lu lielumu. Zina, kas ir lenķa bisektrise, lieto to uzdevumu risināšanā.</text:p>
          </table:table-cell>
          <table:table-cell table:style-name="ce1"/>
          <table:table-cell table:style-name="ce3" office:value-type="string" calcext:value-type="string">
            <text:p>Leņķu īpašības: krustleņķi, blakusleņķi, kāpšļu leņķi, iekšējie šķērsleņķi, iekšējie vienpusleņķi.</text:p>
          </table:table-cell>
        </table:table-row>
        <table:table-row table:style-name="ro9">
          <table:table-cell/>
          <table:table-cell table:style-name="ce2" office:value-type="string" calcext:value-type="string">
            <text:p>23.09.2025</text:p>
          </table:table-cell>
          <table:table-cell table:style-name="ce2" office:value-type="string" calcext:value-type="string">
            <text:p>Leņķi, to veidi.</text:p>
            <text:p>SR: Zina leņķu veidus pēc lieluma, prot tos klasificēt, izdara dažādus spriedumus par leņķu lielumu.Risina uzdevums.</text:p>
          </table:table-cell>
          <table:table-cell table:style-name="ce2" office:value-type="string" calcext:value-type="string">
            <text:p>40.lpp 6.,8. uzdevumi.</text:p>
            <text:p>26.09.2025</text:p>
          </table:table-cell>
          <table:table-cell table:style-name="ce3" office:value-type="string" calcext:value-type="string">
            <text:p>Leņķu īpašības: krustleņķi, blakusleņķi, kāpšļu leņķi, iekšējie šķērsleņķi, iekšējie vienpusleņķi.</text:p>
          </table:table-cell>
        </table:table-row>
        <table:table-row table:style-name="ro3">
          <table:table-cell/>
          <table:table-cell table:style-name="ce3" office:value-type="string" calcext:value-type="string">
            <text:p>23.09.2025</text:p>
          </table:table-cell>
          <table:table-cell table:style-name="ce3" office:value-type="string" calcext:value-type="string">
            <text:p>Ievads planimetrijā (punkts, taisne, stars, nogrieznis, plakne).</text:p>
            <text:p>SR: Atpazīst zīmējumā, prot attēlot zīmējumā un lieto pareizos apzīmējumus : punkts, taisne, stars, nogrieznis, plakne.Lieto jēdzienu viduspunkts. Aprēķina nogriežņa vai tā daļas garumu. Lieto zināšanas par riņķa līniju, to savstarpējo novietojumu.</text:p>
          </table:table-cell>
          <table:table-cell table:style-name="ce4"/>
          <table:table-cell table:style-name="ce3" office:value-type="string" calcext:value-type="string">
            <text:p>Ievads planimetrijā: punkts, taisne, stars, nogrieznis, plakne.</text:p>
          </table:table-cell>
        </table:table-row>
        <table:table-row table:style-name="ro12">
          <table:table-cell/>
          <table:table-cell table:style-name="ce2" office:value-type="string" calcext:value-type="string">
            <text:p>22.09.2025</text:p>
          </table:table-cell>
          <table:table-cell table:style-name="ce2" office:value-type="string" calcext:value-type="string">
            <text:p>Kopsavilkums par taisni, staru, nogriezni, riņķa līniju, riņķi.</text:p>
            <text:p>SR: Prot uzzīmēt, apzīmēt, atpazīt figūras. Prot aprēķināt prasītā nogriežņa garumu, lieto jēdzienu nogriežņa viduspunkts, lieto piederības simbolu. Zina riņķa līniju savstarpējo novietojumu, lieto to aprēķinos.</text:p>
          </table:table-cell>
          <table:table-cell table:style-name="ce2" office:value-type="string" calcext:value-type="string">
            <text:p>Mācību grāmatās 34.lpp "Es protu" 4.,5.,6.,7.,9.,11.,12.,13.uzdevumi. Gatavojoties pārbaudes darbam pārlasīt 1. nodaļā esošās definīcijas.</text:p>
            <text:p>23.09.2025</text:p>
          </table:table-cell>
          <table:table-cell table:style-name="ce3" office:value-type="string" calcext:value-type="string">
            <text:p>Ievads planimetrijā: punkts, taisne, stars, nogrieznis, plakne.</text:p>
          </table:table-cell>
        </table:table-row>
        <table:table-row table:style-name="ro2">
          <table:table-cell/>
          <table:table-cell table:style-name="ce2" office:value-type="string" calcext:value-type="string">
            <text:p>22.09.2025</text:p>
          </table:table-cell>
          <table:table-cell table:style-name="ce2" office:value-type="string" calcext:value-type="string">
            <text:p>Kopsavilkums par taisni, staru, nogriezni, riņķa līniju, riņķi.</text:p>
            <text:p>SR: Prot uzzīmēt, apzīmēt, atpazīt figūras. Prot aprēķināt prasītā nogriežņa garumu, lieto jēdzienu nogriežņa viduspunkts, lieto piederības simbolu. Zina riņķa līniju savstarpējo novietojumu, lieto to aprēķinos.</text:p>
          </table:table-cell>
          <table:table-cell table:style-name="ce1"/>
          <table:table-cell table:style-name="ce3" office:value-type="string" calcext:value-type="string">
            <text:p>Ievads planimetrijā: punkts, taisne, stars, nogrieznis, plakne.</text:p>
          </table:table-cell>
        </table:table-row>
        <table:table-row table:style-name="ro4">
          <table:table-cell/>
          <table:table-cell table:style-name="ce2" office:value-type="string" calcext:value-type="string">
            <text:p>19.09.2025</text:p>
          </table:table-cell>
          <table:table-cell table:style-name="ce2" office:value-type="string" calcext:value-type="string">
            <text:p>Riņķa līniju savstarpējais novietojums.</text:p>
            <text:p>SR: Zina riņķa līniju iespējamos savstarpējos novietojumus. Zina un lieto attāluma starp centriem aprēķināšanu katram novietojuma veidam.</text:p>
          </table:table-cell>
          <table:table-cell table:style-name="ce1"/>
          <table:table-cell table:style-name="ce3" office:value-type="string" calcext:value-type="string">
            <text:p>Ievads planimetrijā: punkts, taisne, stars, nogrieznis, plakne.</text:p>
          </table:table-cell>
        </table:table-row>
        <table:table-row table:style-name="ro4">
          <table:table-cell/>
          <table:table-cell table:style-name="ce2" office:value-type="string" calcext:value-type="string">
            <text:p>19.09.2025</text:p>
          </table:table-cell>
          <table:table-cell table:style-name="ce2" office:value-type="string" calcext:value-type="string">
            <text:p>Riņķa līniju savstarpējais novietojums.</text:p>
            <text:p>SR: Zina riņķa līniju iespējamos savstarpējos novietojumus. Zina un lieto attāluma starp centriem aprēķināšanu katram novietojuma veidam.</text:p>
          </table:table-cell>
          <table:table-cell table:style-name="ce1"/>
          <table:table-cell table:style-name="ce3" office:value-type="string" calcext:value-type="string">
            <text:p>Ievads planimetrijā: punkts, taisne, stars, nogrieznis, plakne.</text:p>
          </table:table-cell>
        </table:table-row>
        <table:table-row table:style-name="ro4">
          <table:table-cell/>
          <table:table-cell table:style-name="ce2" office:value-type="string" calcext:value-type="string">
            <text:p>16.09.2025</text:p>
          </table:table-cell>
          <table:table-cell table:style-name="ce2" office:value-type="string" calcext:value-type="string">
            <text:p>Skolas matemātikas olimpiāde.</text:p>
            <text:p>SR: Risina augstāka līmeņa uzdevumus, saprot tekstu, izdara secīgus un loģiskus spriedumus, izdara secinājumus par iegūtajiem rezultātiem.</text:p>
          </table:table-cell>
          <table:table-cell table:style-name="ce2" office:value-type="string" calcext:value-type="string">
            <text:p>33.lpp 69. uzdevums.</text:p>
            <text:p>19.09.2025</text:p>
          </table:table-cell>
          <table:table-cell table:style-name="ce3" office:value-type="string" calcext:value-type="string">
            <text:p>Ievads planimetrijā: punkts, taisne, stars, nogrieznis, plakne.</text:p>
          </table:table-cell>
        </table:table-row>
        <table:table-row table:style-name="ro4">
          <table:table-cell/>
          <table:table-cell table:style-name="ce2" office:value-type="string" calcext:value-type="string">
            <text:p>16.09.2025</text:p>
          </table:table-cell>
          <table:table-cell table:style-name="ce2" office:value-type="string" calcext:value-type="string">
            <text:p>Skolas matemātikas olimpiāde.</text:p>
            <text:p>SR: Risina augstāka līmeņa uzdevumus, saprot tekstu, izdara secīgus un loģiskus spriedumus, izdara secinājumus par iegūtajiem rezultātiem.</text:p>
          </table:table-cell>
          <table:table-cell table:style-name="ce1"/>
          <table:table-cell table:style-name="ce3" office:value-type="string" calcext:value-type="string">
            <text:p>Ievads planimetrijā: punkts, taisne, stars, nogrieznis, plakne.</text:p>
          </table:table-cell>
        </table:table-row>
        <table:table-row table:style-name="ro4">
          <table:table-cell/>
          <table:table-cell table:style-name="ce2" office:value-type="string" calcext:value-type="string">
            <text:p>15.09.2025</text:p>
          </table:table-cell>
          <table:table-cell table:style-name="ce2" office:value-type="string" calcext:value-type="string">
            <text:p>Riņķis, riņķa līnija, to elementi. uzdevumu risināšana.</text:p>
            <text:p>SR: Zina, kas ir riņķa līnija, atpazīst un prot uzzīmēt prasītos nogriežņus,</text:p>
          </table:table-cell>
          <table:table-cell table:style-name="ce2" office:value-type="string" calcext:value-type="string">
            <text:p>32.lpp 62.,65.,68. uzdevumi.</text:p>
            <text:p>16.09.2025</text:p>
          </table:table-cell>
          <table:table-cell table:style-name="ce3" office:value-type="string" calcext:value-type="string">
            <text:p>Ievads planimetrijā: punkts, taisne, stars, nogrieznis, plakne.</text:p>
          </table:table-cell>
        </table:table-row>
        <table:table-row table:style-name="ro4">
          <table:table-cell/>
          <table:table-cell table:style-name="ce2" office:value-type="string" calcext:value-type="string">
            <text:p>15.09.2025</text:p>
          </table:table-cell>
          <table:table-cell table:style-name="ce2" office:value-type="string" calcext:value-type="string">
            <text:p>Riņķis, riņķa līnija, to elementi.</text:p>
            <text:p>SR: Zina, kas ir riņķa līnija, atpazīst un prot uzzīmēt prasītos nogriežņus, prot aprēķināt riņķa līnijas garumyu un laukumu, nogirežņu garumus.</text:p>
          </table:table-cell>
          <table:table-cell table:style-name="ce1"/>
          <table:table-cell table:style-name="ce3" office:value-type="string" calcext:value-type="string">
            <text:p>Ievads planimetrijā: punkts, taisne, stars, nogrieznis, plakne.</text:p>
          </table:table-cell>
        </table:table-row>
        <table:table-row table:style-name="ro4">
          <table:table-cell/>
          <table:table-cell table:style-name="ce2" office:value-type="string" calcext:value-type="string">
            <text:p>12.09.2025</text:p>
          </table:table-cell>
          <table:table-cell table:style-name="ce2" office:value-type="string" calcext:value-type="string">
            <text:p>Nogriežņa un tā daļu garuma aprēķināšana.</text:p>
            <text:p>SR: Prot uzzīmēt un zīmējumā iezīmēt uzdevumā prasīto, lieto viduspunkta īpašību.</text:p>
          </table:table-cell>
          <table:table-cell table:style-name="ce2" office:value-type="string" calcext:value-type="string">
            <text:p>Paņemt līdzi cirkuļus.</text:p>
            <text:p>15.09.2025</text:p>
          </table:table-cell>
          <table:table-cell table:style-name="ce3" office:value-type="string" calcext:value-type="string">
            <text:p>Ievads planimetrijā: punkts, taisne, stars, nogrieznis, plakne.</text:p>
          </table:table-cell>
        </table:table-row>
        <table:table-row table:style-name="ro9">
          <table:table-cell/>
          <table:table-cell table:style-name="ce2" office:value-type="string" calcext:value-type="string">
            <text:p>12.09.2025</text:p>
          </table:table-cell>
          <table:table-cell table:style-name="ce2" office:value-type="string" calcext:value-type="string">
            <text:p>Patstāvīgais darbs: Taisne, stars, nogrieznis. uzdevumu risināšana par nogriezņiem.</text:p>
            <text:p>SR: Zina un uzdevumu risināšanā lieto jēdzienus taisne, stars, nogrieznis. Prot tos uzzīmēt, apzīmēt, nosaukt, saskatīt zīmējumos. Prot izmērīt un aprēķināt nogiežņa, vai tā daļas garumu. Zina un lieto jēdzienu nogriežņa viduspunkts un vienādi nogriežņi.</text:p>
          </table:table-cell>
          <table:table-cell table:style-name="ce1"/>
          <table:table-cell table:style-name="ce3" office:value-type="string" calcext:value-type="string">
            <text:p>Ievads planimetrijā: punkts, taisne, stars, nogrieznis, plakne.</text:p>
          </table:table-cell>
        </table:table-row>
        <table:table-row table:style-name="ro2">
          <table:table-cell/>
          <table:table-cell table:style-name="ce2" office:value-type="string" calcext:value-type="string">
            <text:p>9.09.2025</text:p>
          </table:table-cell>
          <table:table-cell table:style-name="ce2" office:value-type="string" calcext:value-type="string">
            <text:p>Vienādas figūras. Nogriežņa garums. uzdevumu risināšana.</text:p>
            <text:p>SR: Zina, kas ir vienādas figūras, atpazīst tās zīmējumā, prot uzzīmēt. Zina, kas ir nogriežņa garums, viduspunktas, Prot aprēķināt nogriežņa garumu.</text:p>
          </table:table-cell>
          <table:table-cell table:style-name="ce2" office:value-type="string" calcext:value-type="string">
            <text:p>Mācību grāmatā 26.lpp 39.,45.,47. uzdevumi.</text:p>
            <text:p>12.09.2025</text:p>
          </table:table-cell>
          <table:table-cell table:style-name="ce3" office:value-type="string" calcext:value-type="string">
            <text:p>Ievads planimetrijā: punkts, taisne, stars, nogrieznis, plakne.</text:p>
          </table:table-cell>
        </table:table-row>
        <table:table-row table:style-name="ro4">
          <table:table-cell/>
          <table:table-cell table:style-name="ce2" office:value-type="string" calcext:value-type="string">
            <text:p>9.09.2025</text:p>
          </table:table-cell>
          <table:table-cell table:style-name="ce2" office:value-type="string" calcext:value-type="string">
            <text:p>Vienādas figūras. Nogriežņa garums.</text:p>
            <text:p>SR: Zina, kas ir vienādas figūras, atpazīst tās zīmējumā, prot uzzīmēt. Zina, kas ir nogriežņa garums, viduspunktas, Prot aprēķināt nogriežņa garumu.</text:p>
          </table:table-cell>
          <table:table-cell table:style-name="ce1"/>
          <table:table-cell table:style-name="ce3" office:value-type="string" calcext:value-type="string">
            <text:p>Ievads planimetrijā: punkts, taisne, stars, nogrieznis, plakne.</text:p>
          </table:table-cell>
        </table:table-row>
        <table:table-row table:style-name="ro2">
          <table:table-cell/>
          <table:table-cell table:style-name="ce2" office:value-type="string" calcext:value-type="string">
            <text:p>8.09.2025</text:p>
          </table:table-cell>
          <table:table-cell table:style-name="ce2" office:value-type="string" calcext:value-type="string">
            <text:p>Taisne, stars, nogrieznis.Uzdevumu risināšana.</text:p>
            <text:p>SR: Atpazīst zīmējumā un prot uzzīmēt un apzīmēt taisni, satru un nogriezni.</text:p>
            <text:p>Zina to iepējamo savstarpējo novietojumu. Lieto piederības zīmi, pierakastot punkta un taisnes savstarpējo novietojumu. Zina jēdzienu krustpunkts.</text:p>
          </table:table-cell>
          <table:table-cell table:style-name="ce2" office:value-type="string" calcext:value-type="string">
            <text:p>21.lpp 23.,25.,32. uzdevumi</text:p>
            <text:p>9.09.2025</text:p>
          </table:table-cell>
          <table:table-cell table:style-name="ce3" office:value-type="string" calcext:value-type="string">
            <text:p>Ievads planimetrijā: punkts, taisne, stars, nogrieznis, plakne.</text:p>
          </table:table-cell>
        </table:table-row>
        <table:table-row table:style-name="ro2">
          <table:table-cell/>
          <table:table-cell table:style-name="ce2" office:value-type="string" calcext:value-type="string">
            <text:p>8.09.2025</text:p>
          </table:table-cell>
          <table:table-cell table:style-name="ce2" office:value-type="string" calcext:value-type="string">
            <text:p>Taisne, stars, nogrieznis.</text:p>
            <text:p>SR: Atpazīst zīmējumā un prot uzzīmēt un apzīmēt taisni, satru un nogriezni.</text:p>
            <text:p>Zina to iepējamo savstarpējo novietojumu. Lieto piederības zīmi, pierakastot punkta un taisnes savstarpējo novietojumu. Zina jēdzienu krustpunkts.</text:p>
          </table:table-cell>
          <table:table-cell table:style-name="ce1"/>
          <table:table-cell table:style-name="ce3" office:value-type="string" calcext:value-type="string">
            <text:p>Ievads planimetrijā: punkts, taisne, stars, nogrieznis, plakne.</text:p>
          </table:table-cell>
        </table:table-row>
        <table:table-row table:style-name="ro9">
          <table:table-cell/>
          <table:table-cell table:style-name="ce2" office:value-type="string" calcext:value-type="string">
            <text:p>5.09.2025</text:p>
          </table:table-cell>
          <table:table-cell table:style-name="ce2" office:value-type="string" calcext:value-type="string">
            <text:p>Taisne, tās apzīmējumi, īpašības.</text:p>
            <text:p>SR: Zina, kas ir taisne un kā to apzīmē, zina punkta un taisnes savstarpējo novietojumu, zina taišņu savstarpējo novietojumu.</text:p>
          </table:table-cell>
          <table:table-cell table:style-name="ce2" office:value-type="string" calcext:value-type="string">
            <text:p>Mācību grāmata 16.lpp 6., 7., 9. uzdevumi (j;apilda klades otrā pusē, kā vienojāmies).</text:p>
            <text:p>8.09.2025</text:p>
          </table:table-cell>
          <table:table-cell table:style-name="ce3" office:value-type="string" calcext:value-type="string">
            <text:p>Ievads planimetrijā: punkts, taisne, stars, nogrieznis, plakne.</text:p>
          </table:table-cell>
        </table:table-row>
        <table:table-row table:style-name="ro4">
          <table:table-cell/>
          <table:table-cell table:style-name="ce2" office:value-type="string" calcext:value-type="string">
            <text:p>5.09.2025</text:p>
          </table:table-cell>
          <table:table-cell table:style-name="ce2" office:value-type="string" calcext:value-type="string">
            <text:p>Ievads planimetrijā.</text:p>
            <text:p>SR:ievads un info par matemātikas mācīšanos. Zina, kas ir planimetrija, zina ģoemetrijas pamatjēdzienus</text:p>
          </table:table-cell>
          <table:table-cell table:style-name="ce1"/>
          <table:table-cell table:style-name="ce3" office:value-type="string" calcext:value-type="string">
            <text:p>Ievads planimetrijā: punkts, taisne, stars, nogrieznis, plakne.</text:p>
          </table:table-cell>
        </table:table-row>
        <table:table-row table:style-name="ro4">
          <table:table-cell/>
          <table:table-cell table:style-name="ce2" office:value-type="string" calcext:value-type="string">
            <text:p>2.09.2025</text:p>
          </table:table-cell>
          <table:table-cell table:style-name="ce2" office:value-type="string" calcext:value-type="string">
            <text:p>Ievads planimetrijā.</text:p>
            <text:p>SR: Ievads un info par matemātikas mācīšanos. Zina, kas ir planimetrija, zina ģoemetrijas pamatjēdzienus. Ģeometrijas vēsture.</text:p>
          </table:table-cell>
          <table:table-cell table:style-name="ce1"/>
          <table:table-cell table:style-name="ce3" office:value-type="string" calcext:value-type="string">
            <text:p>Ievads planimetrijā: punkts, taisne, stars, nogrieznis, plakne.</text:p>
          </table:table-cell>
        </table:table-row>
        <table:table-row table:style-name="ro4">
          <table:table-cell/>
          <table:table-cell table:style-name="ce2" office:value-type="string" calcext:value-type="string">
            <text:p>2.09.2025</text:p>
          </table:table-cell>
          <table:table-cell table:style-name="ce2" office:value-type="string" calcext:value-type="string">
            <text:p>Ievads planimetrijā.</text:p>
            <text:p>SR: Ievads un info par matemātikas mācīšanos. Zina, kas ir planimetrija, zina ģoemetrijas pamatjēdzienus. Ģeometrijas vēsture.</text:p>
          </table:table-cell>
          <table:table-cell table:style-name="ce1"/>
          <table:table-cell table:style-name="ce3" office:value-type="string" calcext:value-type="string">
            <text:p>Ievads planimetrijā: punkts, taisne, stars, nogrieznis, plakne.</text:p>
          </table:table-cell>
        </table:table-row>
        <table:table-row table:style-name="ro4">
          <table:table-cell/>
          <table:table-cell table:style-name="ce2" office:value-type="string" calcext:value-type="string">
            <text:p>1.09.2025</text:p>
          </table:table-cell>
          <table:table-cell table:style-name="ce2" office:value-type="string" calcext:value-type="string">
            <text:p>Ievads planimetrijā.</text:p>
            <text:p>SR: Ievads un info par matemātikas mācīšanos. Zina, kas ir planimetrija, zina ģoemetrijas pamatjēdzienus.</text:p>
          </table:table-cell>
          <table:table-cell table:style-name="ce1"/>
          <table:table-cell table:style-name="ce3" office:value-type="string" calcext:value-type="string">
            <text:p>Ievads planimetrijā: punkts, taisne, stars, nogrieznis, plakne.</text:p>
          </table:table-cell>
        </table:table-row>
        <table:table-row table:style-name="ro4">
          <table:table-cell/>
          <table:table-cell table:style-name="ce2" office:value-type="string" calcext:value-type="string">
            <text:p>1.09.2025</text:p>
          </table:table-cell>
          <table:table-cell table:style-name="ce2" office:value-type="string" calcext:value-type="string">
            <text:p>Ievads planimetrijā.</text:p>
            <text:p>SR: Ievads un info par matemātikas mācīšanos. Zina, kas ir planimetrija, zina ģoemetrijas pamatjēdzienus.</text:p>
          </table:table-cell>
          <table:table-cell table:style-name="ce1"/>
          <table:table-cell table:style-name="ce3" office:value-type="string" calcext:value-type="string">
            <text:p>Ievads planimetrijā: punkts, taisne, stars, nogrieznis, plakne.</text:p>
          </table:table-cell>
        </table:table-row>
        <table:table-row table:style-name="ro1" table:number-rows-repeated="1048381">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03T16:20:12.336303200</meta:creation-date>
    <dc:date>2026-07-03T23:08:10.000222900</dc:date>
    <meta:editing-duration>PT3M8S</meta:editing-duration>
    <meta:editing-cycles>1</meta:editing-cycles>
    <meta:document-statistic meta:table-count="2" meta:cell-count="660" meta:object-count="0"/>
    <meta:generator>LibreOffice/26.2.4.2$Windows_X86_64 LibreOffice_project/0229ac93fcf0d7cbc6376066c6f35021cef002dc</meta:generator>
  </office:meta>
</office:document-meta>
</file>