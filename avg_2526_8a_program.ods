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46in"/>
    </style:style>
    <style:style style:name="co2" style:family="table-column">
      <style:table-column-properties fo:break-before="auto" style:column-width="4.6492in"/>
    </style:style>
    <style:style style:name="co3" style:family="table-column">
      <style:table-column-properties fo:break-before="auto" style:column-width="1.0339in"/>
    </style:style>
    <style:style style:name="co4" style:family="table-column">
      <style:table-column-properties fo:break-before="auto" style:column-width="1.6665in"/>
    </style:style>
    <style:style style:name="co5" style:family="table-column">
      <style:table-column-properties fo:break-before="auto" style:column-width="1.1201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72in" fo:break-before="auto" style:use-optimal-row-height="true"/>
    </style:style>
    <style:style style:name="ro3" style:family="table-row">
      <style:table-row-properties style:row-height="0.4709in" fo:break-before="auto" style:use-optimal-row-height="true"/>
    </style:style>
    <style:style style:name="ro4" style:family="table-row">
      <style:table-row-properties style:row-height="0.6217in" fo:break-before="auto" style:use-optimal-row-height="true"/>
    </style:style>
    <style:style style:name="ro5" style:family="table-row">
      <style:table-row-properties style:row-height="1.0736in" fo:break-before="auto" style:use-optimal-row-height="true"/>
    </style:style>
    <style:style style:name="ro6" style:family="table-row">
      <style:table-row-properties style:row-height="1.828in" fo:break-before="auto" style:use-optimal-row-height="true"/>
    </style:style>
    <style:style style:name="ro7" style:family="table-row">
      <style:table-row-properties style:row-height="0.320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2244in" fo:break-before="auto" style:use-optimal-row-height="true"/>
    </style:style>
    <style:style style:name="ro11" style:family="table-row">
      <style:table-row-properties style:row-height="0.9228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2.7319in" fo:break-before="auto" style:use-optimal-row-height="true"/>
    </style:style>
    <style:style style:name="ro17" style:family="table-row">
      <style:table-row-properties style:row-height="1.3756in" fo:break-before="auto" style:use-optimal-row-height="true"/>
    </style:style>
    <style:style style:name="ro18"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style:text-properties fo:font-weight="bold" style:font-weight-asian="bold" style:font-weight-complex="bold"/>
    </style:style>
    <style:style style:name="ce17" style:family="table-cell" style:parent-style-name="Default">
      <style:table-cell-properties fo:background-color="transparent" fo:wrap-option="wrap"/>
    </style:style>
  </office:automatic-styles>
  <office:body>
    <office:spreadsheet>
      <table:calculation-settings table:automatic-find-labels="false" table:use-regular-expressions="false" table:use-wildcards="true" table:null-year="1950"/>
      <table:table table:name="Sheet1" table:style-name="ta1">
        <table:table-column table:style-name="co1" table:default-cell-style-name="ce12"/>
        <table:table-column table:style-name="co2" table:default-cell-style-name="ce12"/>
        <table:table-column table:style-name="co3" table:default-cell-style-name="ce12"/>
        <table:table-column table:style-name="co4" table:default-cell-style-name="ce17"/>
        <table:table-column table:style-name="co5" table:default-cell-style-name="ce12"/>
        <table:table-column table:style-name="co6" table:number-columns-repeated="16379"/>
        <table:table-row table:style-name="ro1">
          <table:table-cell table:style-name="ce1" office:value-type="string" calcext:value-type="string">
            <text:p>Datums</text:p>
          </table:table-cell>
          <table:table-cell table:style-name="ce1" office:value-type="string" calcext:value-type="string">
            <text:p>Sasniedzamais rezultāts</text:p>
          </table:table-cell>
          <table:table-cell table:style-name="ce1" office:value-type="string" calcext:value-type="string">
            <text:p>Uzdots</text:p>
          </table:table-cell>
          <table:table-cell table:style-name="ce9" office:value-type="string" calcext:value-type="string">
            <text:p>Temats</text:p>
          </table:table-cell>
          <table:table-cell table:style-name="ce1" office:value-type="string" calcext:value-type="string">
            <text:p>Kopsavilkums</text:p>
          </table:table-cell>
          <table:table-cell table:style-name="ce12" table:number-columns-repeated="16379"/>
        </table:table-row>
        <table:table-row table:style-name="ro2">
          <table:table-cell table:style-name="ce2" office:value-type="string" calcext:value-type="string">
            <text:p>1.09.2025</text:p>
          </table:table-cell>
          <table:table-cell table:style-name="ce2" office:value-type="string" calcext:value-type="string">
            <text:p>Monomi.</text:p>
            <text:p>SR: Atpazīst monomus starp dažādām matemātiskām izteiksmēm. Nosaka monomam pretēju, līdzīgu monomu. Nosaka, vai monoms ir uzrakstīts normālformā. Nosaka dotā monoma koeficientu un pakāpi. Aprēķina izteiksmes vērtību.</text:p>
          </table:table-cell>
          <table:table-cell table:style-name="ce14"/>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2">
          <table:table-cell table:style-name="ce2" office:value-type="string" calcext:value-type="string">
            <text:p>2.09.2025</text:p>
          </table:table-cell>
          <table:table-cell table:style-name="ce2" office:value-type="string" calcext:value-type="string">
            <text:p>Monomi.</text:p>
            <text:p>SR: Atpazīst monomus starp dažādām matemātiskām izteiksmēm. Nosaka monomam pretēju, līdzīgu monomu. Nosaka, vai monoms ir uzrakstīts normālformā. Nosaka dotā monoma koeficientu un pakāpi. Aprēķina izteiksmes vērtību.</text:p>
          </table:table-cell>
          <table:table-cell table:style-name="ce14"/>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2">
          <table:table-cell table:style-name="ce2" office:value-type="string" calcext:value-type="string">
            <text:p>4.09.2025</text:p>
          </table:table-cell>
          <table:table-cell table:style-name="ce2" office:value-type="string" calcext:value-type="string">
            <text:p>Monomi.</text:p>
            <text:p>SR: Atpazīst monomus starp dažādām matemātiskām izteiksmēm. Nosaka monomam pretēju, līdzīgu monomu. Nosaka, vai monoms ir uzrakstīts normālformā. Nosaka dotā monoma koeficientu un pakāpi. Aprēķina izteiksmes vērtību.</text:p>
          </table:table-cell>
          <table:table-cell table:style-name="ce14"/>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2">
          <table:table-cell table:style-name="ce2" office:value-type="string" calcext:value-type="string">
            <text:p>4.09.2025</text:p>
          </table:table-cell>
          <table:table-cell table:style-name="ce2" office:value-type="string" calcext:value-type="string">
            <text:p>Monomi.</text:p>
            <text:p>SR: Atpazīst monomus starp dažādām matemātiskām izteiksmēm. Nosaka monomam pretēju, līdzīgu monomu. Nosaka, vai monoms ir uzrakstīts normālformā. Nosaka dotā monoma koeficientu un pakāpi. Aprēķina izteiksmes vērtību.</text:p>
          </table:table-cell>
          <table:table-cell table:style-name="ce14"/>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2">
          <table:table-cell table:style-name="ce2" office:value-type="string" calcext:value-type="string">
            <text:p>5.09.2025</text:p>
          </table:table-cell>
          <table:table-cell table:style-name="ce2" office:value-type="string" calcext:value-type="string">
            <text:p>Monomi.</text:p>
            <text:p>SR: Atpazīst monomus starp dažādām matemātiskām izteiksmēm. Nosaka monomam pretēju, līdzīgu monomu. Nosaka, vai monoms ir uzrakstīts normālformā. Nosaka dotā monoma koeficientu un pakāpi. Aprēķina izteiksmes vērtību.</text:p>
          </table:table-cell>
          <table:table-cell table:style-name="ce14" office:value-type="string" calcext:value-type="string">
            <text:p>Nepieciešama mapīte izdales materiāliem un likumu klade (ja tāda nav saglabājusies no pagājušā gada).</text:p>
            <text:p> Monomi_1.pptx</text:p>
            <text:p>8.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2">
          <table:table-cell table:style-name="ce2" office:value-type="string" calcext:value-type="string">
            <text:p>5.09.2025</text:p>
          </table:table-cell>
          <table:table-cell table:style-name="ce2" office:value-type="string" calcext:value-type="string">
            <text:p>Monomi.</text:p>
            <text:p>SR: Atpazīst monomus starp dažādām matemātiskām izteiksmēm. Nosaka monomam pretēju, līdzīgu monomu. Nosaka, vai monoms ir uzrakstīts normālformā. Nosaka dotā monoma koeficientu un pakāpi. Aprēķina izteiksmes vērtību.</text:p>
          </table:table-cell>
          <table:table-cell table:style-name="ce14"/>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3">
          <table:table-cell table:style-name="ce2" office:value-type="string" calcext:value-type="string">
            <text:p>8.09.2025</text:p>
          </table:table-cell>
          <table:table-cell table:style-name="ce2" office:value-type="string" calcext:value-type="string">
            <text:p>Darbības ar monomiem.</text:p>
            <text:p>SR: Pārveido izteiksmes, veicot darbības ar monomiem.</text:p>
          </table:table-cell>
          <table:table-cell table:style-name="ce14" office:value-type="string" calcext:value-type="string">
            <text:p>Stundā: 8. - 12. uzd. no izdales lapām</text:p>
            <text:p> UZD_Monomi_Darbības ar monomiem.pdf</text:p>
            <text:p>9.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4">
          <table:table-cell table:style-name="ce2" office:value-type="string" calcext:value-type="string">
            <text:p>9.09.2025</text:p>
          </table:table-cell>
          <table:table-cell table:style-name="ce2" office:value-type="string" calcext:value-type="string">
            <text:p>Darbības ar monomiem.</text:p>
            <text:p>SR: Pārveido izteiksmes, veicot darbības ar monomiem.</text:p>
          </table:table-cell>
          <table:table-cell table:style-name="ce14" office:value-type="string" calcext:value-type="string">
            <text:p>Atbilžu iesūtīšana25</text:p>
            <text:p>Mājās: Pabeigt 2. un 3. uzd. no darba lapas</text:p>
            <text:p> DL25_Darbības ar monomiem 2.docx</text:p>
            <text:p>11.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3">
          <table:table-cell table:style-name="ce2" office:value-type="string" calcext:value-type="string">
            <text:p>11.09.2025</text:p>
          </table:table-cell>
          <table:table-cell table:style-name="ce2" office:value-type="string" calcext:value-type="string">
            <text:p>Darbības ar monomiem.</text:p>
            <text:p>SR: Pārveido izteiksmes, veicot darbības ar monomiem.</text:p>
          </table:table-cell>
          <table:table-cell table:style-name="ce14" office:value-type="string" calcext:value-type="string">
            <text:p>Mājās: Pabeigt darba lapu "Darbības ar monomiem"</text:p>
            <text:p> DL25_Darbības ar monomiem 2.docx</text:p>
            <text:p>12.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3">
          <table:table-cell table:style-name="ce2" office:value-type="string" calcext:value-type="string">
            <text:p>11.09.2025</text:p>
          </table:table-cell>
          <table:table-cell table:style-name="ce2" office:value-type="string" calcext:value-type="string">
            <text:p>Polinomi.</text:p>
            <text:p>SR: Zina, kas ir polinoms, binoms, trinoms, polinoma locekļi, polinoma pakāpe. Aprēķina polinoma skaitlisko vērtību.</text:p>
          </table:table-cell>
          <table:table-cell table:style-name="ce14" office:value-type="string" calcext:value-type="string">
            <text:p> Teorija_Polinomi.pptx</text:p>
            <text:p>12.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5">
          <table:table-cell table:style-name="ce2" office:value-type="string" calcext:value-type="string">
            <text:p>12.09.2025</text:p>
          </table:table-cell>
          <table:table-cell table:style-name="ce2" office:value-type="string" calcext:value-type="string">
            <text:p>Polinomu saskaitīšana un atņemšana.</text:p>
            <text:p>SR: Saskaita un atņem polinomus, izvēloties ērtāko pierakstu.</text:p>
          </table:table-cell>
          <table:table-cell table:style-name="ce2" office:value-type="string" calcext:value-type="string">
            <text:p>Stundā: Darba lapa no 1. līdz 8. uzd.</text:p>
            <text:p> DL25_Polinomu saskaitīšana un atņemšana.docx</text:p>
            <text:p>15.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3">
          <table:table-cell table:style-name="ce2" office:value-type="string" calcext:value-type="string">
            <text:p>12.09.2025</text:p>
          </table:table-cell>
          <table:table-cell table:style-name="ce2" office:value-type="string" calcext:value-type="string">
            <text:p>Polinomu saskaitīšana un atņemšana.</text:p>
            <text:p>SR: Saskaita un atņem polinomus, izvēloties ērtāko pierakstu.</text:p>
          </table:table-cell>
          <table:table-cell table:style-name="ce14" office:value-type="string" calcext:value-type="string">
            <text:p> DL_darbibas ar monomiem_ATBILDES.pdf</text:p>
            <text:p> DL_Polinomu saskaitīšana un atņemšana_ATBILDES.pdf</text:p>
            <text:p>15.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4">
          <table:table-cell table:style-name="ce2" office:value-type="string" calcext:value-type="string">
            <text:p>15.09.2025</text:p>
          </table:table-cell>
          <table:table-cell table:style-name="ce2" office:value-type="string" calcext:value-type="string">
            <text:p>(KVD Polinomu saskaitīšana un atņemšana)</text:p>
            <text:p>Polinoma reizināšana ar monomu.</text:p>
            <text:p>SR: Reizina polinomu ar monomu.</text:p>
          </table:table-cell>
          <table:table-cell table:style-name="ce14" office:value-type="string" calcext:value-type="string">
            <text:p>Stundā: Darba lapa "Polinomu reizināšana ar monomu"</text:p>
            <text:p> DL25_Polinoma reizināšana un dalīšana ar monomu.docx</text:p>
            <text:p> P23_Polinomu reizināšana un dalīšana.pptx</text:p>
            <text:p>16.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6">
          <table:table-cell table:style-name="ce2" office:value-type="string" calcext:value-type="string">
            <text:p>16.09.2025</text:p>
          </table:table-cell>
          <table:table-cell table:style-name="ce2" office:value-type="string" calcext:value-type="string">
            <text:p>Polinoma dalīšana ar monomu.</text:p>
            <text:p>SR: Dala polinomu ar monomu.</text:p>
          </table:table-cell>
          <table:table-cell table:style-name="ce2" office:value-type="string" calcext:value-type="string">
            <text:p>Stundā: Darba lapa "Polinomu dalīšana ar monomu"</text:p>
            <text:p> DL25_Polinoma reizināšana un dalīšana ar monomu.docx</text:p>
            <text:p> P23_Polinomu reizināšana un dalīšana.pptx</text:p>
            <text:p>18.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7">
          <table:table-cell table:style-name="ce2" office:value-type="string" calcext:value-type="string">
            <text:p>18.09.2025</text:p>
          </table:table-cell>
          <table:table-cell table:style-name="ce2" office:value-type="string" calcext:value-type="string">
            <text:p>Polinoma reizināšana ar polinomu.</text:p>
            <text:p>SR: Reizina polinomu ar polinomu.</text:p>
          </table:table-cell>
          <table:table-cell table:style-name="ce14" office:value-type="string" calcext:value-type="string">
            <text:p> DL23_polinomu reizināšana ar polinomu vienadojumi.docx</text:p>
            <text:p>19.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7">
          <table:table-cell table:style-name="ce2" office:value-type="string" calcext:value-type="string">
            <text:p>18.09.2025</text:p>
          </table:table-cell>
          <table:table-cell table:style-name="ce2" office:value-type="string" calcext:value-type="string">
            <text:p>Polinoma reizināšana ar polinomu.</text:p>
            <text:p>SR: Reizina polinomu ar polinomu.</text:p>
          </table:table-cell>
          <table:table-cell table:style-name="ce14"/>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2">
          <table:table-cell table:style-name="ce2" office:value-type="string" calcext:value-type="string">
            <text:p>19.09.2025</text:p>
          </table:table-cell>
          <table:table-cell table:style-name="ce2" office:value-type="string" calcext:value-type="string">
            <text:p>(KVD Polinomu reizināšana un dalīšana)</text:p>
            <text:p>Vienādojumu un nevienādību atrisināšana.</text:p>
            <text:p>SR: Vienkāršo izteiksmes, izmantojot polinomu reizināšanu. Izmanto darbības ar monomiem un polinomiem, atrisinot lineārus vienādojumus un nevienādības.</text:p>
          </table:table-cell>
          <table:table-cell table:style-name="ce14" office:value-type="string" calcext:value-type="string">
            <text:p>Stundā: Darba lapa</text:p>
            <text:p> DL25_vienodājumi un nevienādības.docx</text:p>
            <text:p>22.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4">
          <table:table-cell table:style-name="ce2" office:value-type="string" calcext:value-type="string">
            <text:p>19.09.2025</text:p>
          </table:table-cell>
          <table:table-cell table:style-name="ce2" office:value-type="string" calcext:value-type="string">
            <text:p>Vienādojumu un nevienādību atrisināšana.</text:p>
            <text:p>SR: Vienkāršo izteiksmes, izmantojot polinomu reizināšanu. Izmanto darbības ar monomiem un polinomiem, atrisinot lineārus vienādojumus un nevienādības.</text:p>
          </table:table-cell>
          <table:table-cell table:style-name="ce2"/>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4">
          <table:table-cell table:style-name="ce2" office:value-type="string" calcext:value-type="string">
            <text:p>22.09.2025</text:p>
          </table:table-cell>
          <table:table-cell table:style-name="ce2" office:value-type="string" calcext:value-type="string">
            <text:p>Gatavošanās temata noslēguma pārbaudes darbam</text:p>
          </table:table-cell>
          <table:table-cell table:style-name="ce14" office:value-type="string" calcext:value-type="string">
            <text:p>Stundā: Apkopojums par tematu</text:p>
            <text:p> 22_Apkopojums par tematu polinomi.pdf</text:p>
            <text:p> Atbildes.pdf</text:p>
            <text:p>23.09.2025</text:p>
          </table:table-cell>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8">
          <table:table-cell table:style-name="ce2" office:value-type="string" calcext:value-type="string">
            <text:p>23.09.2025</text:p>
          </table:table-cell>
          <table:table-cell table:style-name="ce2" office:value-type="string" calcext:value-type="string">
            <text:p>TNPD Monomi un polinomi</text:p>
            <text:p>SR: Saskaita, atņem monomus, reizina un dala monomu ar monomu, kāpina monomu, saskaita, atņem polinomus, reizina monomu ar polinomu, dala polinomu ar monomu, reizina polinomus.*Ar algebrisku izteiksmi apraksta plaknes figūru, telpisku ķermeņu lielumus.*Nosaka monoma un polinoma pakāpi.</text:p>
          </table:table-cell>
          <table:table-cell table:style-name="ce2"/>
          <table:table-cell table:style-name="ce2" office:value-type="string" calcext:value-type="string">
            <text:p>Monomi un polinomi. </text:p>
          </table:table-cell>
          <table:table-cell office:value-type="string" calcext:value-type="string">
            <text:p>1.temats</text:p>
          </table:table-cell>
          <table:table-cell table:style-name="ce12" table:number-columns-repeated="16379"/>
        </table:table-row>
        <table:table-row table:style-name="ro9">
          <table:table-cell table:style-name="ce2" office:value-type="string" calcext:value-type="string">
            <text:p>25.09.2025</text:p>
          </table:table-cell>
          <table:table-cell table:style-name="ce2" office:value-type="string" calcext:value-type="string">
            <text:p>Skaitļu kopas.</text:p>
            <text:p>SR: Aktualizē zināmās skaitļu kopas. Nosaka un paskaidro skaitļa piederību kopām N, Z, Q.  Skaidro, kas ir iracionāli skaitļi, uzraksta un nosauc iracionālu skaitļu piemērus.</text:p>
          </table:table-cell>
          <table:table-cell table:style-name="ce2" office:value-type="string" calcext:value-type="string">
            <text:p>Teorija: M.g. 32. lpp.</text:p>
            <text:p>Stundā: M.g. 4.,5., 10. - 13. uzd. 34. - 35. lpp.</text:p>
            <text:p>26.09.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3">
          <table:table-cell table:style-name="ce2" office:value-type="string" calcext:value-type="string">
            <text:p>25.09.2025</text:p>
          </table:table-cell>
          <table:table-cell table:style-name="ce2" office:value-type="string" calcext:value-type="string">
            <text:p>Bezgalīgas periodiskas decimāldaļas.</text:p>
            <text:p>SR: Skaidro racionālo skaitļu kopas izveidošanos, kas ir bezgalīga periodiska decimāldaļa. Uzraksta skaitli, kā periodisku decimāldaļu.</text:p>
          </table:table-cell>
          <table:table-cell table:style-name="ce2"/>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3">
          <table:table-cell table:style-name="ce2" office:value-type="string" calcext:value-type="string">
            <text:p>26.09.2025</text:p>
          </table:table-cell>
          <table:table-cell table:style-name="ce2" office:value-type="string" calcext:value-type="string">
            <text:p>Aritmētiskā kvadrātsakne.</text:p>
            <text:p>SR: Aprēķina kvadrātsaknes vērtību gan izteiksmju vērtību novērtējot, gan izmantojot kvadrātu tabulu, gan — kalkulatoru.</text:p>
          </table:table-cell>
          <table:table-cell table:style-name="ce2"/>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3">
          <table:table-cell table:style-name="ce2" office:value-type="string" calcext:value-type="string">
            <text:p>26.09.2025</text:p>
          </table:table-cell>
          <table:table-cell table:style-name="ce2" office:value-type="string" calcext:value-type="string">
            <text:p>Aritmētiskā kvadrātsakne.</text:p>
            <text:p>SR: Aprēķina kvadrātsaknes vērtību gan izteiksmju vērtību novērtējot, gan izmantojot kvadrātu tabulu, gan — kalkulatoru.</text:p>
          </table:table-cell>
          <table:table-cell table:style-name="ce14"/>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2">
          <table:table-cell table:style-name="ce2" office:value-type="string" calcext:value-type="string">
            <text:p>29.09.2025</text:p>
          </table:table-cell>
          <table:table-cell table:style-name="ce2" office:value-type="string" calcext:value-type="string">
            <text:p>Aritmētiskā kvadrātsakne.</text:p>
            <text:p>SR: Salīdzina kvadrātsakņu vērtības. Nosaka starp kuriem diviem veseliem skaitļiem atrodas dotā kvadrātsakne.</text:p>
          </table:table-cell>
          <table:table-cell table:style-name="ce14" office:value-type="string" calcext:value-type="string">
            <text:p>Atbilžu iesūtīšana2524</text:p>
            <text:p>Mājās: 46. uzd. 46. lpp.</text:p>
            <text:p>Teorija: M.g. 40.lpp.</text:p>
            <text:p>Stundā: 35., 43. - 45. uzd. 45. - 46. lpp.</text:p>
            <text:p>30.09.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10">
          <table:table-cell table:style-name="ce2" office:value-type="string" calcext:value-type="string">
            <text:p>30.09.2025</text:p>
          </table:table-cell>
          <table:table-cell table:style-name="ce2" office:value-type="string" calcext:value-type="string">
            <text:p>(KVD Racionāli un iracionāli skaitļi. Aritmētiskā kvadrātsakne. Skaitļu kopas.)</text:p>
            <text:p>Kvadrātsaknes īpašības.</text:p>
            <text:p>SR: Aprēķina kvadrātsakni no reizinājuma un kvadrātsakņu reizinājumu. Iznes reizinātāju pirms saknes zīmes. Izpilda saskaitīšanu un atņemšanu ar kvadrātsaknēm. Aprēķina kvadrātsakni no pakāpes. Salīdzina izteiksmju vērtības, kas satur kvadrātsaknes, izvēlas paņēmienu salīdzināšanas veikšanai. Aprēķina kvadrātsaknes no daļas un kvadrātsakņu dalījumu.</text:p>
          </table:table-cell>
          <table:table-cell table:style-name="ce14"/>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2">
          <table:table-cell table:style-name="ce2" office:value-type="string" calcext:value-type="string">
            <text:p>2.10.2025</text:p>
          </table:table-cell>
          <table:table-cell table:style-name="ce2" office:value-type="string" calcext:value-type="string">
            <text:p>Kvadrātsaknes īpašības. Kvadrātsakne no reizinājuma.</text:p>
            <text:p>SR: Aprēķina kvadrātsakni no reizinājuma un kvadrātsakņu reizinājumu.</text:p>
          </table:table-cell>
          <table:table-cell table:style-name="ce2" office:value-type="string" calcext:value-type="string">
            <text:p>Teorija: M.g. 48.lpp.</text:p>
            <text:p>Stundā: M.g. 47. - 53. uzd. 50.lpp.</text:p>
            <text:p>3.10.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7">
          <table:table-cell table:style-name="ce2" office:value-type="string" calcext:value-type="string">
            <text:p>2.10.2025</text:p>
          </table:table-cell>
          <table:table-cell table:style-name="ce2" office:value-type="string" calcext:value-type="string">
            <text:p>Kvadrātsaknes īpašības. Kvadrātsakne no reizinājuma.</text:p>
            <text:p>SR: Aprēķina kvadrātsakni no reizinājuma un kvadrātsakņu reizinājumu.</text:p>
          </table:table-cell>
          <table:table-cell table:style-name="ce14"/>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3">
          <table:table-cell table:style-name="ce2" office:value-type="string" calcext:value-type="string">
            <text:p>3.10.2025</text:p>
          </table:table-cell>
          <table:table-cell table:style-name="ce2" office:value-type="string" calcext:value-type="string">
            <text:p>Reizinātāja iznešana pirms saknes zīmes</text:p>
            <text:p>SR: Iznes reizinātāju pirms saknes zīmes.</text:p>
          </table:table-cell>
          <table:table-cell table:style-name="ce14" office:value-type="string" calcext:value-type="string">
            <text:p>Teorija: M.g. 48.lpp.</text:p>
            <text:p>Stundā: M.g. 55.,56. uzd. 51. lpp.</text:p>
            <text:p>6.10.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11">
          <table:table-cell table:style-name="ce2" office:value-type="string" calcext:value-type="string">
            <text:p>3.10.2025</text:p>
          </table:table-cell>
          <table:table-cell table:style-name="ce2" office:value-type="string" calcext:value-type="string">
            <text:p>Līdzīgas kvadrātsaknes</text:p>
            <text:p>SR: Izpilda saskaitīšanu un atņemšanu ar kvadrātsaknēm.</text:p>
          </table:table-cell>
          <table:table-cell table:style-name="ce2" office:value-type="string" calcext:value-type="string">
            <text:p>Teorija: M.g. 48.lpp.</text:p>
            <text:p>Stundā: M.g. 58. - 61. uzd. 51. - 52. lpp.</text:p>
            <text:p>6.10.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11">
          <table:table-cell table:style-name="ce2" office:value-type="string" calcext:value-type="string">
            <text:p>6.10.2025</text:p>
          </table:table-cell>
          <table:table-cell table:style-name="ce2" office:value-type="string" calcext:value-type="string">
            <text:p>Līdzīgas kvadrātsaknes</text:p>
            <text:p>SR: Izpilda saskaitīšanu un atņemšanu ar kvadrātsaknēm.</text:p>
          </table:table-cell>
          <table:table-cell table:style-name="ce2" office:value-type="string" calcext:value-type="string">
            <text:p>Teorija: M.g. 48.lpp.</text:p>
            <text:p>Mājās pabeigt: 59. un 60. uzd. 52. lpp.</text:p>
            <text:p>7.10.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7">
          <table:table-cell table:style-name="ce2" office:value-type="string" calcext:value-type="string">
            <text:p>7.10.2025</text:p>
          </table:table-cell>
          <table:table-cell table:style-name="ce2" office:value-type="string" calcext:value-type="string">
            <text:p>Kvadrātsakne no pakāpes</text:p>
            <text:p>SR: Aprēķina kvadrātsakni no pakāpes.</text:p>
          </table:table-cell>
          <table:table-cell table:style-name="ce2"/>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3">
          <table:table-cell table:style-name="ce2" office:value-type="string" calcext:value-type="string">
            <text:p>9.10.2025</text:p>
          </table:table-cell>
          <table:table-cell table:style-name="ce2" office:value-type="string" calcext:value-type="string">
            <text:p>Kvadrātsakne no daļas</text:p>
            <text:p>SR: Aprēķina kvadrātsaknes no daļas un kvadrātsakņu dalījumu.</text:p>
          </table:table-cell>
          <table:table-cell table:style-name="ce14" office:value-type="string" calcext:value-type="string">
            <text:p>Teorija: M.g. 48.lpp.</text:p>
            <text:p>Mājās pabeigt: 78., 80. uzd. 55. lpp.</text:p>
            <text:p>10.10.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7">
          <table:table-cell table:style-name="ce2" office:value-type="string" calcext:value-type="string">
            <text:p>9.10.2025</text:p>
          </table:table-cell>
          <table:table-cell table:style-name="ce2" office:value-type="string" calcext:value-type="string">
            <text:p>Kvadrātsakne no daļas</text:p>
            <text:p>SR: Aprēķina kvadrātsaknes no daļas un kvadrātsakņu dalījumu.</text:p>
          </table:table-cell>
          <table:table-cell table:style-name="ce2"/>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7">
          <table:table-cell table:style-name="ce2" office:value-type="string" calcext:value-type="string">
            <text:p>10.10.2025</text:p>
          </table:table-cell>
          <table:table-cell table:style-name="ce2" office:value-type="string" calcext:value-type="string">
            <text:p>Kvadrātsakne no daļas</text:p>
            <text:p>SR: Aprēķina kvadrātsaknes no daļas un kvadrātsakņu dalījumu.</text:p>
          </table:table-cell>
          <table:table-cell table:style-name="ce14"/>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7">
          <table:table-cell table:style-name="ce2" office:value-type="string" calcext:value-type="string">
            <text:p>10.10.2025</text:p>
          </table:table-cell>
          <table:table-cell table:style-name="ce2" office:value-type="string" calcext:value-type="string">
            <text:p>Kvadrātsakne no daļas</text:p>
            <text:p>SR: Aprēķina kvadrātsaknes no daļas un kvadrātsakņu dalījumu.</text:p>
          </table:table-cell>
          <table:table-cell table:style-name="ce2"/>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11">
          <table:table-cell table:style-name="ce2" office:value-type="string" calcext:value-type="string">
            <text:p>13.10.2025</text:p>
          </table:table-cell>
          <table:table-cell table:style-name="ce2" office:value-type="string" calcext:value-type="string">
            <text:p>Kopsavilkums un paškontrole</text:p>
            <text:p>SR: Nosaka un paskaidro skaitļa piederību kopām N, Z, Q, R. Aprēķina kvadrātsaknes</text:p>
            <text:p>vērtību, izmantojot definīciju. Izmanto kvadrātsaknes īpašības. Iznes reizinātāju</text:p>
            <text:p>pirms kvadrātsaknes zīmes. Izpilda darbības ar līdzīgām kvadrātsaknēm.</text:p>
          </table:table-cell>
          <table:table-cell table:style-name="ce14" office:value-type="string" calcext:value-type="string">
            <text:p>Gatavoties pārbaudes darbam par skaitļu kopām un kvadrātsaknēm</text:p>
            <text:p> ES PROTU atbildes.pdf</text:p>
            <text:p>14.10.2025</text:p>
          </table:table-cell>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4">
          <table:table-cell table:style-name="ce2" office:value-type="string" calcext:value-type="string">
            <text:p>14.10.2025</text:p>
          </table:table-cell>
          <table:table-cell table:style-name="ce2" office:value-type="string" calcext:value-type="string">
            <text:p>TNPD "Skaitļu kopas. Kvadrātsakne."</text:p>
            <text:p>SR:Lieto aritmētiskās kvadrātsaknes īpašības un darbību īpašības, lai aprēķinātu izteiksmes vērtību, veiktu izteiksmju pārveidojumus.*Nosaka, pamato skaitļu piederību noteiktai reālo skaitļu apakškopai</text:p>
          </table:table-cell>
          <table:table-cell table:style-name="ce2"/>
          <table:table-cell table:style-name="ce2" office:value-type="string" calcext:value-type="string">
            <text:p>Kvadrātsakne.</text:p>
          </table:table-cell>
          <table:table-cell office:value-type="string" calcext:value-type="string">
            <text:p>2.temats</text:p>
          </table:table-cell>
          <table:table-cell table:style-name="ce12" table:number-columns-repeated="16379"/>
        </table:table-row>
        <table:table-row table:style-name="ro12">
          <table:table-cell table:style-name="ce2" office:value-type="string" calcext:value-type="string">
            <text:p>16.10.2025</text:p>
          </table:table-cell>
          <table:table-cell table:style-name="ce2" office:value-type="string" calcext:value-type="string">
            <text:p>Polinomu sadalīšana reizinātājos. Kopīga reizinātaja iznešana pirms iekavām.</text:p>
            <text:p>SR: Nosaka, vai dotā izteiksme ir sadalīta reizinātājos; Sadala polinomu reizinātājos,</text:p>
            <text:p>izmantojot kopīgā reizinātāja iznešanu pirms iekavām.</text:p>
          </table:table-cell>
          <table:table-cell table:style-name="ce14" office:value-type="string" calcext:value-type="string">
            <text:p>Teorija: 124. lpp.</text:p>
            <text:p>Stundā: 1. - 7. uzd. 126. lpp.</text:p>
            <text:p>17.10.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4">
          <table:table-cell table:style-name="ce2" office:value-type="string" calcext:value-type="string">
            <text:p>16.10.2025</text:p>
          </table:table-cell>
          <table:table-cell table:style-name="ce2" office:value-type="string" calcext:value-type="string">
            <text:p>Polinomu sadalīšana reizinātājos. Kopīga reizinātaja iznešana pirms iekavām.</text:p>
            <text:p>SR: Nosaka, vai dotā izteiksme ir sadalīta reizinātājos; Sadala polinomu reizinātājos,</text:p>
            <text:p>izmantojot kopīgā reizinātāja iznešanu pirms iekavām.</text:p>
          </table:table-cell>
          <table:table-cell table:style-name="ce14"/>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17.10.2025</text:p>
          </table:table-cell>
          <table:table-cell table:style-name="ce2" office:value-type="string" calcext:value-type="string">
            <text:p>Polinomu sadalīšana reizinātājos. Grupēšanas paņēmiens.</text:p>
            <text:p>SR: Sadala izteiksmi reizinātājos, grupējot; Izmanto kopīgā reizinātāja iznešanu pirms iekavām</text:p>
          </table:table-cell>
          <table:table-cell table:style-name="ce14" office:value-type="string" calcext:value-type="string">
            <text:p>Teorija: 124. lpp.</text:p>
            <text:p>Stundā: 8. - 9. uzd. 127. lpp.</text:p>
            <text:p>27.10.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17.10.2025</text:p>
          </table:table-cell>
          <table:table-cell table:style-name="ce2" office:value-type="string" calcext:value-type="string">
            <text:p>Polinomu sadalīšana reizinātājos. Grupēšanas paņēmiens.</text:p>
            <text:p>SR: Sadala izteiksmi reizinātājos, grupējot; Izmanto kopīgā reizinātāja iznešanu pirms iekavām</text:p>
          </table:table-cell>
          <table:table-cell table:style-name="ce14"/>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27.10.2025</text:p>
          </table:table-cell>
          <table:table-cell table:style-name="ce2" office:value-type="string" calcext:value-type="string">
            <text:p>Saīsinātās reizināšanas formulas</text:p>
            <text:p>SR: Izmanto formulas skaitlisku izteiksmju vērtību aprēķināšanai. Vienkāršo izteiksmes, izmantojot saīsinātās reizināšanas formulas.</text:p>
          </table:table-cell>
          <table:table-cell table:style-name="ce14"/>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28.10.2025</text:p>
          </table:table-cell>
          <table:table-cell table:style-name="ce2" office:value-type="string" calcext:value-type="string">
            <text:p>Saīsinātās reizināšanas formulas</text:p>
            <text:p>SR: Izmanto formulas skaitlisku izteiksmju vērtību aprēķināšanai. Vienkāršo izteiksmes, izmantojot saīsinātās reizināšanas formulas.</text:p>
          </table:table-cell>
          <table:table-cell table:style-name="ce14" office:value-type="string" calcext:value-type="string">
            <text:p>Mājās pabeigt: 1.,2. uzd. 129. lpp.</text:p>
            <text:p>30.10.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2">
          <table:table-cell table:style-name="ce2" office:value-type="string" calcext:value-type="string">
            <text:p>30.10.2025</text:p>
          </table:table-cell>
          <table:table-cell table:style-name="ce2" office:value-type="string" calcext:value-type="string">
            <text:p>Saīsinātās reizināšanas formulas</text:p>
            <text:p>SR: Izmanto formulas skaitlisku izteiksmju vērtību aprēķināšanai. Vienkāršo izteiksmes, izmantojot saīsinātās reizināšanas formulas.</text:p>
          </table:table-cell>
          <table:table-cell table:style-name="ce2" office:value-type="string" calcext:value-type="string">
            <text:p>Teorija: <text:a xlink:href="https://www.uzdevumi.lv/p/matematika/8-klase/polinomu-sadalisana-reizinatajos-saisinatas-reizinasanas-formulas-9626" xlink:type="simple">https://www.uzdevumi.lv/p/matematika/8-klase/polinomu-sadalisana-reizi...</text:a></text:p>
            <text:p>Stundā: M.g. 17. - 21. uzd. 130. - 131. lpp.</text:p>
            <text:p>31.10.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30.10.2025</text:p>
          </table:table-cell>
          <table:table-cell table:style-name="ce2" office:value-type="string" calcext:value-type="string">
            <text:p>Saīsinātās reizināšanas formulas</text:p>
            <text:p>SR: Izmanto formulas skaitlisku izteiksmju vērtību aprēķināšanai. Vienkāršo izteiksmes, izmantojot saīsinātās reizināšanas formulas.</text:p>
          </table:table-cell>
          <table:table-cell table:style-name="ce14"/>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31.10.2025</text:p>
          </table:table-cell>
          <table:table-cell table:style-name="ce2" office:value-type="string" calcext:value-type="string">
            <text:p>Saīsināto reizināšanas formulu lietošana sadalīšanai reizinātājos</text:p>
            <text:p>SR: Lieto saīsinātās reizināšanas formulas polinomu sadalīšanai reizinātājos</text:p>
          </table:table-cell>
          <table:table-cell table:style-name="ce14" office:value-type="string" calcext:value-type="string">
            <text:p>Teorija: M.g. 134. lpp.</text:p>
            <text:p>Stundā: M.g. 35. - 39. uzd. 135. lpp.</text:p>
            <text:p>3.11.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7">
          <table:table-cell table:style-name="ce2" office:value-type="string" calcext:value-type="string">
            <text:p>31.10.2025</text:p>
          </table:table-cell>
          <table:table-cell table:style-name="ce2" office:value-type="string" calcext:value-type="string">
            <text:p>Saīsināto reizināšanas formulu lietošana sadalīšanai reizinātājos</text:p>
            <text:p>SR: Lieto saīsinātās reizināšanas formulas polinomu sadalīšanai reizinātājos</text:p>
          </table:table-cell>
          <table:table-cell table:style-name="ce2"/>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3.11.2025</text:p>
          </table:table-cell>
          <table:table-cell table:style-name="ce2" office:value-type="string" calcext:value-type="string">
            <text:p>Polinomu sadalīšana reizinātājos ar dažādām metodēm.</text:p>
            <text:p>SR: Lieto kopīgā iznešanu pirms iekavām, grupēšanas paņēmienu un saīsinātās reizināšanas formulas, sadalot polinomus reizinātājos.</text:p>
          </table:table-cell>
          <table:table-cell table:style-name="ce14" office:value-type="string" calcext:value-type="string">
            <text:p>Stundā: M.g. 41., 42. uzd. 136. lpp.</text:p>
            <text:p>4.11.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4.11.2025</text:p>
          </table:table-cell>
          <table:table-cell table:style-name="ce2" office:value-type="string" calcext:value-type="string">
            <text:p>Polinomu sadalīšana reizinātājos ar dažādām metodēm.</text:p>
            <text:p>SR: Lieto kopīgā iznešanu pirms iekavām, grupēšanas paņēmienu un saīsinātās reizināšanas formulas, sadalot polinomus reizinātājos.</text:p>
          </table:table-cell>
          <table:table-cell table:style-name="ce14"/>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6.11.2025</text:p>
          </table:table-cell>
          <table:table-cell table:style-name="ce2" office:value-type="string" calcext:value-type="string">
            <text:p>Polinomu sadalīšana reizinātājos ar dažādām metodēm.</text:p>
            <text:p>SR: Lieto kopīgā iznešanu pirms iekavām, grupēšanas paņēmienu un saīsinātās reizināšanas formulas, sadalot polinomus reizinātājos.</text:p>
          </table:table-cell>
          <table:table-cell table:style-name="ce14" office:value-type="string" calcext:value-type="string">
            <text:p> Atbildes_DL25_polinomu sadalīšana reizinātājos.pdf</text:p>
            <text:p> DL25_gatavošanās pārbaudes darbam.docx</text:p>
            <text:p>7.11.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3">
          <table:table-cell table:style-name="ce2" office:value-type="string" calcext:value-type="string">
            <text:p>6.11.2025</text:p>
          </table:table-cell>
          <table:table-cell table:style-name="ce2" office:value-type="string" calcext:value-type="string">
            <text:p>Polinomu sadalīšana reizinātājos ar dažādām metodēm.</text:p>
            <text:p>SR: Lieto kopīgā iznešanu pirms iekavām, grupēšanas paņēmienu un saīsinātās reizināšanas formulas, sadalot polinomus reizinātājos.</text:p>
          </table:table-cell>
          <table:table-cell table:style-name="ce2"/>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7">
          <table:table-cell table:style-name="ce2" office:value-type="string" calcext:value-type="string">
            <text:p>7.11.2025</text:p>
          </table:table-cell>
          <table:table-cell table:style-name="ce2" office:value-type="string" calcext:value-type="string">
            <text:p>Laukuma īpasības un vienlielas figūras.</text:p>
            <text:p>SR: Atkārto laukuma mērvienības. Lieto laukuma īpašības.</text:p>
          </table:table-cell>
          <table:table-cell table:style-name="ce14" office:value-type="string" calcext:value-type="string">
            <text:p>Teorija: M.g. 60. - 61. lpp.</text:p>
            <text:p>8.11.2025</text:p>
          </table:table-cell>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7">
          <table:table-cell table:style-name="ce2" office:value-type="string" calcext:value-type="string">
            <text:p>7.11.2025</text:p>
          </table:table-cell>
          <table:table-cell table:style-name="ce2" office:value-type="string" calcext:value-type="string">
            <text:p>Laukuma īpasības un vienlielas figūras.</text:p>
            <text:p>SR: Atkārto laukuma mērvienības. Lieto laukuma īpašības.</text:p>
          </table:table-cell>
          <table:table-cell table:style-name="ce2"/>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7">
          <table:table-cell table:style-name="ce2" office:value-type="string" calcext:value-type="string">
            <text:p>8.11.2025</text:p>
          </table:table-cell>
          <table:table-cell table:style-name="ce2" office:value-type="string" calcext:value-type="string">
            <text:p>Laukuma īpasības un vienlielas figūras.</text:p>
            <text:p>SR: Atkārto laukuma mērvienības. Lieto laukuma īpašības.</text:p>
          </table:table-cell>
          <table:table-cell table:style-name="ce14"/>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12">
          <table:table-cell table:style-name="ce2" office:value-type="string" calcext:value-type="string">
            <text:p>10.11.2025</text:p>
          </table:table-cell>
          <table:table-cell table:style-name="ce2" office:value-type="string" calcext:value-type="string">
            <text:p>TNPD "Polinomu sadalīšana reizinātājos"</text:p>
            <text:p>SR: Sadals polinomus reizinātājos, iznesot kopīgo reizinātāju pirms iekavām, izmantojot grupēšanas paņēmienu un saīsinātās reizināšanas formulas. Vienkāršo izteiksmes, risina vienādojumus, lietojot SRF.</text:p>
          </table:table-cell>
          <table:table-cell table:style-name="ce2"/>
          <table:table-cell table:style-name="ce2" office:value-type="string" calcext:value-type="string">
            <text:p>Polinomu sadalīšana reizinātājos.</text:p>
          </table:table-cell>
          <table:table-cell office:value-type="string" calcext:value-type="string">
            <text:p>3.temats</text:p>
          </table:table-cell>
          <table:table-cell table:style-name="ce12" table:number-columns-repeated="16379"/>
        </table:table-row>
        <table:table-row table:style-name="ro13">
          <table:table-cell table:style-name="ce2" office:value-type="string" calcext:value-type="string">
            <text:p>11.11.2025</text:p>
          </table:table-cell>
          <table:table-cell table:style-name="ce2" office:value-type="string" calcext:value-type="string">
            <text:p>Laukuma īpasības un vienlielas figūras.</text:p>
            <text:p>SR: Atkārto laukuma mērvienības. Lieto laukuma īpašības.</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3">
          <table:table-cell table:style-name="ce2" office:value-type="string" calcext:value-type="string">
            <text:p>13.11.2025</text:p>
          </table:table-cell>
          <table:table-cell table:style-name="ce2" office:value-type="string" calcext:value-type="string">
            <text:p>Laukuma īpašības un vienlielas figūras.</text:p>
            <text:p>SR: Aprēķina taisnstūra un taisnleņķa trijstūra laukumu.</text:p>
          </table:table-cell>
          <table:table-cell table:style-name="ce2" office:value-type="string" calcext:value-type="string">
            <text:p>Stundā: M.g. 65. - 66. lpp.</text:p>
            <text:p>14.11.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13.11.2025</text:p>
          </table:table-cell>
          <table:table-cell table:style-name="ce2" office:value-type="string" calcext:value-type="string">
            <text:p>Laukuma īpašības un vienlielas figūras.</text:p>
            <text:p>SR: Aprēķina taisnstūra un taisnleņķa trijstūra laukumu.</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14.11.2025</text:p>
          </table:table-cell>
          <table:table-cell table:style-name="ce2" office:value-type="string" calcext:value-type="string">
            <text:p>Laukuma īpašības un vienlielas figūras. Pīka formula.</text:p>
            <text:p>SR: Aprēķina taisnstūra un taisnleņķa trijstūra laukumu.</text:p>
          </table:table-cell>
          <table:table-cell table:style-name="ce2"/>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14.11.2025</text:p>
          </table:table-cell>
          <table:table-cell table:style-name="ce2" office:value-type="string" calcext:value-type="string">
            <text:p>Trijstūra laukums. Vienlieli trijstūri.</text:p>
            <text:p>SR: Lieto trijstūra laukuma aprēķināšanas formulu.</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3">
          <table:table-cell table:style-name="ce2" office:value-type="string" calcext:value-type="string">
            <text:p>20.11.2025</text:p>
          </table:table-cell>
          <table:table-cell table:style-name="ce2" office:value-type="string" calcext:value-type="string">
            <text:p>Trijstūra laukums. Vienlieli trijstūri.</text:p>
            <text:p>SR: Lieto trijstūra laukuma aprēķināšanas formulu.</text:p>
          </table:table-cell>
          <table:table-cell table:style-name="ce14" office:value-type="string" calcext:value-type="string">
            <text:p>Teorija: M.g. 70. lpp.</text:p>
            <text:p>Stundā: M.g. 72. - 73. lpp.</text:p>
            <text:p>21.11.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20.11.2025</text:p>
          </table:table-cell>
          <table:table-cell table:style-name="ce2" office:value-type="string" calcext:value-type="string">
            <text:p>Trijstūra laukums. Vienlieli trijstūri.</text:p>
            <text:p>SR: Lieto trijstūra laukuma aprēķināšanas formulu.</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11">
          <table:table-cell table:style-name="ce2" office:value-type="string" calcext:value-type="string">
            <text:p>21.11.2025</text:p>
          </table:table-cell>
          <table:table-cell table:style-name="ce2" office:value-type="string" calcext:value-type="string">
            <text:p>Trijstūra laukums. Vienlieli trijstūri.</text:p>
            <text:p>SR: Lieto trijstūra laukuma aprēķināšanas formulu un zināšanas par vienlieliem trijstūriem pierādījuma uzdevumos.</text:p>
          </table:table-cell>
          <table:table-cell table:style-name="ce2" office:value-type="string" calcext:value-type="string">
            <text:p>Teorija: M.g. 70. lpp.</text:p>
            <text:p>Stundā: M.g. 73. - 74. lpp. 45., 47. - 49. uzd.</text:p>
            <text:p>24.11.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21.11.2025</text:p>
          </table:table-cell>
          <table:table-cell table:style-name="ce2" office:value-type="string" calcext:value-type="string">
            <text:p>Riņķa un sektora laukums.</text:p>
            <text:p>SR: Aprēķina riņķa un sektora laukumu, t. sk. praktiska satura uzdevumos.</text:p>
          </table:table-cell>
          <table:table-cell table:style-name="ce14" office:value-type="string" calcext:value-type="string">
            <text:p>Uz atsevišķas lapas veikt kļūdu labojumu TNPD “Kā izmanto izteiksmju sadalīšanu reizinātājos?” (iesniegt kopā ar darbu līdz 25.11.)</text:p>
            <text:p>24.11.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24.11.2025</text:p>
          </table:table-cell>
          <table:table-cell table:style-name="ce2" office:value-type="string" calcext:value-type="string">
            <text:p>Riņķa un sektora laukums.</text:p>
            <text:p>SR: Aprēķina riņķa un sektora laukumu, t. sk. praktiska satura uzdevumos.</text:p>
          </table:table-cell>
          <table:table-cell table:style-name="ce14" office:value-type="string" calcext:value-type="string">
            <text:p>Uz atsevišķas lapas veikt kļūdu labojumu TNPD “Kā izmanto izteiksmju sadalīšanu reizinātājos?” (iesniegt kopā ar darbu līdz 25.11.)</text:p>
            <text:p>25.11.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25.11.2025</text:p>
          </table:table-cell>
          <table:table-cell table:style-name="ce2" office:value-type="string" calcext:value-type="string">
            <text:p>Riņķa un sektora laukums.</text:p>
            <text:p>SR: Aprēķina riņķa un sektora laukumu, t. sk. praktiska satura uzdevumos.</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2">
          <table:table-cell table:style-name="ce2" office:value-type="string" calcext:value-type="string">
            <text:p>27.11.2025</text:p>
          </table:table-cell>
          <table:table-cell table:style-name="ce2" office:value-type="string" calcext:value-type="string">
            <text:p>Kombinētas figūras.</text:p>
            <text:p>SR: Izveido figūru laukumu aprēķināšanas izteiksmes. Lieto taisnstūra, trijstūra riņķa un riņķa sektora laukuma aprēķināšanas formulas.</text:p>
          </table:table-cell>
          <table:table-cell table:style-name="ce2" office:value-type="string" calcext:value-type="string">
            <text:p>M.g. 79. - 80. lpp.</text:p>
            <text:p> DL25_Kombinētas figūras.docx</text:p>
            <text:p>28.11.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3">
          <table:table-cell table:style-name="ce2" office:value-type="string" calcext:value-type="string">
            <text:p>27.11.2025</text:p>
          </table:table-cell>
          <table:table-cell table:style-name="ce2" office:value-type="string" calcext:value-type="string">
            <text:p>Kombinētas figūras.</text:p>
            <text:p>SR: Izveido figūru laukumu aprēķināšanas izteiksmes. Lieto taisnstūra, trijstūra riņķa un riņķa sektora laukuma aprēķināšanas formulas.</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7">
          <table:table-cell table:style-name="ce2" office:value-type="string" calcext:value-type="string">
            <text:p>28.11.2025</text:p>
          </table:table-cell>
          <table:table-cell table:style-name="ce2" office:value-type="string" calcext:value-type="string">
            <text:p>KVD "Trijstūra, riņķa un riņķa sektora laukums"</text:p>
            <text:p>SR: Patstāvīgi lieto trijstūra un riņķa laukuma formulas.</text:p>
          </table:table-cell>
          <table:table-cell table:style-name="ce14"/>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11">
          <table:table-cell table:style-name="ce2" office:value-type="string" calcext:value-type="string">
            <text:p>28.11.2025</text:p>
          </table:table-cell>
          <table:table-cell table:style-name="ce2" office:value-type="string" calcext:value-type="string">
            <text:p>Telpiskas figūras.</text:p>
            <text:p>SR: Skaidro, kā veidojas un kā aprēķināt prizmas sānu virsmas un pilnas virsmas laukumu. Zīmē dažādu prizmu izklājumus. Aprēķina prizmas sānu virsmas un pilnas virsmas laukumu,</text:p>
            <text:p>aprēķinu veikšanai izvēlas atbilstošus lielumus. Aprēķina prizmas tilpumu, t. sk. praktiska satura uzdevumos.</text:p>
          </table:table-cell>
          <table:table-cell table:style-name="ce2" office:value-type="string" calcext:value-type="string">
            <text:p>Teorija: M.g. 82. lpp.</text:p>
            <text:p>1.12.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11">
          <table:table-cell table:style-name="ce2" office:value-type="string" calcext:value-type="string">
            <text:p>1.12.2025</text:p>
          </table:table-cell>
          <table:table-cell table:style-name="ce2" office:value-type="string" calcext:value-type="string">
            <text:p>Telpiskas figūras.</text:p>
            <text:p>SR: Skaidro, kā veidojas un kā aprēķināt prizmas sānu virsmas un pilnas virsmas laukumu. Zīmē dažādu prizmu izklājumus. Aprēķina prizmas sānu virsmas un pilnas virsmas laukumu,</text:p>
            <text:p>aprēķinu veikšanai izvēlas atbilstošus lielumus. Aprēķina prizmas tilpumu, t. sk. praktiska satura uzdevumos.</text:p>
          </table:table-cell>
          <table:table-cell table:style-name="ce2"/>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4">
          <table:table-cell table:style-name="ce2" office:value-type="string" calcext:value-type="string">
            <text:p>4.12.2025</text:p>
          </table:table-cell>
          <table:table-cell table:style-name="ce2" office:value-type="string" calcext:value-type="string">
            <text:p>Telpiskas figūras. Prizma.</text:p>
            <text:p>SR: Aprēķina prizmas sānu virsmas un pilnas virsmas laukumu, aprēķinu veikšanai izvēlas atbilstošus lielumus. Aprēķina prizmas tilpumu, t. sk. praktiska satura uzdevumos.</text:p>
          </table:table-cell>
          <table:table-cell table:style-name="ce14" office:value-type="string" calcext:value-type="string">
            <text:p>Teorija: M.g. 82. lpp.</text:p>
            <text:p>Stundā: 81. - 90. uzd. 87. - 88. lpp.</text:p>
            <text:p>5.12.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4">
          <table:table-cell table:style-name="ce2" office:value-type="string" calcext:value-type="string">
            <text:p>4.12.2025</text:p>
          </table:table-cell>
          <table:table-cell table:style-name="ce2" office:value-type="string" calcext:value-type="string">
            <text:p>Telpiskas figūras. Prizma.</text:p>
            <text:p>SR: Aprēķina prizmas sānu virsmas un pilnas virsmas laukumu, aprēķinu veikšanai izvēlas atbilstošus lielumus. Aprēķina prizmas tilpumu, t. sk. praktiska satura uzdevumos.</text:p>
          </table:table-cell>
          <table:table-cell table:style-name="ce2"/>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4">
          <table:table-cell table:style-name="ce2" office:value-type="string" calcext:value-type="string">
            <text:p>5.12.2025</text:p>
          </table:table-cell>
          <table:table-cell table:style-name="ce2" office:value-type="string" calcext:value-type="string">
            <text:p>Telpiskas figūras. Cilindrs.</text:p>
            <text:p>SR: Aprēķina cilindra sānu virsmas un pilnas virsmas laukumu, aprēķinu veikšanai izvēlas atbilstošus lielumus. Aprēķina cilindra tilpumu, t. sk. praktiska satura uzdevumos.</text:p>
          </table:table-cell>
          <table:table-cell table:style-name="ce14" office:value-type="string" calcext:value-type="string">
            <text:p>Teorija: M.g. 84. lpp.</text:p>
            <text:p>Stundā: 96.-98. uzd. 89. lpp.</text:p>
            <text:p>8.12.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4">
          <table:table-cell table:style-name="ce2" office:value-type="string" calcext:value-type="string">
            <text:p>5.12.2025</text:p>
          </table:table-cell>
          <table:table-cell table:style-name="ce2" office:value-type="string" calcext:value-type="string">
            <text:p>Telpiskas figūras. Cilindrs.</text:p>
            <text:p>SR: Aprēķina cilindra sānu virsmas un pilnas virsmas laukumu, aprēķinu veikšanai izvēlas atbilstošus lielumus. Aprēķina cilindra tilpumu, t. sk. praktiska satura uzdevumos.</text:p>
          </table:table-cell>
          <table:table-cell table:style-name="ce2"/>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4">
          <table:table-cell table:style-name="ce2" office:value-type="string" calcext:value-type="string">
            <text:p>8.12.2025</text:p>
          </table:table-cell>
          <table:table-cell table:style-name="ce2" office:value-type="string" calcext:value-type="string">
            <text:p>Telpiskas figūras. Cilindrs.</text:p>
            <text:p>SR: Aprēķina cilindra sānu virsmas un pilnas virsmas laukumu, aprēķinu veikšanai izvēlas atbilstošus lielumus. Aprēķina cilindra tilpumu, t. sk. praktiska satura uzdevumos.</text:p>
          </table:table-cell>
          <table:table-cell table:style-name="ce14" office:value-type="string" calcext:value-type="string">
            <text:p>Teorija: M.g. 84. lpp.</text:p>
            <text:p>Stundā: 90. - 91.lpp. 106. -108.uzd.</text:p>
            <text:p> 22_Apkopojums par tematu laukumi un tilpumi.docx</text:p>
            <text:p>9.12.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5">
          <table:table-cell table:style-name="ce2" office:value-type="string" calcext:value-type="string">
            <text:p>9.12.2025</text:p>
          </table:table-cell>
          <table:table-cell table:style-name="ce2" office:value-type="string" calcext:value-type="string">
            <text:p>Gatvošanās pārbaudes darbam</text:p>
            <text:p>SR: Lieto trijstūra laukuma un riņķa laukuma aprēķināšanas formulas nezināmo lielumu, t. sk. riņķa sektora laukuma aprēķināšanai.*Sadala figūru citās figūrās, kuru laukumu var aprēķināt, izmantojot dotos lielumus.*Uzzīmē cilindru, taisnu prizmu.* Aprēķina taisnas prizmas un cilindra virsmas laukumu un tilpumu, lieto sakarība starp lielumiem nezināmo lielumu aprēķināšanai.</text:p>
          </table:table-cell>
          <table:table-cell table:style-name="ce15" office:value-type="string" calcext:value-type="string">
            <text:p> ATBILDES_Es protu_Laukumi un tilpumi.pdf</text:p>
            <text:p>11.12.2025</text:p>
          </table:table-cell>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8">
          <table:table-cell table:style-name="ce2" office:value-type="string" calcext:value-type="string">
            <text:p>11.12.2025</text:p>
          </table:table-cell>
          <table:table-cell table:style-name="ce2" office:value-type="string" calcext:value-type="string">
            <text:p>TNPD "Lieto trijstūra laukuma un riņķa laukuma aprēķināšanas formulas nezināmo lielumu, t. sk. riņķa sektora laukuma aprēķināšanai.*Sadala figūru citās figūrās, kuru laukumu var aprēķināt, izmantojot dotos lielumus.*Uzzīmē cilindru, taisnu prizmu.* Aprēķina taisnas prizmas un cilindra virsmas laukumu un tilpumu, lieto sakarība starp lielumiem nezināmo lielumu aprēķināšanai."</text:p>
          </table:table-cell>
          <table:table-cell table:style-name="ce2"/>
          <table:table-cell table:style-name="ce2" office:value-type="string" calcext:value-type="string">
            <text:p>Trijstūra un riņķa laukums.</text:p>
          </table:table-cell>
          <table:table-cell office:value-type="string" calcext:value-type="string">
            <text:p>4.temats</text:p>
          </table:table-cell>
          <table:table-cell table:style-name="ce12" table:number-columns-repeated="16379"/>
        </table:table-row>
        <table:table-row table:style-name="ro14">
          <table:table-cell table:style-name="ce2" office:value-type="string" calcext:value-type="string">
            <text:p>11.12.2025</text:p>
          </table:table-cell>
          <table:table-cell table:style-name="ce2" office:value-type="string" calcext:value-type="string">
            <text:p>Datu sakārtošanas metodes</text:p>
            <text:p>SR: Sakārto dotos datus biežuma tabulā, attēlo datus ar stabiņu un sektora diagrammu.</text:p>
          </table:table-cell>
          <table:table-cell table:style-name="ce14"/>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12.12.2025</text:p>
          </table:table-cell>
          <table:table-cell table:style-name="ce2" office:value-type="string" calcext:value-type="string">
            <text:p>Datu sakārtošanas metodes</text:p>
            <text:p>SR: Sakārto dotos datus biežuma tabulā, attēlo datus ar stabiņu un sektora diagrammu.</text:p>
          </table:table-cell>
          <table:table-cell table:style-name="ce2" office:value-type="string" calcext:value-type="string">
            <text:p>Teorija: M.g. 8. lpp.</text:p>
            <text:p>Paņemt cirkuli un transportieri</text:p>
            <text:p>15.12.2025</text:p>
          </table:table-cell>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3">
          <table:table-cell table:style-name="ce2" office:value-type="string" calcext:value-type="string">
            <text:p>12.12.2025</text:p>
          </table:table-cell>
          <table:table-cell table:style-name="ce2" office:value-type="string" calcext:value-type="string">
            <text:p>Datu sakārtošanas metodes</text:p>
            <text:p>SR: Sakārto dotos datus biežuma tabulā, attēlo datus ar stabiņu un sektora diagrammu.</text:p>
          </table:table-cell>
          <table:table-cell table:style-name="ce2"/>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3">
          <table:table-cell table:style-name="ce2" office:value-type="string" calcext:value-type="string">
            <text:p>15.12.2025</text:p>
          </table:table-cell>
          <table:table-cell table:style-name="ce2" office:value-type="string" calcext:value-type="string">
            <text:p>Datu sakārtošanas metodes</text:p>
            <text:p>SR: Sakārto dotos datus biežuma tabulā, attēlo datus ar stabiņu un sektora diagrammu.</text:p>
          </table:table-cell>
          <table:table-cell table:style-name="ce14"/>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10">
          <table:table-cell table:style-name="ce2" office:value-type="string" calcext:value-type="string">
            <text:p>5.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2" office:value-type="string" calcext:value-type="string">
            <text:p>Paņemt transportieri un cirkuli! (Šī temata stundās bieži izmantosim kalkulatoru. Var ņemt savu, ja ir.)</text:p>
            <text:p>6.01.2026</text:p>
          </table:table-cell>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6.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14"/>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8.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2"/>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8.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14"/>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9.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14"/>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9.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2"/>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12.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2" office:value-type="string" calcext:value-type="string">
            <text:p>Stundā: M.g. 22. - 23. lpp.</text:p>
            <text:p>13.01.2026</text:p>
          </table:table-cell>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2">
          <table:table-cell table:style-name="ce2" office:value-type="string" calcext:value-type="string">
            <text:p>13.01.2026</text:p>
          </table:table-cell>
          <table:table-cell table:style-name="ce2" office:value-type="string" calcext:value-type="string">
            <text:p>Datu kopu raksturojošie statistiskie lielumi</text:p>
            <text:p>SR: Nosaka modu, mediānu, amplitūdu, absolūto un relatīvo biežumu. Analizē dotos apgalvojumu patiesumu. Lasa, analizē un izvērtē tekstus, t. sk., medijos pieejamos, kuros</text:p>
            <text:p>izmantoti statistiskie rādītāji.</text:p>
          </table:table-cell>
          <table:table-cell table:style-name="ce14"/>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4">
          <table:table-cell table:style-name="ce2" office:value-type="string" calcext:value-type="string">
            <text:p>15.01.2026</text:p>
          </table:table-cell>
          <table:table-cell table:style-name="ce2" office:value-type="string" calcext:value-type="string">
            <text:p>Apkopojums par tematu "Statistika"</text:p>
            <text:p>SR: Nosaka datu kopas mediānu, modu, aritmētisko vidējo, amplitūdu. Veido biežuma tabulu, aprēķina relatīvo biežumu. Zīmē stabiņu un sektora diagrammu. Veic secinājumus, izmantojot statistiskos lielumus.</text:p>
          </table:table-cell>
          <table:table-cell table:style-name="ce14" office:value-type="string" calcext:value-type="string">
            <text:p> DL25_Gatavošanās pārbaudes darbam.pdf</text:p>
            <text:p>16.01.2026</text:p>
          </table:table-cell>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4">
          <table:table-cell table:style-name="ce2" office:value-type="string" calcext:value-type="string">
            <text:p>15.01.2026</text:p>
          </table:table-cell>
          <table:table-cell table:style-name="ce2" office:value-type="string" calcext:value-type="string">
            <text:p>Apkopojums par tematu "Statistika"</text:p>
            <text:p>SR: Nosaka datu kopas mediānu, modu, aritmētisko vidējo, amplitūdu. Veido biežuma tabulu, aprēķina relatīvo biežumu. Zīmē stabiņu un sektora diagrammu. Veic secinājumus, izmantojot statistiskos lielumus.</text:p>
          </table:table-cell>
          <table:table-cell table:style-name="ce2"/>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9">
          <table:table-cell table:style-name="ce2" office:value-type="string" calcext:value-type="string">
            <text:p>16.01.2026</text:p>
          </table:table-cell>
          <table:table-cell table:style-name="ce2" office:value-type="string" calcext:value-type="string">
            <text:p>TNPD "Ievads statistikā"</text:p>
            <text:p>SR: Uzskatāmi attēlo datus un iegūtos rezultātus. Nosaka datu kopas statistiskos rādītājus – amplitūdu, mediānu, modu, aritmētisko vidējo, absolūto un relatīvo biežumu, izmantojot aprēķinus un digitālos rīkus. Analizē datus, izmantojot statistiskos rādītājus. *Salīdzina datus par divām objektu kopām, lietojot datu kopas vidējos lielumus, amplitūdu, absolūto un relatīvo biežumu.</text:p>
          </table:table-cell>
          <table:table-cell table:style-name="ce2"/>
          <table:table-cell table:style-name="ce2" office:value-type="string" calcext:value-type="string">
            <text:p>Ievads statistikā.</text:p>
          </table:table-cell>
          <table:table-cell office:value-type="string" calcext:value-type="string">
            <text:p>5.temats</text:p>
          </table:table-cell>
          <table:table-cell table:style-name="ce12" table:number-columns-repeated="16379"/>
        </table:table-row>
        <table:table-row table:style-name="ro15">
          <table:table-cell table:style-name="ce2" office:value-type="string" calcext:value-type="string">
            <text:p>16.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0">
          <table:table-cell table:style-name="ce2" office:value-type="string" calcext:value-type="string">
            <text:p>19.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2" office:value-type="string" calcext:value-type="string">
            <text:p>Teorija: 96. lpp.</text:p>
            <text:p>20.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0">
          <table:table-cell table:style-name="ce2" office:value-type="string" calcext:value-type="string">
            <text:p>20.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14" office:value-type="string" calcext:value-type="string">
            <text:p>Teorija: 96. lpp.</text:p>
            <text:p>Stundā: 1. - 3. uzd. 99.lpp.</text:p>
            <text:p>22.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0">
          <table:table-cell table:style-name="ce2" office:value-type="string" calcext:value-type="string">
            <text:p>22.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2" office:value-type="string" calcext:value-type="string">
            <text:p>Stundā: M.g. 3. - 5., 9. - 12. uzd. 99. - 101. lpp.</text:p>
            <text:p>23.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0">
          <table:table-cell table:style-name="ce2" office:value-type="string" calcext:value-type="string">
            <text:p>22.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0">
          <table:table-cell table:style-name="ce2" office:value-type="string" calcext:value-type="string">
            <text:p>23.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2" office:value-type="string" calcext:value-type="string">
            <text:p>Mājās: Pabeigt 14. uzd. 102. lpp.</text:p>
            <text:p>26.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0">
          <table:table-cell table:style-name="ce2" office:value-type="string" calcext:value-type="string">
            <text:p>23.01.2026</text:p>
          </table:table-cell>
          <table:table-cell table:style-name="ce2" office:value-type="string" calcext:value-type="string">
            <text:p>Kvadrātfunkcija</text:p>
            <text:p>SR: Izmantojot dotu kvadrātfunkciju grafikus, izsaka pieņēmumus par funkcijas īpašībām, un to, kā var noteikt parabolas virsotnes koordinātas. Aprēķina koordinātas kvadrātfunkcijas grafika virsotnei. Zīmē kvadrātfunkcijas grafiku, izmantojot atsevišķu punktu vērtības, simetriju un virsotnes atrašanās vietu. Pēta kvadrātfunkciju grafiku novietojumu koordinātu plaknē, skicē</text:p>
            <text:p>grafikus, ja dotas koeficientu a vai c vērtību lielums.</text:p>
          </table:table-cell>
          <table:table-cell table:style-name="ce2"/>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2">
          <table:table-cell table:style-name="ce2" office:value-type="string" calcext:value-type="string">
            <text:p>26.01.2026</text:p>
          </table:table-cell>
          <table:table-cell table:style-name="ce2" office:value-type="string" calcext:value-type="string">
            <text:p>Kvadrātvienādojuma atrisināšana grafiski</text:p>
            <text:p>SR: atrisina kvadrātvienādojumu grafiski; pārbauda, vai konkrētie skaitļi ir dotā kvadrātvienādojuma saknes;</text:p>
          </table:table-cell>
          <table:table-cell table:style-name="ce2" office:value-type="string" calcext:value-type="string">
            <text:p>Teorija: 104. lpp.</text:p>
            <text:p>Stundā: M.g. 107. lpp.</text:p>
            <text:p>27.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27.01.2026</text:p>
          </table:table-cell>
          <table:table-cell table:style-name="ce2" office:value-type="string" calcext:value-type="string">
            <text:p>Kvadrātvienādojuma atrisināšana grafiski</text:p>
            <text:p>SR: atrisina kvadrātvienādojumu grafiski; pārbauda, vai konkrētie skaitļi ir dotā kvadrātvienādojuma saknes;</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29.01.2026</text:p>
          </table:table-cell>
          <table:table-cell table:style-name="ce2" office:value-type="string" calcext:value-type="string">
            <text:p>Kvadrātvienādojuma atrisināšana grafiski</text:p>
            <text:p>SR: atrisina kvadrātvienādojumu grafiski; pārbauda, vai konkrētie skaitļi ir dotā kvadrātvienādojuma saknes;</text:p>
          </table:table-cell>
          <table:table-cell table:style-name="ce14" office:value-type="string" calcext:value-type="string">
            <text:p>Mājās:2 piemēri pēc izvēles no 21. uzd. 108. lpp. (Var pārbaudīt izmantojot <text:a xlink:href="https://www.desmos.com/calculator" xlink:type="simple">https://www.desmos.com/calculator</text:a>)</text:p>
            <text:p>30.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7">
          <table:table-cell table:style-name="ce2" office:value-type="string" calcext:value-type="string">
            <text:p>29.01.2026</text:p>
          </table:table-cell>
          <table:table-cell table:style-name="ce2" office:value-type="string" calcext:value-type="string">
            <text:p>Kvadrātvienādojumu atrisināšana ar formulām</text:p>
            <text:p>SR:Lieto kvadrātvienādojuma aprēķināšanas formulas.</text:p>
          </table:table-cell>
          <table:table-cell table:style-name="ce14" office:value-type="string" calcext:value-type="string">
            <text:p>Teorija: 104.lpp.</text:p>
            <text:p>30.01.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7">
          <table:table-cell table:style-name="ce2" office:value-type="string" calcext:value-type="string">
            <text:p>30.01.2026</text:p>
          </table:table-cell>
          <table:table-cell table:style-name="ce2" office:value-type="string" calcext:value-type="string">
            <text:p>Kvadrātvienādojumu atrisināšana ar formulām</text:p>
            <text:p>SR:Lieto kvadrātvienādojuma aprēķināšanas formulas.</text:p>
          </table:table-cell>
          <table:table-cell table:style-name="ce2"/>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7">
          <table:table-cell table:style-name="ce2" office:value-type="string" calcext:value-type="string">
            <text:p>30.01.2026</text:p>
          </table:table-cell>
          <table:table-cell table:style-name="ce2" office:value-type="string" calcext:value-type="string">
            <text:p>Kvadrātvienādojumu atrisināšana ar formulām</text:p>
            <text:p>SR:Lieto kvadrātvienādojuma aprēķināšanas formulas.</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4">
          <table:table-cell table:style-name="ce2" office:value-type="string" calcext:value-type="string">
            <text:p>2.02.2026</text:p>
          </table:table-cell>
          <table:table-cell table:style-name="ce2" office:value-type="string" calcext:value-type="string">
            <text:p>Kvadrātvienādojumu atrisināšana ar formulām</text:p>
            <text:p>SR:Lieto kvadrātvienādojuma aprēķināšanas formulas.</text:p>
          </table:table-cell>
          <table:table-cell table:style-name="ce2" office:value-type="string" calcext:value-type="string">
            <text:p>Teorija: 104.lpp.</text:p>
            <text:p>Stundā: 26., 27. uzd. 109. lpp.</text:p>
            <text:p>3.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4">
          <table:table-cell table:style-name="ce2" office:value-type="string" calcext:value-type="string">
            <text:p>3.02.2026</text:p>
          </table:table-cell>
          <table:table-cell table:style-name="ce2" office:value-type="string" calcext:value-type="string">
            <text:p>Kvadrātvienādojumu atrisināšana ar formulām</text:p>
            <text:p>SR:Lieto kvadrātvienādojuma aprēķināšanas formulas. Nosaka vienādojuma sakņu skaitu, lietojot diskriminantu.</text:p>
          </table:table-cell>
          <table:table-cell table:style-name="ce14" office:value-type="string" calcext:value-type="string">
            <text:p>Teorija: 104.lpp.</text:p>
            <text:p>Stundā: 27., 28. uzd. 109. lpp.</text:p>
            <text:p>05.02. būs mazais darbiņš par kvadrātvienādojumu risināšanu.</text:p>
            <text:p>5.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5.02.2026</text:p>
          </table:table-cell>
          <table:table-cell table:style-name="ce2" office:value-type="string" calcext:value-type="string">
            <text:p>KVD Pilno kvadrātvienādojumu risināšana.</text:p>
            <text:p>SR:Lieto kvadrātvienādojuma aprēķināšanas formulas. Nosaka vienādojuma sakņu skaitu, lietojot diskriminantu.</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5.02.2026</text:p>
          </table:table-cell>
          <table:table-cell table:style-name="ce2" office:value-type="string" calcext:value-type="string">
            <text:p>Kvadrātvienādojumu atrisināšana ar formulām</text:p>
            <text:p>SR:Lieto kvadrātvienādojuma aprēķināšanas formulas. Nosaka vienādojuma sakņu skaitu, lietojot diskriminantu.</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6.02.2026</text:p>
          </table:table-cell>
          <table:table-cell table:style-name="ce2" office:value-type="string" calcext:value-type="string">
            <text:p>Uzdevumi ar parametru</text:p>
            <text:p>SR: Zina parametra ietekmi uz kvadrātvienādojumu; prot noteikt sakņu skaitu atkarībā no parametra</text:p>
          </table:table-cell>
          <table:table-cell table:style-name="ce14" office:value-type="string" calcext:value-type="string">
            <text:p>Stundā: M.g. 33. - 43. uzd. 110. - 111. lpp.</text:p>
            <text:p>9.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4">
          <table:table-cell table:style-name="ce2" office:value-type="string" calcext:value-type="string">
            <text:p>6.02.2026</text:p>
          </table:table-cell>
          <table:table-cell table:style-name="ce2" office:value-type="string" calcext:value-type="string">
            <text:p>Teksta uzdevumi</text:p>
            <text:p>SR: Sastāda uzdevuma aprakstam atbilstošu vienādojumu; atrisina praktiska satura uzdevumus,</text:p>
            <text:p>izmantojot kvadrātvienādojumu;</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2">
          <table:table-cell table:style-name="ce2" office:value-type="string" calcext:value-type="string">
            <text:p>9.02.2026</text:p>
          </table:table-cell>
          <table:table-cell table:style-name="ce2" office:value-type="string" calcext:value-type="string">
            <text:p>Teksta uzdevumi</text:p>
            <text:p>SR: Sastāda uzdevuma aprakstam atbilstošu vienādojumu; atrisina praktiska satura uzdevumus,</text:p>
            <text:p>izmantojot kvadrātvienādojumu;</text:p>
          </table:table-cell>
          <table:table-cell table:style-name="ce2" office:value-type="string" calcext:value-type="string">
            <text:p>Stundā: M.g. 49., 54., 58., 62., 65., 66. uzd. 111. - 113. lpp.</text:p>
            <text:p>10.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7">
          <table:table-cell table:style-name="ce2" office:value-type="string" calcext:value-type="string">
            <text:p>10.02.2026</text:p>
          </table:table-cell>
          <table:table-cell table:style-name="ce2" office:value-type="string" calcext:value-type="string">
            <text:p>Vjeta teorēma</text:p>
            <text:p>SR: Risina kvadrātvienādojumus, lietojot Vjeta teorēmu</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12.02.2026</text:p>
          </table:table-cell>
          <table:table-cell table:style-name="ce2" office:value-type="string" calcext:value-type="string">
            <text:p>Vjeta teorēma</text:p>
            <text:p>SR: Risina kvadrātvienādojumus, lietojot Vjeta teorēmu</text:p>
          </table:table-cell>
          <table:table-cell table:style-name="ce14" office:value-type="string" calcext:value-type="string">
            <text:p>Stundā: M.g. 75., 76. uzd. 117. lpp.</text:p>
            <text:p>Temata noslēguma pārbaudes darbs pārcelts uz 17.02.</text:p>
            <text:p>13.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4">
          <table:table-cell table:style-name="ce2" office:value-type="string" calcext:value-type="string">
            <text:p>12.02.2026</text:p>
          </table:table-cell>
          <table:table-cell table:style-name="ce2" office:value-type="string" calcext:value-type="string">
            <text:p>Nepilnie kvadrātvienādojumi</text:p>
            <text:p>SR: Risina nepilnos kvadrātvienādojumus, lietojot dažādus paņēmienus</text:p>
          </table:table-cell>
          <table:table-cell table:style-name="ce2" office:value-type="string" calcext:value-type="string">
            <text:p>M.g.118. - 119. lpp.</text:p>
            <text:p>Teorija: <text:a xlink:href="https://www.uzdevumi.lv/p/matematika/8-klase/kvadratvienadojumi-2290/kvadratvienadojumi-54951/re-c09ac77f-7428-4dc1-ace5-44fb59cdf38b" xlink:type="simple">https://www.uzdevumi.lv/p/matematika/8-klase/kvadratvienadojumi-2290/k...</text:a></text:p>
            <text:p>13.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3">
          <table:table-cell table:style-name="ce2" office:value-type="string" calcext:value-type="string">
            <text:p>13.02.2026</text:p>
          </table:table-cell>
          <table:table-cell table:style-name="ce2" office:value-type="string" calcext:value-type="string">
            <text:p>Kvadrāttrinomu sadalīšana reizinātājos</text:p>
            <text:p>SR: Lieto zināšanas par kvadrātvienādojumu atrisināšanu kvadrāttrinomu sadalīšanai reizinātājos.</text:p>
          </table:table-cell>
          <table:table-cell table:style-name="ce14"/>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1">
          <table:table-cell table:style-name="ce2" office:value-type="string" calcext:value-type="string">
            <text:p>13.02.2026</text:p>
          </table:table-cell>
          <table:table-cell table:style-name="ce2" office:value-type="string" calcext:value-type="string">
            <text:p>Gatavošanās pārbaudes dabam</text:p>
            <text:p>SR: Zīmē kvadrātfunkcijas grafiku. Atrisina kvadrātvienādojumu grafiski, ar Vjeta teorēmu, vispārīgajām atrisināšanas formulām. Risina nepilnos kvadrātvienādojumus. Prot noteikt vienādojuma sakņu skaitu pēc grafika vai diskriminanta vērtības. Sastāda kvadrātvienādojumu atbilstoši situācijas aprakstam. Sadala reizinātājos kvadrāttrinomu.</text:p>
          </table:table-cell>
          <table:table-cell table:style-name="ce14" office:value-type="string" calcext:value-type="string">
            <text:p> DL26_Gatavošanās Pārbaudes darbam.docx</text:p>
            <text:p>17.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6">
          <table:table-cell table:style-name="ce2" office:value-type="string" calcext:value-type="string">
            <text:p>16.02.2026</text:p>
          </table:table-cell>
          <table:table-cell table:style-name="ce2" office:value-type="string" calcext:value-type="string">
            <text:p>Gatavošanās pārbaudes dabam</text:p>
            <text:p>SR: Zīmē kvadrātfunkcijas grafiku. Atrisina kvadrātvienādojumu grafiski, ar Vjeta teorēmu, vispārīgajām atrisināšanas formulām. Risina nepilnos kvadrātvienādojumus. Prot noteikt vienādojuma sakņu skaitu pēc grafika vai diskriminanta vērtības. Sastāda kvadrātvienādojumu atbilstoši situācijas aprakstam. Sadala reizinātājos kvadrāttrinomu.</text:p>
          </table:table-cell>
          <table:table-cell table:style-name="ce2" office:value-type="string" calcext:value-type="string">
            <text:p>Gatavoties pārbaudes darbam. Lai gatavotos var risināt uzdevumus no darba lapas, ko risinājām stundā, un m.g. 120. - 121. lpp. Kvadrāttrinomu sadalīšana reizinātājos: 143. lpp. 9. uzd.</text:p>
            <text:p> DL_Atbildes_Kvadratvienadojumi.pdf</text:p>
            <text:p>17.02.2026</text:p>
          </table:table-cell>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8">
          <table:table-cell table:style-name="ce2" office:value-type="string" calcext:value-type="string">
            <text:p>17.02.2026</text:p>
          </table:table-cell>
          <table:table-cell table:style-name="ce2" office:value-type="string" calcext:value-type="string">
            <text:p>TNPD "Kvadrātfunkcija un kvadrātvienādojumi"</text:p>
            <text:p>SR: Zīmē kvadrātfunkcijas grafiku. Atrisina kvadrātvienādojumu grafiski, ar diskriminantu, ar Vjeta teorēmu. Atrisina nepinos kvadrātvienādojumus.Atrisina praktiska satura uzdevumus, izmantojot kvadrātvienādojumu. *Sadala kvadrāttrinomu reizinātajos.</text:p>
          </table:table-cell>
          <table:table-cell table:style-name="ce2"/>
          <table:table-cell table:style-name="ce2" office:value-type="string" calcext:value-type="string">
            <text:p>Kvadrātfunkcija un kvadrātvienādojumi.</text:p>
          </table:table-cell>
          <table:table-cell office:value-type="string" calcext:value-type="string">
            <text:p>6.temats</text:p>
          </table:table-cell>
          <table:table-cell table:style-name="ce12" table:number-columns-repeated="16379"/>
        </table:table-row>
        <table:table-row table:style-name="ro14">
          <table:table-cell table:style-name="ce2" office:value-type="string" calcext:value-type="string">
            <text:p>19.02.2026</text:p>
          </table:table-cell>
          <table:table-cell table:style-name="ce2" office:value-type="string" calcext:value-type="string">
            <text:p>Pitagora teorēma</text:p>
            <text:p>SR: Prot atlikt uz skaitļu ass iracionālas vērtības piem., kvadrātsakni no 2. Aprēķina taisnleņķa trijstūra vienas malas garumu, ja divu malu garumi ir zināmi.</text:p>
          </table:table-cell>
          <table:table-cell table:style-name="ce14" office:value-type="string" calcext:value-type="string">
            <text:p>Teorija: M.g. 148. lpp.</text:p>
            <text:p>Stundā: 8. - 13. uzd. 152. - 153. lpp.</text:p>
            <text:p>20.02.2026</text:p>
          </table:table-cell>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4">
          <table:table-cell table:style-name="ce2" office:value-type="string" calcext:value-type="string">
            <text:p>19.02.2026</text:p>
          </table:table-cell>
          <table:table-cell table:style-name="ce2" office:value-type="string" calcext:value-type="string">
            <text:p>Pitagora teorēma</text:p>
            <text:p>SR: Prot atlikt uz skaitļu ass iracionālas vērtības piem., kvadrātsakni no 2. Aprēķina taisnleņķa trijstūra vienas malas garumu, ja divu malu garumi ir zināmi.</text:p>
          </table:table-cell>
          <table:table-cell table:style-name="ce2"/>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7">
          <table:table-cell table:style-name="ce2" office:value-type="string" calcext:value-type="string">
            <text:p>20.02.2026</text:p>
          </table:table-cell>
          <table:table-cell table:style-name="ce2" office:value-type="string" calcext:value-type="string">
            <text:p>Taisnleņķa trijstūra pazīme</text:p>
            <text:p>SR: Lieto Pitagora teorēmu, lai noteiktu vai trijstūris ir taisnleņķa trijstūris.</text:p>
          </table:table-cell>
          <table:table-cell table:style-name="ce14" office:value-type="string" calcext:value-type="string">
            <text:p>Stundā: M.g. 16. - 18. uzd. 154. lpp.</text:p>
            <text:p>23.02.2026</text:p>
          </table:table-cell>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7">
          <table:table-cell table:style-name="ce2" office:value-type="string" calcext:value-type="string">
            <text:p>20.02.2026</text:p>
          </table:table-cell>
          <table:table-cell table:style-name="ce2" office:value-type="string" calcext:value-type="string">
            <text:p>Pitagora teorēmas lietojums reālajā dzīvē</text:p>
            <text:p>SR:</text:p>
          </table:table-cell>
          <table:table-cell table:style-name="ce2"/>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4">
          <table:table-cell table:style-name="ce2" office:value-type="string" calcext:value-type="string">
            <text:p>23.02.2026</text:p>
          </table:table-cell>
          <table:table-cell table:style-name="ce2" office:value-type="string" calcext:value-type="string">
            <text:p>Vienādojumi un Pitagora teorēma.</text:p>
            <text:p>SR: lietojot Pitagora teorēmu, izveido algebriskas izteiksmes un atrisina kvadrātvienādojumu; saskata un izmanto Pitagora teorēmu praktiska satura uzdevumos;</text:p>
          </table:table-cell>
          <table:table-cell table:style-name="ce14" office:value-type="string" calcext:value-type="string">
            <text:p>Stundā: M.g. 155. - 156. lpp.</text:p>
            <text:p>26.02.2026</text:p>
          </table:table-cell>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24.02.2026</text:p>
          </table:table-cell>
          <table:table-cell table:style-name="ce2" office:value-type="string" calcext:value-type="string">
            <text:p>Laukums un Pitagora teorēma.</text:p>
            <text:p>SR: Lieto Pitagora teorēmu lai aprēķinātu lielumus, kas nepieciešami figūras laukuma aprēķināšanai.</text:p>
          </table:table-cell>
          <table:table-cell table:style-name="ce2" office:value-type="string" calcext:value-type="string">
            <text:p>Stundā: M.g. 157. - 158. lpp.</text:p>
            <text:p>27.02.2026</text:p>
          </table:table-cell>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26.02.2026</text:p>
          </table:table-cell>
          <table:table-cell table:style-name="ce2" office:value-type="string" calcext:value-type="string">
            <text:p>Laukums un Pitagora teorēma.</text:p>
            <text:p>SR: Lieto Pitagora teorēmu lai aprēķinātu lielumus, kas nepieciešami figūras laukuma aprēķināšanai.</text:p>
          </table:table-cell>
          <table:table-cell table:style-name="ce14"/>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26.02.2026</text:p>
          </table:table-cell>
          <table:table-cell table:style-name="ce2" office:value-type="string" calcext:value-type="string">
            <text:p>Laukums un Pitagora teorēma.</text:p>
            <text:p>SR: Lieto Pitagora teorēmu lai aprēķinātu lielumus, kas nepieciešami figūras laukuma aprēķināšanai.</text:p>
          </table:table-cell>
          <table:table-cell table:style-name="ce14"/>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27.02.2026</text:p>
          </table:table-cell>
          <table:table-cell table:style-name="ce2" office:value-type="string" calcext:value-type="string">
            <text:p>Taisnleņķa trijstūru vienādības pazīmes.</text:p>
            <text:p>SR: Formulē taisnleņķa trijstūru vienādības pazīmes; Izmantot taisnleņķa trijstūra vienādības pazīmes.</text:p>
          </table:table-cell>
          <table:table-cell table:style-name="ce2" office:value-type="string" calcext:value-type="string">
            <text:p>Stundā: M.g. 160. - 161. lpp.</text:p>
            <text:p>2.03.2026</text:p>
          </table:table-cell>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27.02.2026</text:p>
          </table:table-cell>
          <table:table-cell table:style-name="ce2" office:value-type="string" calcext:value-type="string">
            <text:p>Taisnleņķa trijstūru vienādības pazīmes.</text:p>
            <text:p>SR: Formulē taisnleņķa trijstūru vienādības pazīmes; Izmantot taisnleņķa trijstūra vienādības pazīmes.</text:p>
          </table:table-cell>
          <table:table-cell table:style-name="ce14"/>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2.03.2026</text:p>
          </table:table-cell>
          <table:table-cell table:style-name="ce2" office:value-type="string" calcext:value-type="string">
            <text:p>Taisnleņķa trijstūru vienādības pazīmes.</text:p>
            <text:p>SR: Formulē taisnleņķa trijstūru vienādības pazīmes; Izmantot taisnleņķa trijstūra vienādības pazīmes.</text:p>
          </table:table-cell>
          <table:table-cell table:style-name="ce2"/>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3">
          <table:table-cell table:style-name="ce2" office:value-type="string" calcext:value-type="string">
            <text:p>3.03.2026</text:p>
          </table:table-cell>
          <table:table-cell table:style-name="ce2" office:value-type="string" calcext:value-type="string">
            <text:p>Taisnleņķa trijstūru vienādības pazīmes.</text:p>
            <text:p>SR: Formulē taisnleņķa trijstūru vienādības pazīmes; Izmantot taisnleņķa trijstūra vienādības pazīmes.</text:p>
          </table:table-cell>
          <table:table-cell table:style-name="ce2"/>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5">
          <table:table-cell table:style-name="ce2" office:value-type="string" calcext:value-type="string">
            <text:p>5.03.2026</text:p>
          </table:table-cell>
          <table:table-cell table:style-name="ce2" office:value-type="string" calcext:value-type="string">
            <text:p>Gatavošanās pārbaudes darbam</text:p>
            <text:p>SR: Aprēķina hipotenūzas vai katetes garumu. Veido korektu pierakstu, lietojot Pitagora teorēmu. Lieto taisnleņķa trijstūra pazīmi. Veido algebrisku modeli, izmantojot Pitagora teorēmu. Pierāda taisnleņķa trijstūru vienādību, atsevišķu elementu vienādību.</text:p>
          </table:table-cell>
          <table:table-cell table:style-name="ce2" office:value-type="string" calcext:value-type="string">
            <text:p> 1_1_ Uzdevumu atrisinajumi.pdf</text:p>
            <text:p> 23_Apkopojums par Pitagora teorēmu.docx</text:p>
            <text:p>6.03.2026</text:p>
          </table:table-cell>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2">
          <table:table-cell table:style-name="ce2" office:value-type="string" calcext:value-type="string">
            <text:p>5.03.2026</text:p>
          </table:table-cell>
          <table:table-cell table:style-name="ce2" office:value-type="string" calcext:value-type="string">
            <text:p>Gatavošanās pārbaudes darbam</text:p>
            <text:p>SR: Aprēķina hipotenūzas vai katetes garumu. Veido korektu pierakstu, lietojot Pitagora teorēmu. Lieto taisnleņķa trijstūra pazīmi. Veido algebrisku modeli, izmantojot Pitagora teorēmu. Pierāda taisnleņķa trijstūru vienādību, atsevišķu elementu vienādību.</text:p>
          </table:table-cell>
          <table:table-cell table:style-name="ce14"/>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8">
          <table:table-cell table:style-name="ce2" office:value-type="string" calcext:value-type="string">
            <text:p>6.03.2026</text:p>
          </table:table-cell>
          <table:table-cell table:style-name="ce2" office:value-type="string" calcext:value-type="string">
            <text:p>TNPD "Pitagora teorēma"</text:p>
            <text:p>SR: Aprēķina hipotenūzas vai katetes garumu. Veido korektu pierakstu, lietojot Pitagora teorēmu. Lieto taisnleņķa trijstūra pazīmi. Veido algebrisku modeli, izmantojot Pitagora teorēmu. Pierāda taisnleņķa trijstūru vienādību, atsevišķu elementu vienādību.</text:p>
          </table:table-cell>
          <table:table-cell table:style-name="ce2"/>
          <table:table-cell table:style-name="ce2" office:value-type="string" calcext:value-type="string">
            <text:p>Pitagora teorēma.</text:p>
          </table:table-cell>
          <table:table-cell office:value-type="string" calcext:value-type="string">
            <text:p>7.temats</text:p>
          </table:table-cell>
          <table:table-cell table:style-name="ce12" table:number-columns-repeated="16379"/>
        </table:table-row>
        <table:table-row table:style-name="ro12">
          <table:table-cell table:style-name="ce2" office:value-type="string" calcext:value-type="string">
            <text:p>6.03.2026</text:p>
          </table:table-cell>
          <table:table-cell table:style-name="ce2" office:value-type="string" calcext:value-type="string">
            <text:p>Nogriežņu attiecība. Taisnleņķa trijstūra šaurā leņķa sinuss, kosinuss, tangenss</text:p>
            <text:p>SR: aprēķināt nogriežņu attiecību; aprēķināt taisnleņķa trijstūra šaurā leņķa trigonometriskās funkcijas, ja doti divu malu garumi vai izdarot nepieciešamos merījumus;</text:p>
          </table:table-cell>
          <table:table-cell table:style-name="ce14"/>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4">
          <table:table-cell table:style-name="ce2" office:value-type="string" calcext:value-type="string">
            <text:p>17.03.2026</text:p>
          </table:table-cell>
          <table:table-cell table:style-name="ce2" office:value-type="string" calcext:value-type="string">
            <text:p>Taisnleņķa trijstūra šaurā leņķa sinuss, kosinuss, tangenss.</text:p>
            <text:p>SR: Aprēķināt taisnleņķa trijstūra šaurā leņķa trigonometriskās funkcijas, ja doti divu malu garumi vai izdarot nepieciešamos merījumus; Aprēķina sinusu, kosinusu, tangensu, lietojot kalkulatoru vai trigonometrisko vērtību tabulu.</text:p>
          </table:table-cell>
          <table:table-cell table:style-name="ce14" office:value-type="string" calcext:value-type="string">
            <text:p>Mājās: DL 3. - 6. uzdevums.</text:p>
            <text:p> 1DL26_Trigonometrisko funkciju vērtību noteikšna.docx</text:p>
            <text:p>19.03.2026</text:p>
          </table:table-cell>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4">
          <table:table-cell table:style-name="ce2" office:value-type="string" calcext:value-type="string">
            <text:p>17.03.2026</text:p>
          </table:table-cell>
          <table:table-cell table:style-name="ce2" office:value-type="string" calcext:value-type="string">
            <text:p>Taisnleņķa trijstūra šaurā leņķa sinuss, kosinuss, tangenss.</text:p>
            <text:p>SR: Aprēķināt taisnleņķa trijstūra šaurā leņķa trigonometriskās funkcijas, ja doti divu malu garumi vai izdarot nepieciešamos merījumus; Aprēķina sinusu, kosinusu, tangensu, lietojot kalkulatoru vai trigonometrisko vērtību tabulu.</text:p>
          </table:table-cell>
          <table:table-cell table:style-name="ce14"/>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17">
          <table:table-cell table:style-name="ce2" office:value-type="string" calcext:value-type="string">
            <text:p>19.03.2026</text:p>
          </table:table-cell>
          <table:table-cell table:style-name="ce2" office:value-type="string" calcext:value-type="string">
            <text:p>Sinusa, kosinusa un tangensa vērtības 45°, 30° un 60° lieliem leņķiem.</text:p>
            <text:p>SR: Aprēķina trijstūra vai citu figūru elementus, izmantojot trigonometriskās sakarības 45°, 30° un 60° lieliem leņķiem.</text:p>
          </table:table-cell>
          <table:table-cell table:style-name="ce2" office:value-type="string" calcext:value-type="string">
            <text:p>Teorija: <text:a xlink:href="https://www.uzdevumi.lv/p/matematika/9-klase/trigonometriskas-sakaribas-taisnlenka-trijsturi-5887/sin-cos-tg-taisnlenka-trijsturi-11741/re-04f0ff4d-57dc-4cee-8b1a-ae00ed409e85" xlink:type="simple">https://www.uzdevumi.lv/p/matematika/9-klase/trigonometriskas-sakariba...</text:a></text:p>
            <text:p>Stundā: DL 1., 13. uzd.</text:p>
            <text:p> 2DL26_Taisnleņķa trijstūra malu garuma aprēķināšana.docx</text:p>
            <text:p>20.03.2026</text:p>
          </table:table-cell>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3">
          <table:table-cell table:style-name="ce2" office:value-type="string" calcext:value-type="string">
            <text:p>19.03.2026</text:p>
          </table:table-cell>
          <table:table-cell table:style-name="ce2" office:value-type="string" calcext:value-type="string">
            <text:p>Sinusa, kosinusa un tangensa vērtības 45°, 30° un 60° lieliem leņķiem.</text:p>
            <text:p>SR: Aprēķina trijstūra vai citu figūru elementus, izmantojot trigonometriskās sakarības 45°, 30° un 60° lieliem leņķiem.</text:p>
          </table:table-cell>
          <table:table-cell table:style-name="ce14"/>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4">
          <table:table-cell table:style-name="ce2" office:value-type="string" calcext:value-type="string">
            <text:p>20.03.2026</text:p>
          </table:table-cell>
          <table:table-cell table:style-name="ce2" office:value-type="string" calcext:value-type="string">
            <text:p>Sinusa, kosinusa un tangensa vērtības 45°, 30° un 60° lieliem leņķiem.</text:p>
            <text:p>SR: Aprēķina trijstūra vai citu figūru elementus, izmantojot trigonometriskās sakarības 45°, 30° un 60° lieliem leņķiem.</text:p>
          </table:table-cell>
          <table:table-cell table:style-name="ce14" office:value-type="string" calcext:value-type="string">
            <text:p>Teorija: <text:a xlink:href="https://www.uzdevumi.lv/p/matematika/9-klase/trigonometriskas-sakaribas-taisnlenka-trijsturi-5887/sin-cos-tg-taisnlenka-trijsturi-11741/re-04f0ff4d-57dc-4cee-8b1a-ae00ed409e85" xlink:type="simple">https://www.uzdevumi.lv/p/matematika/9-klase/trigonometriskas-sakariba...</text:a></text:p>
            <text:p>Stundā: DL 14. - 18. uzd.</text:p>
            <text:p> 2DL26_Taisnleņķa trijstūra malu garuma aprēķināšana.docx</text:p>
            <text:p>24.03.2026</text:p>
          </table:table-cell>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3">
          <table:table-cell table:style-name="ce2" office:value-type="string" calcext:value-type="string">
            <text:p>20.03.2026</text:p>
          </table:table-cell>
          <table:table-cell table:style-name="ce2" office:value-type="string" calcext:value-type="string">
            <text:p>Sinusa, kosinusa un tangensa vērtības 45°, 30° un 60° lieliem leņķiem.</text:p>
            <text:p>SR: Aprēķina trijstūra vai citu figūru elementus, izmantojot trigonometriskās sakarības 45°, 30° un 60° lieliem leņķiem.</text:p>
          </table:table-cell>
          <table:table-cell table:style-name="ce14"/>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11">
          <table:table-cell table:style-name="ce2" office:value-type="string" calcext:value-type="string">
            <text:p>24.03.2026</text:p>
          </table:table-cell>
          <table:table-cell table:style-name="ce2" office:value-type="string" calcext:value-type="string">
            <text:p>Šaurā leņķa sinusa, kosinusa un tangensa vērtību izmantošana.</text:p>
            <text:p>SR: Lieto tabulas vai tehnoloģijas, lai noteiktu dažādu šauru leņķu sinusa, kosinusa un tangensa vērtības. Aprēķina taisnleņķa trijstūra elementus, ja dots viens šaurā leņķa lielums un vienas vai divu trijstūra malu garumi. Lieto trigonometriskās sakarības taisnleņķa trijstūrī, lai aprēķinātu dažādu figūru elementus, t. sk. situācijās ar reālu kontekstu.</text:p>
          </table:table-cell>
          <table:table-cell table:style-name="ce14" office:value-type="string" calcext:value-type="string">
            <text:p>Mājās: Darba lapas 33. uzd.</text:p>
            <text:p> 3DL26_Leņķa lieluma aprēķināšana un trigonometrisko sakarību lietošana...</text:p>
            <text:p>26.03.2026</text:p>
          </table:table-cell>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11">
          <table:table-cell table:style-name="ce2" office:value-type="string" calcext:value-type="string">
            <text:p>24.03.2026</text:p>
          </table:table-cell>
          <table:table-cell table:style-name="ce2" office:value-type="string" calcext:value-type="string">
            <text:p>Šaurā leņķa sinusa, kosinusa un tangensa vērtību izmantošana.</text:p>
            <text:p>SR: Lieto tabulas vai tehnoloģijas, lai noteiktu dažādu šauru leņķu sinusa, kosinusa un tangensa vērtības. Aprēķina taisnleņķa trijstūra elementus, ja dots viens šaurā leņķa lielums un vienas vai divu trijstūra malu garumi. Lieto trigonometriskās sakarības taisnleņķa trijstūrī, lai aprēķinātu dažādu figūru elementus, t. sk. situācijās ar reālu kontekstu.</text:p>
          </table:table-cell>
          <table:table-cell table:style-name="ce2"/>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5">
          <table:table-cell table:style-name="ce2" office:value-type="string" calcext:value-type="string">
            <text:p>26.03.2026</text:p>
          </table:table-cell>
          <table:table-cell table:style-name="ce2" office:value-type="string" calcext:value-type="string">
            <text:p>Šaurā leņķa sinusa, kosinusa un tangensa vērtību izmantošana.</text:p>
            <text:p>SR: Lieto tabulas vai tehnoloģijas, lai noteiktu dažādu šauru leņķu sinusa, kosinusa un tangensa vērtības. Aprēķina taisnleņķa trijstūra elementus, ja dots viens šaurā leņķa lielums un vienas vai divu trijstūra malu garumi. Lieto trigonometriskās sakarības taisnleņķa trijstūrī, lai aprēķinātu dažādu figūru elementus, t. sk. situācijās ar reālu kontekstu.</text:p>
          </table:table-cell>
          <table:table-cell table:style-name="ce14" office:value-type="string" calcext:value-type="string">
            <text:p>Gatavoties pārbaudes darbam.</text:p>
            <text:p> DL4_atbildes_apkopojums.pdf</text:p>
            <text:p> 8kl_17uzd_atbildes_2DL.pdf</text:p>
            <text:p> DL3_atbildes-1.pdf</text:p>
            <text:p> 4DL_Apkopojums.docx</text:p>
            <text:p> 5DL_JA GRIBI VĒL UZDEVUMUS.docx</text:p>
            <text:p>27.03.2026</text:p>
          </table:table-cell>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11">
          <table:table-cell table:style-name="ce2" office:value-type="string" calcext:value-type="string">
            <text:p>26.03.2026</text:p>
          </table:table-cell>
          <table:table-cell table:style-name="ce2" office:value-type="string" calcext:value-type="string">
            <text:p>Šaurā leņķa sinusa, kosinusa un tangensa vērtību izmantošana.</text:p>
            <text:p>SR: Lieto tabulas vai tehnoloģijas, lai noteiktu dažādu šauru leņķu sinusa, kosinusa un tangensa vērtības. Aprēķina taisnleņķa trijstūra elementus, ja dots viens šaurā leņķa lielums un vienas vai divu trijstūra malu garumi. Lieto trigonometriskās sakarības taisnleņķa trijstūrī, lai aprēķinātu dažādu figūru elementus, t. sk. situācijās ar reālu kontekstu.</text:p>
          </table:table-cell>
          <table:table-cell table:style-name="ce2"/>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5">
          <table:table-cell table:style-name="ce2" office:value-type="string" calcext:value-type="string">
            <text:p>27.03.2026</text:p>
          </table:table-cell>
          <table:table-cell table:style-name="ce2" office:value-type="string" calcext:value-type="string">
            <text:p>TNPD "Trigonometriskās sakarības taisnleņķa trijstūrī"</text:p>
            <text:p>SR: Aprēķina taisnleņķa trijstūra nezināmos lielumus, ja dots viena šaurā leņķa lielums un vienas malas garums vai divu malu garumi.* Lieto trigonometriskās sakarības taisnleņķa trijstūrī, lai aprēķinātu plaknes figūru lielumus.* Spriež konkrēti vai vispārīgi, izmanto vienādmalu, vienādsānu trijstūra īpašības, Pitagora teorēmu un secina par malu attiecību, ja šaurais leņķis ir 30°, 45°, 60°.</text:p>
          </table:table-cell>
          <table:table-cell table:style-name="ce14"/>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9">
          <table:table-cell table:style-name="ce2" office:value-type="string" calcext:value-type="string">
            <text:p>27.03.2026</text:p>
          </table:table-cell>
          <table:table-cell table:style-name="ce2" office:value-type="string" calcext:value-type="string">
            <text:p>TNPD "Trigonometriskās sakarības taisnleņķa trijstūrī"</text:p>
            <text:p>SR: Aprēķina taisnleņķa trijstūra nezināmos lielumus, ja dots viena šaurā leņķa lielums un vienas malas garums vai divu malu garumi.* Lieto trigonometriskās sakarības taisnleņķa trijstūrī, lai aprēķinātu plaknes figūru lielumus.* Spriež konkrēti vai vispārīgi, izmanto vienādmalu, vienādsānu trijstūra īpašības, Pitagora teorēmu un secina par malu attiecību, ja šaurais leņķis ir 30°, 45°, 60°.</text:p>
          </table:table-cell>
          <table:table-cell table:style-name="ce2"/>
          <table:table-cell table:style-name="ce2" office:value-type="string" calcext:value-type="string">
            <text:p>Trigonometrija taisnleņķa trijstūrī.</text:p>
          </table:table-cell>
          <table:table-cell office:value-type="string" calcext:value-type="string">
            <text:p>8.temats</text:p>
          </table:table-cell>
          <table:table-cell table:style-name="ce12" table:number-columns-repeated="16379"/>
        </table:table-row>
        <table:table-row table:style-name="ro12">
          <table:table-cell table:style-name="ce2" office:value-type="string" calcext:value-type="string">
            <text:p>31.03.2026</text:p>
          </table:table-cell>
          <table:table-cell table:style-name="ce2" office:value-type="string" calcext:value-type="string">
            <text:p>Izliekta n-stūra leņķu summa. Taišņu paralelitātes pazīmes.</text:p>
            <text:p>SR: Lieto izliekta n-stūra leņķu summas formulu. Pamato taišņu paralelitāti.</text:p>
          </table:table-cell>
          <table:table-cell table:style-name="ce14" office:value-type="string" calcext:value-type="string">
            <text:p>Teorija: M.g. 166. - 167. lpp.</text:p>
            <text:p>Uzdevumi: 168. - 169. lpp.</text:p>
            <text:p>02.04. konsultācija 7. - 9. stundā</text:p>
            <text:p>2.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7">
          <table:table-cell table:style-name="ce2" office:value-type="string" calcext:value-type="string">
            <text:p>31.03.2026</text:p>
          </table:table-cell>
          <table:table-cell table:style-name="ce2" office:value-type="string" calcext:value-type="string">
            <text:p>Izliekta n-stūra leņķu summa. Taišņu paralelitātes pazīmes.</text:p>
            <text:p>SR: Lieto izliekta n-stūra leņķu summas formulu. Pamato taišņu paralelitāti.</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7">
          <table:table-cell table:style-name="ce2" office:value-type="string" calcext:value-type="string">
            <text:p>2.04.2026</text:p>
          </table:table-cell>
          <table:table-cell table:style-name="ce2" office:value-type="string" calcext:value-type="string">
            <text:p>Izliekta n-stūra leņķu summa. Taišņu paralelitātes pazīmes.</text:p>
            <text:p>SR: Lieto izliekta n-stūra leņķu summas formulu. Pamato taišņu paralelitāti.</text:p>
          </table:table-cell>
          <table:table-cell table:style-name="ce14"/>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2">
          <table:table-cell table:style-name="ce2" office:value-type="string" calcext:value-type="string">
            <text:p>2.04.2026</text:p>
          </table:table-cell>
          <table:table-cell table:style-name="ce2" office:value-type="string" calcext:value-type="string">
            <text:p>Paralelograma īpašības.</text:p>
            <text:p>SR: Aprēķina paralelograma elementu lielumus. Aprēķina paralelograma perimetri, t. sk. uzdevumos ar reālu kontekstu.</text:p>
          </table:table-cell>
          <table:table-cell table:style-name="ce2" office:value-type="string" calcext:value-type="string">
            <text:p>Teorija: M.g. 174. lpp.</text:p>
            <text:p>Uzdevumi: M.g. 177. - 178. lpp.</text:p>
            <text:p>9.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3">
          <table:table-cell table:style-name="ce2" office:value-type="string" calcext:value-type="string">
            <text:p>7.04.2026</text:p>
          </table:table-cell>
          <table:table-cell table:style-name="ce2" office:value-type="string" calcext:value-type="string">
            <text:p>Paralelograma īpašības.</text:p>
            <text:p>SR: Aprēķina paralelograma elementu lielumus. Aprēķina paralelograma perimetri, t. sk. uzdevumos ar reālu kontekstu.</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3">
          <table:table-cell table:style-name="ce2" office:value-type="string" calcext:value-type="string">
            <text:p>7.04.2026</text:p>
          </table:table-cell>
          <table:table-cell table:style-name="ce2" office:value-type="string" calcext:value-type="string">
            <text:p>Paralelograma īpašības.</text:p>
            <text:p>SR: Aprēķina paralelograma elementu lielumus. Aprēķina paralelograma perimetri, t. sk. uzdevumos ar reālu kontekstu.</text:p>
          </table:table-cell>
          <table:table-cell table:style-name="ce14"/>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9.04.2026</text:p>
          </table:table-cell>
          <table:table-cell table:style-name="ce2" office:value-type="string" calcext:value-type="string">
            <text:p>Paralelograma pazīmes</text:p>
            <text:p>SR: Veido paralelograma pazīmes pierādījumu, ja doti kādi apgalvojumi, vai arī pabeidz to, ja pierādījums ir iesākts. Noskaidro un pierāda, vai četrstūris ir paralelograms</text:p>
          </table:table-cell>
          <table:table-cell table:style-name="ce14"/>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9.04.2026</text:p>
          </table:table-cell>
          <table:table-cell table:style-name="ce2" office:value-type="string" calcext:value-type="string">
            <text:p>Paralelograma pazīmes</text:p>
            <text:p>SR: Veido paralelograma pazīmes pierādījumu, ja doti kādi apgalvojumi, vai arī pabeidz to, ja pierādījums ir iesākts. Noskaidro un pierāda, vai četrstūris ir paralelograms</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10.04.2026</text:p>
          </table:table-cell>
          <table:table-cell table:style-name="ce2" office:value-type="string" calcext:value-type="string">
            <text:p>Paralelograma pazīmes</text:p>
            <text:p>SR: Veido paralelograma pazīmes pierādījumu, ja doti kādi apgalvojumi, vai arī pabeidz to, ja pierādījums ir iesākts. Noskaidro un pierāda, vai četrstūris ir paralelograms</text:p>
          </table:table-cell>
          <table:table-cell table:style-name="ce14"/>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10.04.2026</text:p>
          </table:table-cell>
          <table:table-cell table:style-name="ce2" office:value-type="string" calcext:value-type="string">
            <text:p>Rombs</text:p>
            <text:p>SR: Aprēķina romba elementu lielumus. Izvērtē apgalvojumus un pamato to patiesumu. Pierāda elementu vienādību, izmantojot rombus. Nosaka un pamato vai četrstūris ir rombs.</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14.04.2026</text:p>
          </table:table-cell>
          <table:table-cell table:style-name="ce2" office:value-type="string" calcext:value-type="string">
            <text:p>Rombs</text:p>
            <text:p>SR: Aprēķina romba elementu lielumus. Izvērtē apgalvojumus un pamato to patiesumu. Pierāda elementu vienādību, izmantojot rombus. Nosaka un pamato vai četrstūris ir rombs.</text:p>
          </table:table-cell>
          <table:table-cell table:style-name="ce14" office:value-type="string" calcext:value-type="string">
            <text:p>Stundā: M.g. 187. - 188. lpp.</text:p>
            <text:p>16.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14.04.2026</text:p>
          </table:table-cell>
          <table:table-cell table:style-name="ce2" office:value-type="string" calcext:value-type="string">
            <text:p>Rombs</text:p>
            <text:p>SR: Aprēķina romba elementu lielumus. Izvērtē apgalvojumus un pamato to patiesumu. Pierāda elementu vienādību, izmantojot rombus. Nosaka un pamato vai četrstūris ir rombs.</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16.04.2026</text:p>
          </table:table-cell>
          <table:table-cell table:style-name="ce2" office:value-type="string" calcext:value-type="string">
            <text:p>Rombs</text:p>
            <text:p>SR: Aprēķina romba elementu lielumus. Izvērtē apgalvojumus un pamato to patiesumu. Pierāda elementu vienādību, izmantojot rombus. Nosaka un pamato vai četrstūris ir rombs.</text:p>
          </table:table-cell>
          <table:table-cell table:style-name="ce14" office:value-type="string" calcext:value-type="string">
            <text:p>Stundā: M.g. 189. - 191. lpp.</text:p>
            <text:p>17.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16.04.2026</text:p>
          </table:table-cell>
          <table:table-cell table:style-name="ce2" office:value-type="string" calcext:value-type="string">
            <text:p>Rombs</text:p>
            <text:p>SR: Aprēķina romba elementu lielumus. Izvērtē apgalvojumus un pamato to patiesumu. Pierāda elementu vienādību, izmantojot rombus. Nosaka un pamato vai četrstūris ir rombs.</text:p>
          </table:table-cell>
          <table:table-cell table:style-name="ce14"/>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3">
          <table:table-cell table:style-name="ce2" office:value-type="string" calcext:value-type="string">
            <text:p>17.04.2026</text:p>
          </table:table-cell>
          <table:table-cell table:style-name="ce2" office:value-type="string" calcext:value-type="string">
            <text:p>Taisnstūris un kvadrāts</text:p>
            <text:p>SR: Lieto taisnstūra un kvadrāta īpašības un pazīmes aprēķina un pierādījuma uzdevumos.</text:p>
          </table:table-cell>
          <table:table-cell table:style-name="ce14" office:value-type="string" calcext:value-type="string">
            <text:p>Teorija: M.g. 192., 193. lpp.</text:p>
            <text:p>Uzdevumi: M.g. 194. - 195. lpp.</text:p>
            <text:p>21.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3">
          <table:table-cell table:style-name="ce2" office:value-type="string" calcext:value-type="string">
            <text:p>17.04.2026</text:p>
          </table:table-cell>
          <table:table-cell table:style-name="ce2" office:value-type="string" calcext:value-type="string">
            <text:p>Taisnstūris un kvadrāts</text:p>
            <text:p>SR: Lieto taisnstūra un kvadrāta īpašības un pazīmes aprēķina un pierādījuma uzdevumos.</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3">
          <table:table-cell table:style-name="ce2" office:value-type="string" calcext:value-type="string">
            <text:p>21.04.2026</text:p>
          </table:table-cell>
          <table:table-cell table:style-name="ce2" office:value-type="string" calcext:value-type="string">
            <text:p>Paralelograma un romba laukums</text:p>
            <text:p>SR: Lieto paralelograma un romba laukuma formulas četrstūru laukumu un to elementu aprēķināšanai.</text:p>
          </table:table-cell>
          <table:table-cell table:style-name="ce14" office:value-type="string" calcext:value-type="string">
            <text:p><text:a xlink:href="https://www.uzdevumi.lv/TestWork/Info?jid=Qg5xZ8HO5EOYlcAvtMgKKA" xlink:type="simple">https://www.uzdevumi.lv/TestWork/Info?jid=Qg5xZ8HO5EOYlcAvtMgKKA</text:a></text:p>
            <text:p>21.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2">
          <table:table-cell table:style-name="ce2" office:value-type="string" calcext:value-type="string">
            <text:p>21.04.2026</text:p>
          </table:table-cell>
          <table:table-cell table:style-name="ce2" office:value-type="string" calcext:value-type="string">
            <text:p>Paralelograma un romba laukums</text:p>
            <text:p>SR: Lieto paralelograma un romba laukuma formulas četrstūru laukumu un to elementu aprēķināšanai.</text:p>
          </table:table-cell>
          <table:table-cell table:style-name="ce2" office:value-type="string" calcext:value-type="string">
            <text:p>Teorija: 198. lpp. un<text:a xlink:href="https://app.soma.lv/v2/e-gramatas/matematika-9bd9dc26-8543-4be1-8c00-2f4e0b727ca2/pdf?page=90" xlink:type="simple"> 9.kl. m.g. 90. lpp.</text:a></text:p>
            <text:p>Stundā: 201. - 203. lpp.</text:p>
            <text:p>23.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5">
          <table:table-cell table:style-name="ce2" office:value-type="string" calcext:value-type="string">
            <text:p>23.04.2026</text:p>
          </table:table-cell>
          <table:table-cell table:style-name="ce2" office:value-type="string" calcext:value-type="string">
            <text:p>Gatavošanās pārbaudes darbam</text:p>
            <text:p>SR: Aprēķina daudzstūra leņķu summu. Lieto paralelograma, romba, taisnstūra un kvadrāta īpašības un pazīmes aprēķina un pierādījuma uzdevumos. Aprēķina paralelograma un romba laukumu.</text:p>
          </table:table-cell>
          <table:table-cell table:style-name="ce2" office:value-type="string" calcext:value-type="string">
            <text:p> Apkopojums par tematu Paralelograms.pdf</text:p>
            <text:p> Skenēts_20260423-1509.pdf</text:p>
            <text:p>24.04.2026</text:p>
          </table:table-cell>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4">
          <table:table-cell table:style-name="ce2" office:value-type="string" calcext:value-type="string">
            <text:p>23.04.2026</text:p>
          </table:table-cell>
          <table:table-cell table:style-name="ce2" office:value-type="string" calcext:value-type="string">
            <text:p>Gatavošanās pārbaudes darbam</text:p>
            <text:p>SR: Aprēķina daudzstūra leņķu summu. Lieto paralelograma, romba, taisnstūra un kvadrāta īpašības un pazīmes aprēķina un pierādījuma uzdevumos. Aprēķina paralelograma un romba laukumu.</text:p>
          </table:table-cell>
          <table:table-cell table:style-name="ce2"/>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18">
          <table:table-cell table:style-name="ce2" office:value-type="string" calcext:value-type="string">
            <text:p>24.04.2026</text:p>
          </table:table-cell>
          <table:table-cell table:style-name="ce2" office:value-type="string" calcext:value-type="string">
            <text:p>TNPD "Paralelograms"</text:p>
            <text:p>SR: Lieto sakarību par četrstūra leņķu summu, lai aprēķinātu nezināmos lielumus, formulētu apgalvojumus par figūru īpašībām.* Četrstūrī saskata un pamato divu trijstūru vienādību, secina par četrstūra elementu vienādību, loģiski saistot spriedumus.*Lieto paralelograma (t. sk. romba, taisnstūra, kvadrāta) īpašības, lai aprēķinātu nezināmos lielumus, formulētu apgalvojumus par figūru īpašībām.*Lieto paralelograma un romba laukuma formulas nezināmo lielumu aprēķināšanai.</text:p>
          </table:table-cell>
          <table:table-cell table:style-name="ce14"/>
          <table:table-cell table:style-name="ce2" office:value-type="string" calcext:value-type="string">
            <text:p>Paralelograma īpašības.</text:p>
          </table:table-cell>
          <table:table-cell office:value-type="string" calcext:value-type="string">
            <text:p>9.temats</text:p>
          </table:table-cell>
          <table:table-cell table:style-name="ce12" table:number-columns-repeated="16379"/>
        </table:table-row>
        <table:table-row table:style-name="ro14">
          <table:table-cell table:style-name="ce2" office:value-type="string" calcext:value-type="string">
            <text:p>24.04.2026</text:p>
          </table:table-cell>
          <table:table-cell table:style-name="ce2" office:value-type="string" calcext:value-type="string">
            <text:p>Trapece</text:p>
            <text:p>SR: Lieto trapeces definīciju un īpašību aprēķinu uzdevumos. Atpazīst vienādsānu un taisnleņķu trapeci.</text:p>
          </table:table-cell>
          <table:table-cell table:style-name="ce2" office:value-type="string" calcext:value-type="string">
            <text:p>Teorija: M.g. 208. lpp.</text:p>
            <text:p>28.04.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7">
          <table:table-cell table:style-name="ce2" office:value-type="string" calcext:value-type="string">
            <text:p>28.04.2026</text:p>
          </table:table-cell>
          <table:table-cell table:style-name="ce13" office:value-type="string" calcext:value-type="string">
            <text:p>Vienādsānu un taisnleņķa trapeces.</text:p>
            <text:p>SR: Lieto trapeces definīciju un īpašību aprēķina uzdevumos.</text:p>
          </table:table-cell>
          <table:table-cell table:style-name="ce14"/>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4">
          <table:table-cell table:style-name="ce2" office:value-type="string" calcext:value-type="string">
            <text:p>28.04.2026</text:p>
          </table:table-cell>
          <table:table-cell table:style-name="ce2" office:value-type="string" calcext:value-type="string">
            <text:p>Vienādsānu trapeces īpašības un pazīmes.</text:p>
            <text:p>SR: izveido tekstam atbilstošus uzskatāmus zīmējumus, lieto pieņemtos apzīmējumus, risinot uzdevumus par četrstūriem; lieto trapeču īpašības un pazīmes.</text:p>
          </table:table-cell>
          <table:table-cell table:style-name="ce2"/>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7">
          <table:table-cell table:style-name="ce2" office:value-type="string" calcext:value-type="string">
            <text:p>30.04.2026</text:p>
          </table:table-cell>
          <table:table-cell table:style-name="ce2" office:value-type="string" calcext:value-type="string">
            <text:p>Pitagora teorēmas lietojums</text:p>
            <text:p>SR: Lieto Pitagora teorēmu uzdevumos par trapeci.</text:p>
          </table:table-cell>
          <table:table-cell table:style-name="ce14"/>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3">
          <table:table-cell table:style-name="ce2" office:value-type="string" calcext:value-type="string">
            <text:p>30.04.2026</text:p>
          </table:table-cell>
          <table:table-cell table:style-name="ce2" office:value-type="string" calcext:value-type="string">
            <text:p>Apgalvojumu pierādīšana</text:p>
            <text:p>SR: Lieto trapeces īpašības un pazīmes, lai pierādītu apgalvojumus par figūrām.</text:p>
          </table:table-cell>
          <table:table-cell table:style-name="ce14" office:value-type="string" calcext:value-type="string">
            <text:p>M.g. 217. lpp.</text:p>
            <text:p>1.05.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3">
          <table:table-cell table:style-name="ce2" office:value-type="string" calcext:value-type="string">
            <text:p>5.05.2026</text:p>
          </table:table-cell>
          <table:table-cell table:style-name="ce2" office:value-type="string" calcext:value-type="string">
            <text:p>Trijstūra un trapeces viduslīnija.</text:p>
            <text:p>SR: Aprēķina trijstūra viduslīnijas garumu, izmanto to aprēķinos arī cita veida figūrās. Veido pierādījumus konkrētām situācijām.</text:p>
          </table:table-cell>
          <table:table-cell table:style-name="ce14" office:value-type="string" calcext:value-type="string">
            <text:p>Teorija: M.g. 220.lpp.</text:p>
            <text:p>Stundā: M.g. 222., 223. lpp.</text:p>
            <text:p>7.05.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5">
          <table:table-cell table:style-name="ce2" office:value-type="string" calcext:value-type="string">
            <text:p>5.05.2026</text:p>
          </table:table-cell>
          <table:table-cell table:style-name="ce2" office:value-type="string" calcext:value-type="string">
            <text:p>Trijstūra un trapeces viduslīnija.</text:p>
            <text:p>SR: Aprēķina trijstūra viduslīnijas garumu, izmanto to aprēķinos arī cita veida figūrās. Veido pierādījumus konkrētām situācijām.</text:p>
          </table:table-cell>
          <table:table-cell table:style-name="ce2" office:value-type="string" calcext:value-type="string">
            <text:p>Mājās: Darba lapa (1. - 4. uzd.) Tiem, kas nav nodevuši 30.04.</text:p>
            <text:p> MD_darba lapa_trapece.pdf</text:p>
            <text:p>7.05.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3">
          <table:table-cell table:style-name="ce2" office:value-type="string" calcext:value-type="string">
            <text:p>7.05.2026</text:p>
          </table:table-cell>
          <table:table-cell table:style-name="ce2" office:value-type="string" calcext:value-type="string">
            <text:p>Trijstūra un trapeces viduslīnija.</text:p>
            <text:p>SR: Aprēķina trijstūra viduslīnijas garumu, izmanto to aprēķinos arī cita veida figūrās. Veido pierādījumus konkrētām situācijām.</text:p>
          </table:table-cell>
          <table:table-cell table:style-name="ce14" office:value-type="string" calcext:value-type="string">
            <text:p>Mājās: Darba lapa (1. - 4. uzd.) Tiem, kas nav nodevuši 30.04.</text:p>
            <text:p> MD_darba lapa_trapece.pdf</text:p>
            <text:p>8.05.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3">
          <table:table-cell table:style-name="ce2" office:value-type="string" calcext:value-type="string">
            <text:p>7.05.2026</text:p>
          </table:table-cell>
          <table:table-cell table:style-name="ce2" office:value-type="string" calcext:value-type="string">
            <text:p>Trijstūra un trapeces viduslīnija.</text:p>
            <text:p>SR: Aprēķina trijstūra viduslīnijas garumu, izmanto to aprēķinos arī cita veida figūrās. Veido pierādījumus konkrētām situācijām.</text:p>
          </table:table-cell>
          <table:table-cell table:style-name="ce2"/>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11">
          <table:table-cell table:style-name="ce2" office:value-type="string" calcext:value-type="string">
            <text:p>8.05.2026</text:p>
          </table:table-cell>
          <table:table-cell table:style-name="ce2" office:value-type="string" calcext:value-type="string">
            <text:p>Trapeces laukums, daudzstūra laukums.</text:p>
            <text:p>SR: Aprēķina trapeces laukumu vai trapeces elementus, ja zināms tās laukums. Izmanto Pitagora teorēmu, trapeces elementu aprēķināšanā. Raksta uzdevumu risināšanas plānu, ja jāaprēķina patvaļīga daudzstūra laukums, vai jānovērtē neregulāras formas figūru laukums, pirms tam sadalot figūru vairākās figūrās.</text:p>
          </table:table-cell>
          <table:table-cell table:style-name="ce14" office:value-type="string" calcext:value-type="string">
            <text:p>Teorija: M.g. 226. - 227. lpp.</text:p>
            <text:p>Stundā: 228. - 229. lpp.</text:p>
            <text:p>12.05.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11">
          <table:table-cell table:style-name="ce2" office:value-type="string" calcext:value-type="string">
            <text:p>8.05.2026</text:p>
          </table:table-cell>
          <table:table-cell table:style-name="ce13" office:value-type="string" calcext:value-type="string">
            <text:p>Trapeces laukums, daudzstūra laukums.</text:p>
            <text:p>SR: Aprēķina trapeces laukumu vai trapeces elementus, ja zināms tās laukums. Izmanto Pitagora teorēmu, trapeces elementu aprēķināšanā. Raksta uzdevumu risināšanas plānu, ja jāaprēķina patvaļīga daudzstūra laukums, vai jānovērtē neregulāras formas figūru laukums, pirms tam sadalot figūru vairākās figūrās.</text:p>
          </table:table-cell>
          <table:table-cell table:style-name="ce2"/>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11">
          <table:table-cell table:style-name="ce2" office:value-type="string" calcext:value-type="string">
            <text:p>12.05.2026</text:p>
          </table:table-cell>
          <table:table-cell table:style-name="ce2" office:value-type="string" calcext:value-type="string">
            <text:p>Trapeces laukums, daudzstūra laukums.</text:p>
            <text:p>SR: Aprēķina trapeces laukumu vai trapeces elementus, ja zināms tās laukums. Izmanto Pitagora teorēmu, trapeces elementu aprēķināšanā. Raksta uzdevumu risināšanas plānu, ja jāaprēķina patvaļīga daudzstūra laukums, vai jānovērtē neregulāras formas figūru laukums, pirms tam sadalot figūru vairākās figūrās.</text:p>
          </table:table-cell>
          <table:table-cell table:style-name="ce14"/>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11">
          <table:table-cell table:style-name="ce2" office:value-type="string" calcext:value-type="string">
            <text:p>12.05.2026</text:p>
          </table:table-cell>
          <table:table-cell table:style-name="ce2" office:value-type="string" calcext:value-type="string">
            <text:p>Trapeces laukums, daudzstūra laukums.</text:p>
            <text:p>SR: Aprēķina trapeces laukumu vai trapeces elementus, ja zināms tās laukums. Izmanto Pitagora teorēmu, trapeces elementu aprēķināšanā. Raksta uzdevumu risināšanas plānu, ja jāaprēķina patvaļīga daudzstūra laukums, vai jānovērtē neregulāras formas figūru laukums, pirms tam sadalot figūru vairākās figūrās.</text:p>
          </table:table-cell>
          <table:table-cell table:style-name="ce2"/>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11">
          <table:table-cell table:style-name="ce2" office:value-type="string" calcext:value-type="string">
            <text:p>14.05.2026</text:p>
          </table:table-cell>
          <table:table-cell table:style-name="ce2" office:value-type="string" calcext:value-type="string">
            <text:p>Apkopojums par tematu</text:p>
            <text:p>SR: Lieto trapeces/vienādsānu trapeces/taisnleņķa trapeces īpašības un pazīmes aprēķina un pierādījuma uzdevumos. Aprēķina trijstūra un trapeces viduslīniju. Aprēķina trapeces laukumu.</text:p>
          </table:table-cell>
          <table:table-cell table:style-name="ce2" office:value-type="string" calcext:value-type="string">
            <text:p>M.g. 234. - 235. lpp.</text:p>
            <text:p> Atbildes_es protu_trapece.pdf</text:p>
            <text:p>15.05.2026</text:p>
          </table:table-cell>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4">
          <table:table-cell table:style-name="ce2" office:value-type="string" calcext:value-type="string">
            <text:p>14.05.2026</text:p>
          </table:table-cell>
          <table:table-cell table:style-name="ce2" office:value-type="string" calcext:value-type="string">
            <text:p>Apkopojums par tematu</text:p>
            <text:p>SR: Lieto trapeces/vienādsānu trapeces/taisnleņķa trapeces īpašības un pazīmes aprēķina un pierādījuma uzdevumos. Aprēķina trijstūra un trapeces viduslīniju. Aprēķina trapeces laukumu.</text:p>
          </table:table-cell>
          <table:table-cell table:style-name="ce2"/>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15">
          <table:table-cell table:style-name="ce2" office:value-type="string" calcext:value-type="string">
            <text:p>15.05.2026</text:p>
          </table:table-cell>
          <table:table-cell table:style-name="ce2" office:value-type="string" calcext:value-type="string">
            <text:p>Trapece</text:p>
            <text:p>SR: Lieto trapeces un vienādsānu trapeces īpašības, trapeces viduslīnijas īpašību, lai aprēķinātu figūru nezināmos lielumus, formulētu apgalvojumus par figūru īpašībām. Lieto trapeces laukuma formulu nezināmo lielumu aprēķināšanai. Aprēķina virsmas laukumu un tilpumu taisnai prizmai, kuras pamatā ir trapece.* Lieto trijstūru līdzību, Pitagora teorēmu, trijstūra viduslīnijas īpašību, lai aprēķinātu trapeces vai vienādsānu trapeces nezināmos lielumus.</text:p>
          </table:table-cell>
          <table:table-cell table:style-name="ce2"/>
          <table:table-cell table:style-name="ce2" office:value-type="string" calcext:value-type="string">
            <text:p>Trapeces īpašības.</text:p>
          </table:table-cell>
          <table:table-cell office:value-type="string" calcext:value-type="string">
            <text:p>10.temats</text:p>
          </table:table-cell>
          <table:table-cell table:style-name="ce12" table:number-columns-repeated="16379"/>
        </table:table-row>
        <table:table-row table:style-name="ro9">
          <table:table-cell table:style-name="ce2" office:value-type="string" calcext:value-type="string">
            <text:p>15.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Sadala izteiksmi reizinātājos, lietojot saīsinātās reizināšanas formulas un grupēšanas paņēmienu.</text:p>
          </table:table-cell>
          <table:table-cell table:style-name="ce2" office:value-type="string" calcext:value-type="string">
            <text:p> 2020_ gada iestājeksāmens-2-4.pdf</text:p>
            <text:p> 2023_matematika_9-1-8.pdf</text:p>
            <text:p>22.05.2026</text:p>
          </table:table-cell>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19.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2"/>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19.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2"/>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2.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2"/>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2.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2"/>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6.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14"/>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6.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2"/>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8.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14"/>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8.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14"/>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9.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14"/>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2">
          <table:table-cell table:style-name="ce2" office:value-type="string" calcext:value-type="string">
            <text:p>29.05.2026</text:p>
          </table:table-cell>
          <table:table-cell table:style-name="ce2" office:value-type="string" calcext:value-type="string">
            <text:p>Apkopojums par 8. klases vielu</text:p>
            <text:p>SR: Iepazīstas ar CE un iestājeksāmenu uzbūvi. Veic darbības ar kvadrātsaknēm, daļām, pakāpēm. Risina lineārus un kvadrātvienādojumus, lineāras nevienādības. Sadala izteiksmi reizinātājos, lietojot saīsinātās reizināšanas formulas un grupēšanas paņēmienu. Nosaka funkciju īpašības</text:p>
          </table:table-cell>
          <table:table-cell table:style-name="ce14"/>
          <table:table-cell table:style-name="ce2" office:value-type="string" calcext:value-type="string">
            <text:p>Nobeigums.</text:p>
          </table:table-cell>
          <table:table-cell office:value-type="string" calcext:value-type="string">
            <text:p>NA</text:p>
          </table:table-cell>
          <table:table-cell table:style-name="ce12" table:number-columns-repeated="16379"/>
        </table:table-row>
        <table:table-row table:style-name="ro1" table:number-rows-repeated="1048377">
          <table:table-cell table:number-columns-repeated="5"/>
          <table:table-cell table:style-name="ce12" table:number-columns-repeated="16379"/>
        </table:table-row>
        <table:table-row table:style-name="ro1">
          <table:table-cell table:number-columns-repeated="5"/>
          <table:table-cell table:style-name="ce12" table:number-columns-repeated="16379"/>
        </table:table-row>
      </table:table>
      <table:named-expressions/>
      <table:database-ranges>
        <table:database-range table:name="__Anonymous_Sheet_DB__0" table:target-range-address="Sheet1.A1:Sheet1.XFD1048576" table:contains-header="false">
          <table:sort table:bind-styles-to-content="false">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00:20:00.899295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12T00:21:30.798333700</meta:creation-date>
    <dc:date>2026-07-14T00:28:28.036734700</dc:date>
    <meta:editing-duration>PT4H7M55S</meta:editing-duration>
    <meta:editing-cycles>4</meta:editing-cycles>
    <meta:generator>LibreOffice/26.2.4.2$Windows_X86_64 LibreOffice_project/0229ac93fcf0d7cbc6376066c6f35021cef002dc</meta:generator>
    <meta:document-statistic meta:table-count="1" meta:cell-count="878" meta:object-count="0"/>
  </office:meta>
</office:document-meta>
</file>